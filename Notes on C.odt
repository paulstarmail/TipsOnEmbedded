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660000060B4D66437A.jpg" manifest:media-type="image/jpeg"/>
  <manifest:file-entry manifest:full-path="Pictures/1000000000000565000003FA477C2791.jpg" manifest:media-type="image/jpeg"/>
  <manifest:file-entry manifest:full-path="Pictures/1000000100000162000003165ECD5D74.png" manifest:media-type="image/png"/>
  <manifest:file-entry manifest:full-path="Pictures/1000000100000751000001CFE97EAF59.png" manifest:media-type="image/png"/>
  <manifest:file-entry manifest:full-path="Pictures/100000000000036F00000526AD82A23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1" svg:font-family="Arial" style:font-adornments="Regular" style:font-family-generic="swiss" style:font-pitch="variable"/>
    <style:font-face style:name="Calibri" svg:font-family="Calibri" style:font-family-generic="roman"/>
    <style:font-face style:name="Calibri1" svg:font-family="Calibri" style:font-family-generic="swiss"/>
    <style:font-face style:name="Calibri2" svg:font-family="Calibri" style:font-family-generic="system" style:font-pitch="variable"/>
    <style:font-face style:name="Courier New" svg:font-family="'Courier New'" style:font-family-generic="roman"/>
    <style:font-face style:name="Courier New1" svg:font-family="'Courier New'" style:font-family-generic="system" style:font-pitch="variable"/>
    <style:font-face style:name="Droid Sans Mono" svg:font-family="'Droid Sans Mono',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e2" style:family="table">
      <style:table-properties style:width="17.053cm" fo:margin-left="-0.053cm" fo:margin-top="0cm" fo:margin-bottom="0cm" table:align="left" style:writing-mode="page"/>
    </style:style>
    <style:style style:name="Table2.A" style:family="table-column">
      <style:table-column-properties style:column-width="2.471cm"/>
    </style:style>
    <style:style style:name="Table2.B" style:family="table-column">
      <style:table-column-properties style:column-width="7.338cm"/>
    </style:style>
    <style:style style:name="Table2.C" style:family="table-column">
      <style:table-column-properties style:column-width="7.244cm"/>
    </style:style>
    <style:style style:name="Table2.1" style:family="table-row">
      <style:table-row-properties style:min-row-height="1.632cm" fo:keep-together="auto"/>
    </style:style>
    <style:style style:name="Table2.A1" style:family="table-cell">
      <style:table-cell-properties style:vertical-align="bottom" fo:padding-left="0.053cm" fo:padding-right="0.053cm" fo:padding-top="0cm" fo:padding-bottom="0cm" fo:border="none"/>
    </style:style>
    <style:style style:name="Table2.4" style:family="table-row">
      <style:table-row-properties style:min-row-height="2.027cm" fo:keep-together="auto"/>
    </style:style>
    <style:style style:name="Table1" style:family="table">
      <style:table-properties style:width="15.882cm" fo:margin-left="0cm" fo:margin-top="0cm" fo:margin-bottom="0cm" table:align="left" style:writing-mode="lr-tb"/>
    </style:style>
    <style:style style:name="Table1.A" style:family="table-column">
      <style:table-column-properties style:column-width="2.535cm"/>
    </style:style>
    <style:style style:name="Table1.B" style:family="table-column">
      <style:table-column-properties style:column-width="13.347cm"/>
    </style:style>
    <style:style style:name="Table1.1" style:family="table-row">
      <style:table-row-properties style:min-row-height="0.647cm" fo:keep-together="auto"/>
    </style:style>
    <style:style style:name="Table1.A1" style:family="table-cell">
      <style:table-cell-properties fo:padding="0cm" fo:border="none" style:writing-mode="lr-tb"/>
    </style:style>
    <style:style style:name="Table1.2" style:family="table-row">
      <style:table-row-properties style:min-row-height="0.864cm" fo:keep-together="auto"/>
    </style:style>
    <style:style style:name="Table1.A2" style:family="table-cell">
      <style:table-cell-properties style:vertical-align="middle" fo:padding="0cm" fo:border="none" style:writing-mode="lr-tb"/>
    </style:style>
    <style:style style:name="Table1.3" style:family="table-row">
      <style:table-row-properties style:min-row-height="1.376cm" fo:keep-together="auto"/>
    </style:style>
    <style:style style:name="Table1.A5" style:family="table-cell">
      <style:table-cell-properties style:vertical-align="bottom" fo:padding="0cm" fo:border="none" style:writing-mode="lr-tb"/>
    </style:style>
    <style:style style:name="P1" style:family="paragraph" style:parent-style-name="Contents_20_1">
      <style:paragraph-properties>
        <style:tab-stops>
          <style:tab-stop style:position="16.99cm" style:type="right" style:leader-style="dotted" style:leader-text="."/>
        </style:tab-stops>
      </style:paragraph-properties>
    </style:style>
    <style:style style:name="P2" style:family="paragraph" style:parent-style-name="Standard">
      <style:paragraph-properties fo:margin-left="-0.009cm" fo:margin-right="0.062cm" fo:margin-top="0cm" fo:margin-bottom="0.092cm" style:contextual-spacing="false" fo:line-height="100%" fo:text-indent="-0.018cm" style:auto-text-indent="false"/>
      <style:text-properties officeooo:paragraph-rsid="0003816f"/>
    </style:style>
    <style:style style:name="P3" style:family="paragraph" style:parent-style-name="Standard">
      <style:paragraph-properties fo:margin-left="0cm" fo:margin-right="0cm" fo:margin-top="0cm" fo:margin-bottom="0.367cm" style:contextual-spacing="false" fo:line-height="110%" fo:text-indent="0cm" style:auto-text-indent="false"/>
      <style:text-properties officeooo:paragraph-rsid="0003816f"/>
    </style:style>
    <style:style style:name="P4"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officeooo:paragraph-rsid="0003816f" style:font-name-asian="Courier New1" style:font-name-complex="Courier New1"/>
    </style:style>
    <style:style style:name="P5" style:family="paragraph" style:parent-style-name="Standard">
      <style:paragraph-properties fo:margin-left="-0.009cm" fo:margin-right="0.062cm" fo:margin-top="0cm" fo:margin-bottom="0.367cm" style:contextual-spacing="false" fo:line-height="100%" fo:text-indent="-0.018cm" style:auto-text-indent="false"/>
      <style:text-properties style:font-name="Courier New" fo:language="en" fo:country="GB" officeooo:paragraph-rsid="0003816f" style:font-name-asian="Courier New1" style:font-name-complex="Courier New1"/>
    </style:style>
    <style:style style:name="P6" style:family="paragraph" style:parent-style-name="Standard">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left="-0.026cm" fo:margin-right="0.448cm" fo:margin-top="0cm" fo:margin-bottom="0.118cm" style:contextual-spacing="false" fo:line-height="175%" fo:text-indent="1.27cm" style:auto-text-indent="false"/>
      <style:text-properties style:font-name="Courier New" fo:language="en" fo:country="GB" officeooo:paragraph-rsid="0003816f" style:font-name-asian="Courier New1" style:font-name-complex="Courier New1"/>
    </style:style>
    <style:style style:name="P8" style:family="paragraph" style:parent-style-name="Standard">
      <style:paragraph-properties fo:margin-left="0cm" fo:margin-right="0cm" fo:margin-top="0cm" fo:margin-bottom="0.353cm" style:contextual-spacing="false" fo:line-height="121%" fo:text-indent="0cm" style:auto-text-indent="false"/>
      <style:text-properties style:font-name="Courier New" fo:language="en" fo:country="GB" officeooo:paragraph-rsid="0003816f" style:font-name-asian="Courier New1" style:font-name-complex="Courier New1"/>
    </style:style>
    <style:style style:name="P9" style:family="paragraph" style:parent-style-name="Standard">
      <style:paragraph-properties fo:margin-left="0cm" fo:margin-right="0cm" fo:margin-top="0cm" fo:margin-bottom="0.353cm" style:contextual-spacing="false" fo:line-height="121%" fo:text-indent="0cm" style:auto-text-indent="false"/>
      <style:text-properties style:font-name="Courier New" fo:language="en" fo:country="GB" officeooo:rsid="0003816f" officeooo:paragraph-rsid="0003816f" style:font-name-asian="Courier New1" style:font-name-complex="Courier New1"/>
    </style:style>
    <style:style style:name="P10" style:family="paragraph" style:parent-style-name="Standard">
      <style:paragraph-properties fo:margin-left="-0.009cm" fo:margin-right="4.872cm" fo:margin-top="0cm" fo:margin-bottom="0.016cm" style:contextual-spacing="false" fo:line-height="198%" fo:text-indent="-0.018cm" style:auto-text-indent="false"/>
      <style:text-properties style:font-name="Courier New" fo:language="en" fo:country="GB" officeooo:paragraph-rsid="0003816f" style:font-name-asian="Courier New1" style:font-name-complex="Courier New1"/>
    </style:style>
    <style:style style:name="P11" style:family="paragraph" style:parent-style-name="Standard">
      <style:paragraph-properties fo:margin-left="0.018cm" fo:margin-right="4.872cm" fo:margin-top="0cm" fo:margin-bottom="0.016cm" style:contextual-spacing="false" fo:line-height="198%" fo:text-indent="-0.018cm" style:auto-text-indent="false"/>
      <style:text-properties style:font-name="Courier New" fo:language="en" fo:country="GB" officeooo:paragraph-rsid="0003816f" style:font-name-asian="Courier New1" style:font-name-complex="Courier New1"/>
    </style:style>
    <style:style style:name="P12" style:family="paragraph" style:parent-style-name="Standard">
      <style:paragraph-properties fo:margin-left="0.018cm" fo:margin-right="4.872cm" fo:margin-top="0cm" fo:margin-bottom="0.016cm" style:contextual-spacing="false" fo:line-height="198%" fo:text-indent="1.252cm" style:auto-text-indent="false"/>
      <style:text-properties style:font-name="Courier New" fo:language="en" fo:country="GB" officeooo:paragraph-rsid="0003816f" style:font-name-asian="Courier New1" style:font-name-complex="Courier New1"/>
    </style:style>
    <style:style style:name="P13" style:family="paragraph" style:parent-style-name="Standard">
      <style:paragraph-properties fo:margin-left="0.291cm" fo:margin-right="4.872cm" fo:margin-top="0cm" fo:margin-bottom="0.016cm" style:contextual-spacing="false" fo:line-height="198%" fo:text-indent="0.979cm" style:auto-text-indent="false"/>
      <style:text-properties style:font-name="Courier New" fo:language="en" fo:country="GB" officeooo:paragraph-rsid="0003816f" style:font-name-asian="Courier New1" style:font-name-complex="Courier New1"/>
    </style:style>
    <style:style style:name="P14" style:family="paragraph" style:parent-style-name="Standard">
      <style:paragraph-properties fo:margin-left="0cm" fo:margin-right="0cm" fo:margin-top="0cm" fo:margin-bottom="0.016cm" style:contextual-spacing="false" fo:line-height="198%" fo:text-indent="0cm" style:auto-text-indent="false"/>
      <style:text-properties style:font-name="Courier New" fo:language="en" fo:country="GB" officeooo:paragraph-rsid="0003816f" style:font-name-asian="Courier New1" style:font-name-complex="Courier New1"/>
    </style:style>
    <style:style style:name="P15" style:family="paragraph" style:parent-style-name="Standard">
      <style:paragraph-properties fo:margin-left="0cm" fo:margin-right="-0.101cm" fo:margin-top="0cm" fo:margin-bottom="0.016cm" style:contextual-spacing="false" fo:line-height="198%" fo:text-indent="0cm" style:auto-text-indent="false"/>
      <style:text-properties style:font-name="Courier New" fo:language="en" fo:country="GB" officeooo:paragraph-rsid="0003816f" style:font-name-asian="Courier New1" style:font-name-complex="Courier New1"/>
    </style:style>
    <style:style style:name="P16"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left="0cm" fo:margin-right="-0.101cm" fo:margin-top="0cm" fo:margin-bottom="0.016cm" style:contextual-spacing="false" fo:line-height="198%" fo:text-indent="0cm" style:auto-text-indent="false"/>
      <style:text-properties style:font-name="Courier New" fo:language="en" fo:country="GB" officeooo:paragraph-rsid="001de9d4" style:font-name-asian="Courier New1" style:font-name-complex="Courier New1"/>
    </style:style>
    <style:style style:name="P18" style:family="paragraph" style:parent-style-name="Standard">
      <style:paragraph-properties fo:margin-left="-0.009cm" fo:margin-right="0.295cm" fo:margin-top="0cm" fo:margin-bottom="0.016cm" style:contextual-spacing="false" fo:text-indent="-0.018cm" style:auto-text-indent="false"/>
      <style:text-properties style:font-name="Courier New" fo:language="en" fo:country="GB" officeooo:paragraph-rsid="0003816f" style:font-name-asian="Courier New1" style:font-name-complex="Courier New1"/>
    </style:style>
    <style:style style:name="P19" style:family="paragraph" style:parent-style-name="Standard">
      <style:paragraph-properties fo:margin-left="0cm" fo:margin-right="0cm" fo:margin-top="0cm" fo:margin-bottom="0.411cm" style:contextual-spacing="false" fo:text-indent="0cm" style:auto-text-indent="false"/>
      <style:text-properties style:font-name="Courier New" fo:language="en" fo:country="GB" officeooo:paragraph-rsid="0003816f" style:font-name-asian="Courier New1" style:font-name-complex="Courier New1"/>
    </style:style>
    <style:style style:name="P20" style:family="paragraph" style:parent-style-name="Standard">
      <style:paragraph-properties fo:margin-left="0cm" fo:margin-right="0.3cm" fo:margin-top="0cm" fo:margin-bottom="0.342cm" style:contextual-spacing="false" fo:line-height="108%"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left="0cm" fo:margin-right="0cm" fo:margin-top="0cm" fo:margin-bottom="0.342cm" style:contextual-spacing="false" fo:line-height="108%"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left="-0.009cm" fo:margin-right="0.062cm" fo:margin-top="0cm" fo:margin-bottom="0.367cm" style:contextual-spacing="false" fo:line-height="110%" fo:text-indent="-0.018cm" style:auto-text-indent="false"/>
      <style:text-properties style:font-name="Courier New" fo:language="en" fo:country="GB" officeooo:paragraph-rsid="0003816f" style:font-name-asian="Courier New1" style:font-name-complex="Courier New1"/>
    </style:style>
    <style:style style:name="P23" style:family="paragraph" style:parent-style-name="Standard">
      <style:paragraph-properties fo:margin-left="0cm" fo:margin-right="0cm" fo:margin-top="0cm" fo:margin-bottom="0.367cm" style:contextual-spacing="false" fo:line-height="110%" fo:text-indent="0cm" style:auto-text-indent="false"/>
      <style:text-properties style:font-name="Courier New" fo:language="en" fo:country="GB" officeooo:paragraph-rsid="0003816f" style:font-name-asian="Courier New1" style:font-name-complex="Courier New1"/>
    </style:style>
    <style:style style:name="P24" style:family="paragraph" style:parent-style-name="Standard">
      <style:paragraph-properties fo:margin-left="0cm" fo:margin-right="0cm" fo:margin-top="0cm" fo:margin-bottom="0.092cm" style:contextual-spacing="false" fo:line-height="193%" fo:text-indent="0cm" style:auto-text-indent="false"/>
      <style:text-properties style:font-name="Courier New" fo:language="en" fo:country="GB" officeooo:paragraph-rsid="0003816f" style:font-name-asian="Courier New1" style:font-name-complex="Courier New1"/>
    </style:style>
    <style:style style:name="P25"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officeooo:rsid="00561093" officeooo:paragraph-rsid="0055e858" style:font-name-asian="Courier New1" style:font-name-complex="Courier New1"/>
    </style:style>
    <style:style style:name="P26"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officeooo:rsid="0058c28d" officeooo:paragraph-rsid="0058c28d" style:font-name-asian="Courier New1" style:font-name-complex="Courier New1"/>
    </style:style>
    <style:style style:name="P27"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style:font-name="Courier New" fo:language="en" fo:country="GB" officeooo:paragraph-rsid="0003816f"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left="-0.009cm" fo:margin-right="4.872cm" fo:margin-top="0cm" fo:margin-bottom="0.016cm" style:contextual-spacing="false" fo:line-height="198%" fo:text-indent="-0.018cm" style:auto-text-indent="false"/>
      <style:text-properties style:font-name="Courier New" officeooo:paragraph-rsid="0003816f" style:font-name-asian="Courier New1" style:font-name-complex="Courier New1"/>
    </style:style>
    <style:style style:name="P29" style:family="paragraph" style:parent-style-name="Standard">
      <style:paragraph-properties fo:margin-left="-0.009cm" fo:margin-right="11.963cm" fo:margin-top="0cm" fo:margin-bottom="0.016cm" style:contextual-spacing="false" fo:line-height="198%" fo:text-indent="-0.018cm" style:auto-text-indent="false"/>
      <style:text-properties style:font-name="Courier New" officeooo:paragraph-rsid="0003816f" style:font-name-asian="Courier New1" style:font-name-complex="Courier New1"/>
    </style:style>
    <style:style style:name="P30" style:family="paragraph" style:parent-style-name="Standard">
      <style:paragraph-properties fo:margin-left="-0.009cm" fo:margin-right="12.428cm" fo:margin-top="0cm" fo:margin-bottom="0.016cm" style:contextual-spacing="false" fo:line-height="198%" fo:text-indent="-0.018cm" style:auto-text-indent="false"/>
      <style:text-properties style:font-name="Courier New" officeooo:paragraph-rsid="0003816f" style:font-name-asian="Courier New1" style:font-name-complex="Courier New1"/>
    </style:style>
    <style:style style:name="P31" style:family="paragraph" style:parent-style-name="Standard">
      <style:paragraph-properties fo:margin-left="0cm" fo:margin-right="0cm" fo:margin-top="0cm" fo:margin-bottom="0.016cm" style:contextual-spacing="false" fo:line-height="198%" fo:text-indent="0cm" style:auto-text-indent="false"/>
      <style:text-properties style:font-name="Courier New" officeooo:paragraph-rsid="0003816f" style:font-name-asian="Courier New1" style:font-name-complex="Courier New1"/>
    </style:style>
    <style:style style:name="P32" style:family="paragraph" style:parent-style-name="Standard">
      <style:paragraph-properties fo:margin-left="0cm" fo:margin-right="-0.101cm" fo:margin-top="0cm" fo:margin-bottom="0.016cm" style:contextual-spacing="false" fo:line-height="198%" fo:text-indent="0cm" style:auto-text-indent="false"/>
      <style:text-properties style:font-name="Courier New" officeooo:paragraph-rsid="0003816f" style:font-name-asian="Courier New1" style:font-name-complex="Courier New1"/>
    </style:style>
    <style:style style:name="P33" style:family="paragraph" style:parent-style-name="Standard">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style:font-name="Courier New"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left="-0.009cm" fo:margin-right="12.196cm" fo:margin-top="0cm" fo:margin-bottom="0cm" style:contextual-spacing="false" fo:line-height="100%" fo:text-indent="-0.018cm" style:auto-text-indent="false"/>
      <style:text-properties style:font-name="Courier New" officeooo:paragraph-rsid="0003816f" style:font-name-asian="Courier New1" style:font-name-complex="Courier New1"/>
    </style:style>
    <style:style style:name="P35"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officeooo:paragraph-rsid="0003816f" style:font-name-asian="Courier New1" style:font-name-complex="Courier New1"/>
    </style:style>
    <style:style style:name="P36" style:family="paragraph" style:parent-style-name="Standard">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writing-mode="lr-tb"/>
      <style:text-properties style:font-name="Courier New"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margin-left="-0.009cm" fo:margin-right="0.062cm" fo:margin-top="0cm" fo:margin-bottom="0.367cm" style:contextual-spacing="false" fo:line-height="110%" fo:text-indent="-0.018cm" style:auto-text-indent="false"/>
      <style:text-properties style:font-name="Courier New" officeooo:paragraph-rsid="0003816f" style:font-name-asian="Courier New1" style:font-name-complex="Courier New1"/>
    </style:style>
    <style:style style:name="P38" style:family="paragraph" style:parent-style-name="Standard">
      <style:paragraph-properties fo:margin-left="-0.009cm" fo:margin-right="0.295cm" fo:margin-top="0cm" fo:margin-bottom="0.016cm" style:contextual-spacing="false" fo:text-indent="-0.018cm" style:auto-text-indent="false"/>
      <style:text-properties style:font-name="Courier New" officeooo:paragraph-rsid="0003816f" style:font-name-asian="Courier New1" style:font-name-complex="Courier New1"/>
    </style:style>
    <style:style style:name="P39" style:family="paragraph" style:parent-style-name="Standard">
      <style:paragraph-properties fo:margin-left="-0.009cm" fo:margin-right="1.868cm" fo:margin-top="0cm" fo:margin-bottom="0.007cm" style:contextual-spacing="false" fo:line-height="103%" fo:text-indent="-0.018cm" style:auto-text-indent="false"/>
      <style:text-properties style:font-name="Courier New" fo:font-size="10pt" officeooo:paragraph-rsid="0003816f" style:font-name-asian="Courier New1" style:font-size-asian="10pt" style:font-name-complex="Courier New1"/>
    </style:style>
    <style:style style:name="P40" style:family="paragraph" style:parent-style-name="Standard">
      <style:paragraph-properties fo:margin-top="0cm" fo:margin-bottom="0cm" style:contextual-spacing="false" fo:text-align="center" style:justify-single-word="false"/>
      <style:text-properties fo:color="#365f91" loext:opacity="100%" fo:font-size="30pt" officeooo:paragraph-rsid="0003816f" style:font-size-asian="30pt"/>
    </style:style>
    <style:style style:name="P41" style:family="paragraph" style:parent-style-name="Standard">
      <style:paragraph-properties fo:margin-top="0cm" fo:margin-bottom="0cm" style:contextual-spacing="false" fo:text-align="center" style:justify-single-word="false"/>
      <style:text-properties fo:color="#595959" loext:opacity="100%" officeooo:paragraph-rsid="0003816f"/>
    </style:style>
    <style:style style:name="P42"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officeooo:paragraph-rsid="0003816f" style:font-name-asian="Times New Roman1" style:font-name-complex="Times New Roman1"/>
    </style:style>
    <style:style style:name="P43"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style:font-name="Times New Roman" officeooo:paragraph-rsid="0003816f" style:font-name-asian="Times New Roman1" style:font-name-complex="Times New Roman1"/>
    </style:style>
    <style:style style:name="P44" style:family="paragraph" style:parent-style-name="Standard">
      <style:paragraph-properties fo:margin-left="0cm" fo:margin-right="0cm" fo:margin-top="0cm" fo:margin-bottom="0.353cm" style:contextual-spacing="false" fo:line-height="121%" fo:text-indent="0cm" style:auto-text-indent="false"/>
      <style:text-properties style:font-name="Times New Roman" officeooo:paragraph-rsid="0003816f" style:font-name-asian="Times New Roman1" style:font-name-complex="Times New Roman1"/>
    </style:style>
    <style:style style:name="P45" style:family="paragraph" style:parent-style-name="Standard">
      <style:paragraph-properties fo:margin-left="-0.009cm" fo:margin-right="0.025cm" fo:margin-top="0cm" fo:margin-bottom="0.445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46"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47"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48"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fo:language="en" fo:country="GB" officeooo:paragraph-rsid="0055e858" style:font-name-asian="Times New Roman1" style:font-name-complex="Times New Roman1"/>
    </style:style>
    <style:style style:name="P49"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fo:language="en" fo:country="GB" officeooo:paragraph-rsid="0058c28d" style:font-name-asian="Times New Roman1" style:font-name-complex="Times New Roman1"/>
    </style:style>
    <style:style style:name="P50" style:family="paragraph" style:parent-style-name="Standard">
      <style:paragraph-properties fo:margin-left="-0.009cm" fo:margin-right="0.025cm" fo:margin-top="0cm" fo:margin-bottom="0.318cm" style:contextual-spacing="false" fo:line-height="16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51"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text-properties style:font-name="Times New Roman" fo:language="en" fo:country="GB" fo:font-weight="normal" officeooo:paragraph-rsid="0003816f" style:font-name-asian="Times New Roman1" style:font-weight-asian="normal" style:font-name-complex="Times New Roman1" style:font-weight-complex="normal"/>
    </style:style>
    <style:style style:name="P52" style:family="paragraph" style:parent-style-name="Standard">
      <style:paragraph-properties fo:margin-left="-0.009cm" fo:margin-right="0.025cm" fo:margin-top="0cm" fo:margin-bottom="1.531cm" style:contextual-spacing="false" fo:line-height="110%" fo:text-align="justify" style:justify-single-word="false" fo:text-indent="-0.018cm" style:auto-text-indent="false"/>
      <style:text-properties style:font-name="Times New Roman" fo:language="en" fo:country="GB" fo:font-weight="normal" officeooo:paragraph-rsid="0003816f" style:font-name-asian="Times New Roman1" style:font-weight-asian="normal" style:font-name-complex="Times New Roman1" style:font-weight-complex="normal"/>
    </style:style>
    <style:style style:name="P53" style:family="paragraph" style:parent-style-name="Standard">
      <style:paragraph-properties fo:margin-left="-0.009cm" fo:margin-right="0.025cm" fo:margin-top="0cm" fo:margin-bottom="0.318cm" style:contextual-spacing="false" fo:line-height="160%" fo:text-align="justify" style:justify-single-word="false" fo:text-indent="-0.018cm" style:auto-text-indent="false"/>
      <style:text-properties style:font-name="Times New Roman" fo:language="en" fo:country="GB" fo:font-weight="bold" officeooo:paragraph-rsid="0003816f" style:font-name-asian="Times New Roman1" style:font-weight-asian="bold" style:font-name-complex="Times New Roman1"/>
    </style:style>
    <style:style style:name="P54" style:family="paragraph" style:parent-style-name="Standard">
      <style:paragraph-properties fo:margin-left="-0.009cm" fo:margin-top="0cm" fo:margin-bottom="0.325cm" style:contextual-spacing="false" fo:line-height="110%" fo:text-indent="-0.018cm" style:auto-text-indent="false"/>
      <style:text-properties style:font-name="Times New Roman" fo:language="en" fo:country="GB" fo:font-weight="bold" officeooo:paragraph-rsid="0003816f" style:font-name-asian="Times New Roman1" style:font-weight-asian="bold" style:font-name-complex="Times New Roman1"/>
    </style:style>
    <style:style style:name="P55" style:family="paragraph" style:parent-style-name="Standard">
      <style:paragraph-properties fo:margin-left="0cm" fo:margin-right="0cm" fo:margin-top="0cm" fo:margin-bottom="0.353cm" style:contextual-spacing="false" fo:line-height="121%" fo:text-indent="0cm" style:auto-text-indent="false"/>
      <style:text-properties officeooo:paragraph-rsid="0003816f"/>
    </style:style>
    <style:style style:name="P56" style:family="paragraph" style:parent-style-name="Standard">
      <style:paragraph-properties fo:margin-left="0cm" fo:margin-right="0cm" fo:margin-top="0cm" fo:margin-bottom="0.353cm" style:contextual-spacing="false" fo:line-height="121%" fo:text-align="justify" style:justify-single-word="false" fo:text-indent="0cm" style:auto-text-indent="false"/>
      <style:text-properties officeooo:paragraph-rsid="0003816f"/>
    </style:style>
    <style:style style:name="P57" style:family="paragraph" style:parent-style-name="Standard">
      <style:paragraph-properties fo:margin-left="-0.009cm" fo:margin-right="0.062cm" fo:margin-top="0cm" fo:margin-bottom="0.092cm" style:contextual-spacing="false" fo:line-height="100%" fo:text-indent="0cm" style:auto-text-indent="false"/>
      <style:text-properties officeooo:rsid="00222707" officeooo:paragraph-rsid="0003816f"/>
    </style:style>
    <style:style style:name="P58" style:family="paragraph" style:parent-style-name="Standard">
      <style:paragraph-properties fo:text-align="start" style:justify-single-word="false">
        <style:tab-stops/>
      </style:paragraph-properties>
      <style:text-properties style:font-name="Liberation Serif" fo:language="en" fo:country="GB" fo:font-weight="bold" style:font-name-asian="Times New Roman1" style:font-weight-asian="bold" style:font-name-complex="Times New Roman1"/>
    </style:style>
    <style:style style:name="P59" style:family="paragraph" style:parent-style-name="Standard">
      <style:paragraph-properties fo:text-align="start" style:justify-single-word="false">
        <style:tab-stops/>
      </style:paragraph-properties>
      <style:text-properties style:font-name="Liberation Serif1" fo:font-weight="bold" style:font-weight-asian="bold"/>
    </style:style>
    <style:style style:name="P60" style:family="paragraph" style:parent-style-name="Standard">
      <style:paragraph-properties fo:text-align="start" style:justify-single-word="false">
        <style:tab-stops/>
      </style:paragraph-properties>
      <style:text-properties style:font-name="Liberation Serif1"/>
    </style:style>
    <style:style style:name="P61" style:family="paragraph" style:parent-style-name="Heading_20_2">
      <style:paragraph-properties fo:margin-left="-0.009cm" fo:margin-top="0cm" fo:margin-bottom="0.369cm" style:contextual-spacing="false" fo:text-indent="-0.018cm" style:auto-text-indent="false"/>
      <style:text-properties officeooo:paragraph-rsid="0003816f"/>
    </style:style>
    <style:style style:name="P62" style:family="paragraph" style:parent-style-name="Heading_20_2">
      <style:paragraph-properties fo:margin-left="-0.009cm" fo:text-indent="-0.018cm" style:auto-text-indent="false"/>
      <style:text-properties officeooo:paragraph-rsid="0003816f"/>
    </style:style>
    <style:style style:name="P63" style:family="paragraph" style:parent-style-name="Heading_20_2">
      <style:paragraph-properties fo:margin-left="-0.009cm" fo:margin-top="0cm" fo:margin-bottom="0.51cm" style:contextual-spacing="false" fo:text-indent="-0.018cm" style:auto-text-indent="false"/>
      <style:text-properties officeooo:paragraph-rsid="0003816f"/>
    </style:style>
    <style:style style:name="P64" style:family="paragraph" style:parent-style-name="Heading_20_2">
      <style:paragraph-properties fo:margin-left="-0.009cm" fo:margin-top="0cm" fo:margin-bottom="0.37cm" style:contextual-spacing="false" fo:text-indent="-0.018cm" style:auto-text-indent="false"/>
      <style:text-properties officeooo:paragraph-rsid="0003816f"/>
    </style:style>
    <style:style style:name="P65" style:family="paragraph" style:parent-style-name="Heading_20_2">
      <style:paragraph-properties fo:margin-left="-0.026cm" fo:margin-top="0cm" fo:margin-bottom="0.379cm" style:contextual-spacing="false" fo:text-indent="0cm" style:auto-text-indent="false">
        <style:tab-stops>
          <style:tab-stop style:position="1.002cm" style:type="center"/>
        </style:tab-stops>
      </style:paragraph-properties>
      <style:text-properties officeooo:paragraph-rsid="0003816f"/>
    </style:style>
    <style:style style:name="P66" style:family="paragraph" style:parent-style-name="Heading_20_2">
      <style:paragraph-properties fo:margin-left="-0.026cm" fo:margin-top="0cm" fo:margin-bottom="0.379cm" style:contextual-spacing="false" fo:text-indent="0cm" style:auto-text-indent="false">
        <style:tab-stops>
          <style:tab-stop style:position="1.318cm" style:type="center"/>
        </style:tab-stops>
      </style:paragraph-properties>
      <style:text-properties officeooo:paragraph-rsid="0003816f"/>
    </style:style>
    <style:style style:name="P67" style:family="paragraph" style:parent-style-name="Heading_20_2">
      <style:paragraph-properties fo:margin-left="-0.026cm" fo:margin-top="0cm" fo:margin-bottom="0.379cm" style:contextual-spacing="false" fo:text-indent="0cm" style:auto-text-indent="false">
        <style:tab-stops>
          <style:tab-stop style:position="1.076cm" style:type="center"/>
        </style:tab-stops>
      </style:paragraph-properties>
      <style:text-properties officeooo:paragraph-rsid="0003816f"/>
    </style:style>
    <style:style style:name="P68" style:family="paragraph" style:parent-style-name="Heading_20_2">
      <style:paragraph-properties fo:margin-left="-0.026cm" fo:margin-top="0cm" fo:margin-bottom="0.379cm" style:contextual-spacing="false" fo:text-indent="0cm" style:auto-text-indent="false">
        <style:tab-stops>
          <style:tab-stop style:position="1.162cm" style:type="center"/>
        </style:tab-stops>
      </style:paragraph-properties>
      <style:text-properties officeooo:paragraph-rsid="0003816f"/>
    </style:style>
    <style:style style:name="P69" style:family="paragraph" style:parent-style-name="Heading_20_2">
      <style:paragraph-properties fo:margin-left="-0.009cm" fo:margin-top="0cm" fo:margin-bottom="0.369cm" style:contextual-spacing="false" fo:text-indent="-0.018cm" style:auto-text-indent="false"/>
      <style:text-properties fo:language="en" fo:country="GB" officeooo:paragraph-rsid="0003816f"/>
    </style:style>
    <style:style style:name="P70" style:family="paragraph" style:parent-style-name="Heading_20_2">
      <style:paragraph-properties fo:margin-left="-0.009cm" fo:margin-top="0cm" fo:margin-bottom="0.379cm" style:contextual-spacing="false" fo:line-height="108%" fo:text-indent="-0.018cm" style:auto-text-indent="false"/>
      <style:text-properties officeooo:paragraph-rsid="0003816f"/>
    </style:style>
    <style:style style:name="P71" style:family="paragraph" style:parent-style-name="Heading_20_3">
      <style:paragraph-properties fo:margin-left="-0.009cm" fo:text-indent="-0.018cm" style:auto-text-indent="false"/>
      <style:text-properties officeooo:paragraph-rsid="0003816f"/>
    </style:style>
    <style:style style:name="P72" style:family="paragraph" style:parent-style-name="Heading_20_3">
      <style:paragraph-properties fo:margin-left="-0.009cm" fo:margin-top="0cm" fo:margin-bottom="0.512cm" style:contextual-spacing="false" fo:text-indent="-0.018cm" style:auto-text-indent="false"/>
      <style:text-properties officeooo:paragraph-rsid="0003816f"/>
    </style:style>
    <style:style style:name="P73" style:family="paragraph" style:parent-style-name="Contents_20_1">
      <style:paragraph-properties>
        <style:tab-stops>
          <style:tab-stop style:position="16.99cm" style:type="right" style:leader-style="dotted" style:leader-text="."/>
        </style:tab-stops>
      </style:paragraph-properties>
    </style:style>
    <style:style style:name="P74" style:family="paragraph" style:parent-style-name="Heading_20_1" style:list-style-name="">
      <style:paragraph-properties fo:margin-left="-0.009cm" fo:text-indent="0cm" style:auto-text-indent="false"/>
      <style:text-properties fo:language="en" fo:country="GB" officeooo:paragraph-rsid="0003816f"/>
    </style:style>
    <style:style style:name="P75" style:family="paragraph" style:parent-style-name="Heading_20_1" style:list-style-name="WWNum9" style:master-page-name="">
      <loext:graphic-properties draw:fill="none"/>
      <style:paragraph-properties fo:margin-left="1.3cm" fo:margin-right="0cm" fo:margin-top="0cm" fo:margin-bottom="0.342cm" style:contextual-spacing="false" fo:line-height="110%" fo:text-align="start" style:justify-single-word="false" fo:keep-together="always" fo:orphans="2" fo:widows="2" fo:hyphenation-ladder-count="no-limit" fo:text-indent="-1.3cm" style:auto-text-indent="false" style:page-number="auto" fo:background-color="transparent" fo:keep-with-next="always" style:writing-mode="lr-tb"/>
      <style:text-properties fo:language="en" fo:country="GB" officeooo:paragraph-rsid="0003816f" fo:hyphenate="false" fo:hyphenation-remain-char-count="2" fo:hyphenation-push-char-count="2" loext:hyphenation-no-caps="false" loext:hyphenation-no-last-word="false" loext:hyphenation-word-char-count="5" loext:hyphenation-zone="no-limit"/>
    </style:style>
    <style:style style:name="P76" style:family="paragraph" style:parent-style-name="Heading_20_1" style:list-style-name="WWNum9">
      <style:paragraph-properties fo:margin-left="-0.009cm" fo:margin-top="0cm" fo:margin-bottom="0.342cm" style:contextual-spacing="false" fo:text-indent="0cm" style:auto-text-indent="false" fo:break-before="page"/>
      <style:text-properties officeooo:paragraph-rsid="0003816f"/>
    </style:style>
    <style:style style:name="P77" style:family="paragraph" style:parent-style-name="Heading_20_1" style:list-style-name="WWNum9">
      <style:paragraph-properties fo:margin-left="-0.009cm" fo:text-indent="-0.018cm" style:auto-text-indent="false"/>
      <style:text-properties officeooo:paragraph-rsid="0003816f"/>
    </style:style>
    <style:style style:name="P78" style:family="paragraph" style:parent-style-name="Heading_20_1" style:list-style-name="WWNum9">
      <style:paragraph-properties fo:margin-left="-0.009cm" fo:margin-top="0cm" fo:margin-bottom="0.288cm" style:contextual-spacing="false" fo:text-indent="-0.018cm" style:auto-text-indent="false"/>
      <style:text-properties officeooo:paragraph-rsid="0003816f"/>
    </style:style>
    <style:style style:name="P79" style:family="paragraph" style:parent-style-name="Heading_20_1" style:list-style-name="WWNum9">
      <style:paragraph-properties fo:margin-left="0.609cm" fo:margin-top="0cm" fo:margin-bottom="0.284cm" style:contextual-spacing="false" fo:text-indent="-0.635cm" style:auto-text-indent="false"/>
      <style:text-properties officeooo:paragraph-rsid="0003816f"/>
    </style:style>
    <style:style style:name="P80" style:family="paragraph" style:parent-style-name="Heading_20_1" style:list-style-name="WWNum9">
      <style:paragraph-properties fo:margin-left="-0.026cm" fo:text-indent="0cm" style:auto-text-indent="false">
        <style:tab-stops>
          <style:tab-stop style:position="4.688cm" style:type="center"/>
        </style:tab-stops>
      </style:paragraph-properties>
      <style:text-properties officeooo:paragraph-rsid="0003816f"/>
    </style:style>
    <style:style style:name="P81" style:family="paragraph" style:parent-style-name="Heading_20_1" style:list-style-name="WWNum9">
      <style:paragraph-properties fo:margin-left="-0.026cm" fo:text-indent="0cm" style:auto-text-indent="false">
        <style:tab-stops>
          <style:tab-stop style:position="5.9cm" style:type="center"/>
        </style:tab-stops>
      </style:paragraph-properties>
      <style:text-properties officeooo:paragraph-rsid="0003816f"/>
    </style:style>
    <style:style style:name="P82" style:family="paragraph" style:parent-style-name="Heading_20_1" style:list-style-name="WWNum9">
      <style:paragraph-properties fo:margin-left="-0.026cm" fo:margin-top="0cm" fo:margin-bottom="0.288cm" style:contextual-spacing="false" fo:text-indent="0cm" style:auto-text-indent="false">
        <style:tab-stops>
          <style:tab-stop style:position="3.791cm" style:type="center"/>
        </style:tab-stops>
      </style:paragraph-properties>
      <style:text-properties officeooo:paragraph-rsid="0003816f"/>
    </style:style>
    <style:style style:name="P83" style:family="paragraph" style:parent-style-name="Heading_20_1" style:list-style-name="WWNum9">
      <style:paragraph-properties fo:margin-left="-0.026cm" fo:text-indent="0cm" style:auto-text-indent="false">
        <style:tab-stops>
          <style:tab-stop style:position="4.343cm" style:type="center"/>
        </style:tab-stops>
      </style:paragraph-properties>
      <style:text-properties officeooo:paragraph-rsid="0003816f"/>
    </style:style>
    <style:style style:name="P84" style:family="paragraph" style:parent-style-name="Heading_20_1" style:list-style-name="WWNum9">
      <style:paragraph-properties fo:margin-left="-0.026cm" fo:text-indent="0cm" style:auto-text-indent="false">
        <style:tab-stops>
          <style:tab-stop style:position="3.552cm" style:type="center"/>
        </style:tab-stops>
      </style:paragraph-properties>
      <style:text-properties officeooo:paragraph-rsid="0003816f"/>
    </style:style>
    <style:style style:name="P85" style:family="paragraph" style:parent-style-name="Heading_20_1" style:list-style-name="WWNum9">
      <style:paragraph-properties fo:margin-left="-0.026cm" fo:margin-top="0cm" fo:margin-bottom="1.175cm" style:contextual-spacing="false" fo:text-indent="0cm" style:auto-text-indent="false">
        <style:tab-stops>
          <style:tab-stop style:position="3.552cm" style:type="center"/>
        </style:tab-stops>
      </style:paragraph-properties>
      <style:text-properties officeooo:paragraph-rsid="0003816f"/>
    </style:style>
    <style:style style:name="P86" style:family="paragraph" style:parent-style-name="Heading_20_1" style:list-style-name="WWNum9">
      <style:paragraph-properties fo:margin-left="-0.026cm" fo:text-indent="0cm" style:auto-text-indent="false">
        <style:tab-stops>
          <style:tab-stop style:position="3.366cm" style:type="center"/>
        </style:tab-stops>
      </style:paragraph-properties>
      <style:text-properties officeooo:paragraph-rsid="0003816f"/>
    </style:style>
    <style:style style:name="P87" style:family="paragraph" style:parent-style-name="Heading_20_1" style:list-style-name="WWNum9">
      <style:paragraph-properties fo:margin-left="-0.026cm" fo:text-indent="0cm" style:auto-text-indent="false">
        <style:tab-stops>
          <style:tab-stop style:position="2.785cm" style:type="center"/>
        </style:tab-stops>
      </style:paragraph-properties>
      <style:text-properties officeooo:paragraph-rsid="0003816f"/>
    </style:style>
    <style:style style:name="P88" style:family="paragraph" style:parent-style-name="Heading_20_1" style:list-style-name="WWNum9">
      <style:paragraph-properties fo:margin-left="-0.026cm" fo:text-indent="0cm" style:auto-text-indent="false">
        <style:tab-stops>
          <style:tab-stop style:position="2.912cm" style:type="center"/>
        </style:tab-stops>
      </style:paragraph-properties>
      <style:text-properties officeooo:paragraph-rsid="0003816f"/>
    </style:style>
    <style:style style:name="P89" style:family="paragraph" style:parent-style-name="Heading_20_1" style:list-style-name="WWNum9">
      <style:paragraph-properties fo:margin-left="-0.026cm" fo:text-indent="0cm" style:auto-text-indent="false">
        <style:tab-stops>
          <style:tab-stop style:position="2.792cm" style:type="center"/>
        </style:tab-stops>
      </style:paragraph-properties>
      <style:text-properties officeooo:paragraph-rsid="0003816f"/>
    </style:style>
    <style:style style:name="P90" style:family="paragraph" style:parent-style-name="Heading_20_1" style:list-style-name="WWNum9">
      <style:paragraph-properties fo:margin-left="-0.026cm" fo:text-indent="0cm" style:auto-text-indent="false">
        <style:tab-stops>
          <style:tab-stop style:position="5.562cm" style:type="center"/>
        </style:tab-stops>
      </style:paragraph-properties>
      <style:text-properties officeooo:paragraph-rsid="0003816f"/>
    </style:style>
    <style:style style:name="P91" style:family="paragraph" style:parent-style-name="Heading_20_1" style:list-style-name="WWNum9">
      <style:paragraph-properties fo:margin-left="-0.026cm" fo:text-indent="0cm" style:auto-text-indent="false">
        <style:tab-stops>
          <style:tab-stop style:position="3.93cm" style:type="center"/>
        </style:tab-stops>
      </style:paragraph-properties>
      <style:text-properties officeooo:paragraph-rsid="0003816f"/>
    </style:style>
    <style:style style:name="P92" style:family="paragraph" style:parent-style-name="Heading_20_1" style:list-style-name="WWNum9">
      <style:paragraph-properties fo:margin-left="-0.026cm" fo:text-indent="0cm" style:auto-text-indent="false">
        <style:tab-stops>
          <style:tab-stop style:position="5.572cm" style:type="center"/>
        </style:tab-stops>
      </style:paragraph-properties>
      <style:text-properties officeooo:paragraph-rsid="0003816f"/>
    </style:style>
    <style:style style:name="P93" style:family="paragraph" style:parent-style-name="Heading_20_1" style:list-style-name="WWNum9">
      <style:paragraph-properties fo:margin-left="-0.026cm" fo:text-indent="0cm" style:auto-text-indent="false">
        <style:tab-stops>
          <style:tab-stop style:position="3.993cm" style:type="center"/>
        </style:tab-stops>
      </style:paragraph-properties>
      <style:text-properties officeooo:paragraph-rsid="0003816f"/>
    </style:style>
    <style:style style:name="P94" style:family="paragraph" style:parent-style-name="Heading_20_1" style:list-style-name="WWNum9">
      <style:paragraph-properties fo:margin-left="-0.026cm" fo:text-indent="0cm" style:auto-text-indent="false">
        <style:tab-stops>
          <style:tab-stop style:position="3.136cm" style:type="center"/>
        </style:tab-stops>
      </style:paragraph-properties>
      <style:text-properties officeooo:paragraph-rsid="0003816f"/>
    </style:style>
    <style:style style:name="P95" style:family="paragraph" style:parent-style-name="Heading_20_1" style:list-style-name="WWNum9">
      <style:paragraph-properties fo:margin-left="-0.026cm" fo:text-indent="0cm" style:auto-text-indent="false">
        <style:tab-stops>
          <style:tab-stop style:position="2.886cm" style:type="center"/>
        </style:tab-stops>
      </style:paragraph-properties>
      <style:text-properties officeooo:paragraph-rsid="0003816f"/>
    </style:style>
    <style:style style:name="P96" style:family="paragraph" style:parent-style-name="Heading_20_1" style:list-style-name="WWNum9">
      <style:paragraph-properties fo:margin-left="-0.026cm" fo:margin-top="0cm" fo:margin-bottom="0.288cm" style:contextual-spacing="false" fo:text-indent="0cm" style:auto-text-indent="false">
        <style:tab-stops>
          <style:tab-stop style:position="5.713cm" style:type="center"/>
        </style:tab-stops>
      </style:paragraph-properties>
      <style:text-properties officeooo:paragraph-rsid="0003816f"/>
    </style:style>
    <style:style style:name="P97" style:family="paragraph" style:parent-style-name="Heading_20_1" style:list-style-name="WWNum9">
      <style:paragraph-properties fo:margin-left="-0.026cm" fo:text-indent="0cm" style:auto-text-indent="false">
        <style:tab-stops>
          <style:tab-stop style:position="4.865cm" style:type="center"/>
        </style:tab-stops>
      </style:paragraph-properties>
      <style:text-properties officeooo:paragraph-rsid="0003816f"/>
    </style:style>
    <style:style style:name="P98" style:family="paragraph" style:parent-style-name="Heading_20_1" style:list-style-name="WWNum9">
      <style:paragraph-properties fo:margin-left="-0.026cm" fo:text-indent="0cm" style:auto-text-indent="false">
        <style:tab-stops>
          <style:tab-stop style:position="3.12cm" style:type="center"/>
        </style:tab-stops>
      </style:paragraph-properties>
      <style:text-properties officeooo:paragraph-rsid="0003816f"/>
    </style:style>
    <style:style style:name="P99" style:family="paragraph" style:parent-style-name="Heading_20_1" style:list-style-name="WWNum9">
      <style:paragraph-properties fo:margin-left="-0.026cm" fo:text-indent="0cm" style:auto-text-indent="false">
        <style:tab-stops>
          <style:tab-stop style:position="2.815cm" style:type="center"/>
        </style:tab-stops>
      </style:paragraph-properties>
      <style:text-properties officeooo:paragraph-rsid="0003816f"/>
    </style:style>
    <style:style style:name="P100" style:family="paragraph" style:parent-style-name="Heading_20_1" style:list-style-name="WWNum9">
      <style:paragraph-properties fo:margin-left="-0.026cm" fo:text-indent="0cm" style:auto-text-indent="false">
        <style:tab-stops>
          <style:tab-stop style:position="3.568cm" style:type="center"/>
        </style:tab-stops>
      </style:paragraph-properties>
      <style:text-properties officeooo:paragraph-rsid="0003816f"/>
    </style:style>
    <style:style style:name="P101" style:family="paragraph" style:parent-style-name="Heading_20_1" style:list-style-name="WWNum9">
      <style:paragraph-properties fo:margin-left="-0.026cm" fo:text-indent="0cm" style:auto-text-indent="false">
        <style:tab-stops>
          <style:tab-stop style:position="4.752cm" style:type="center"/>
        </style:tab-stops>
      </style:paragraph-properties>
      <style:text-properties officeooo:paragraph-rsid="0003816f"/>
    </style:style>
    <style:style style:name="P102" style:family="paragraph" style:parent-style-name="Heading_20_1" style:list-style-name="WWNum9">
      <style:paragraph-properties fo:margin-left="-0.026cm" fo:text-indent="0cm" style:auto-text-indent="false">
        <style:tab-stops>
          <style:tab-stop style:position="2.009cm" style:type="center"/>
        </style:tab-stops>
      </style:paragraph-properties>
      <style:text-properties officeooo:paragraph-rsid="0003816f"/>
    </style:style>
    <style:style style:name="P103" style:family="paragraph" style:parent-style-name="Heading_20_1" style:list-style-name="WWNum9">
      <style:paragraph-properties fo:margin-left="-0.026cm" fo:margin-top="0cm" fo:margin-bottom="1.201cm" style:contextual-spacing="false" fo:text-indent="0cm" style:auto-text-indent="false">
        <style:tab-stops>
          <style:tab-stop style:position="2.611cm" style:type="center"/>
        </style:tab-stops>
      </style:paragraph-properties>
      <style:text-properties officeooo:paragraph-rsid="0003816f"/>
    </style:style>
    <style:style style:name="P104" style:family="paragraph" style:parent-style-name="Heading_20_1" style:list-style-name="WWNum9">
      <style:paragraph-properties fo:margin-left="-0.026cm" fo:text-indent="0cm" style:auto-text-indent="false">
        <style:tab-stops>
          <style:tab-stop style:position="5.064cm" style:type="center"/>
        </style:tab-stops>
      </style:paragraph-properties>
      <style:text-properties officeooo:paragraph-rsid="0003816f"/>
    </style:style>
    <style:style style:name="P105" style:family="paragraph" style:parent-style-name="Heading_20_1" style:list-style-name="WWNum9">
      <style:paragraph-properties fo:margin-left="-0.026cm" fo:text-indent="0cm" style:auto-text-indent="false">
        <style:tab-stops>
          <style:tab-stop style:position="3.736cm" style:type="center"/>
        </style:tab-stops>
      </style:paragraph-properties>
      <style:text-properties officeooo:paragraph-rsid="0003816f"/>
    </style:style>
    <style:style style:name="P106" style:family="paragraph" style:parent-style-name="Heading_20_1" style:list-style-name="WWNum9">
      <style:paragraph-properties fo:margin-left="-0.026cm" fo:margin-top="0cm" fo:margin-bottom="0.298cm" style:contextual-spacing="false" fo:text-indent="0cm" style:auto-text-indent="false">
        <style:tab-stops>
          <style:tab-stop style:position="7.712cm" style:type="center"/>
        </style:tab-stops>
      </style:paragraph-properties>
      <style:text-properties officeooo:paragraph-rsid="0003816f"/>
    </style:style>
    <style:style style:name="P107" style:family="paragraph" style:parent-style-name="Heading_20_1" style:list-style-name="WWNum9">
      <style:paragraph-properties fo:margin-left="-0.026cm" fo:text-indent="0cm" style:auto-text-indent="false">
        <style:tab-stops>
          <style:tab-stop style:position="3.452cm" style:type="center"/>
        </style:tab-stops>
      </style:paragraph-properties>
      <style:text-properties officeooo:paragraph-rsid="0003816f"/>
    </style:style>
    <style:style style:name="P108" style:family="paragraph" style:parent-style-name="Heading_20_1" style:list-style-name="WWNum9">
      <style:paragraph-properties fo:margin-left="-0.009cm" fo:margin-top="0cm" fo:margin-bottom="0.753cm" style:contextual-spacing="false" fo:line-height="218%" fo:text-indent="-0.018cm" style:auto-text-indent="false"/>
      <style:text-properties officeooo:paragraph-rsid="0003816f"/>
    </style:style>
    <style:style style:name="P109" style:family="paragraph" style:parent-style-name="Heading_20_1" style:list-style-name="WWNum9">
      <style:paragraph-properties fo:margin-left="-0.009cm" fo:margin-right="5.413cm" fo:margin-top="0cm" fo:margin-bottom="0cm" style:contextual-spacing="false" fo:line-height="218%" fo:text-indent="-0.018cm" style:auto-text-indent="false"/>
      <style:text-properties officeooo:paragraph-rsid="0003816f"/>
    </style:style>
    <style:style style:name="P110" style:family="paragraph" style:parent-style-name="Heading_20_1" style:list-style-name="WWNum9">
      <style:paragraph-properties fo:margin-left="-0.026cm" fo:text-indent="0cm" style:auto-text-indent="false">
        <style:tab-stops>
          <style:tab-stop style:position="5.874cm" style:type="center"/>
        </style:tab-stops>
      </style:paragraph-properties>
      <style:text-properties officeooo:paragraph-rsid="0003816f"/>
    </style:style>
    <style:style style:name="P111" style:family="paragraph" style:parent-style-name="Heading_20_1" style:list-style-name="WWNum9">
      <style:paragraph-properties fo:margin-left="-0.026cm" fo:text-indent="0cm" style:auto-text-indent="false">
        <style:tab-stops>
          <style:tab-stop style:position="5.128cm" style:type="center"/>
        </style:tab-stops>
      </style:paragraph-properties>
      <style:text-properties officeooo:paragraph-rsid="0003816f"/>
    </style:style>
    <style:style style:name="P112" style:family="paragraph" style:parent-style-name="Heading_20_1" style:list-style-name="WWNum9">
      <style:paragraph-properties fo:margin-left="-0.026cm" fo:margin-top="0cm" fo:margin-bottom="0.298cm" style:contextual-spacing="false" fo:text-indent="0cm" style:auto-text-indent="false">
        <style:tab-stops>
          <style:tab-stop style:position="6.625cm" style:type="center"/>
        </style:tab-stops>
      </style:paragraph-properties>
      <style:text-properties officeooo:paragraph-rsid="0003816f"/>
    </style:style>
    <style:style style:name="P113" style:family="paragraph" style:parent-style-name="Heading_20_1" style:list-style-name="WWNum9">
      <style:paragraph-properties fo:margin-left="-0.026cm" fo:text-indent="0cm" style:auto-text-indent="false">
        <style:tab-stops>
          <style:tab-stop style:position="5.045cm" style:type="center"/>
        </style:tab-stops>
      </style:paragraph-properties>
      <style:text-properties officeooo:paragraph-rsid="0003816f"/>
    </style:style>
    <style:style style:name="P114" style:family="paragraph" style:parent-style-name="Heading_20_1" style:list-style-name="WWNum9">
      <style:paragraph-properties fo:margin-left="-0.026cm" fo:margin-top="0cm" fo:margin-bottom="0.298cm" style:contextual-spacing="false" fo:text-indent="0cm" style:auto-text-indent="false">
        <style:tab-stops>
          <style:tab-stop style:position="3.57cm" style:type="center"/>
        </style:tab-stops>
      </style:paragraph-properties>
      <style:text-properties officeooo:paragraph-rsid="0003816f"/>
    </style:style>
    <style:style style:name="P115" style:family="paragraph" style:parent-style-name="Heading_20_1" style:list-style-name="WWNum9">
      <style:paragraph-properties fo:margin-left="-0.026cm" fo:text-indent="0cm" style:auto-text-indent="false">
        <style:tab-stops>
          <style:tab-stop style:position="1.983cm" style:type="center"/>
        </style:tab-stops>
      </style:paragraph-properties>
      <style:text-properties officeooo:paragraph-rsid="0003816f"/>
    </style:style>
    <style:style style:name="P116" style:family="paragraph" style:parent-style-name="Heading_20_1" style:list-style-name="WWNum9">
      <style:paragraph-properties fo:margin-left="-0.026cm" fo:text-indent="0cm" style:auto-text-indent="false">
        <style:tab-stops>
          <style:tab-stop style:position="2.394cm" style:type="center"/>
        </style:tab-stops>
      </style:paragraph-properties>
      <style:text-properties officeooo:paragraph-rsid="0003816f"/>
    </style:style>
    <style:style style:name="P117" style:family="paragraph" style:parent-style-name="Heading_20_1" style:list-style-name="WWNum9">
      <style:paragraph-properties fo:margin-left="-0.026cm" fo:margin-top="0cm" fo:margin-bottom="0.298cm" style:contextual-spacing="false" fo:text-indent="0cm" style:auto-text-indent="false">
        <style:tab-stops>
          <style:tab-stop style:position="5.694cm" style:type="center"/>
        </style:tab-stops>
      </style:paragraph-properties>
      <style:text-properties officeooo:paragraph-rsid="0003816f"/>
    </style:style>
    <style:style style:name="P118" style:family="paragraph" style:parent-style-name="Heading_20_1" style:list-style-name="WWNum9">
      <style:paragraph-properties fo:margin-left="-0.026cm" fo:margin-top="0cm" fo:margin-bottom="0.298cm" style:contextual-spacing="false" fo:text-indent="0cm" style:auto-text-indent="false">
        <style:tab-stops>
          <style:tab-stop style:position="3.425cm" style:type="center"/>
        </style:tab-stops>
      </style:paragraph-properties>
      <style:text-properties officeooo:paragraph-rsid="0003816f"/>
    </style:style>
    <style:style style:name="P119" style:family="paragraph" style:parent-style-name="Heading_20_1" style:list-style-name="WWNum9">
      <style:paragraph-properties fo:margin-left="-0.026cm" fo:text-indent="0cm" style:auto-text-indent="false">
        <style:tab-stops>
          <style:tab-stop style:position="7.174cm" style:type="center"/>
        </style:tab-stops>
      </style:paragraph-properties>
      <style:text-properties officeooo:paragraph-rsid="0003816f"/>
    </style:style>
    <style:style style:name="P120" style:family="paragraph" style:parent-style-name="Heading_20_1" style:list-style-name="WWNum9">
      <style:paragraph-properties fo:margin-left="-0.026cm" fo:text-indent="0cm" style:auto-text-indent="false">
        <style:tab-stops>
          <style:tab-stop style:position="3.976cm" style:type="center"/>
        </style:tab-stops>
      </style:paragraph-properties>
      <style:text-properties officeooo:paragraph-rsid="0003816f"/>
    </style:style>
    <style:style style:name="P121" style:family="paragraph" style:parent-style-name="Heading_20_1" style:list-style-name="WWNum9">
      <style:paragraph-properties fo:margin-left="0cm" fo:margin-right="0cm" fo:margin-top="0cm" fo:margin-bottom="0.753cm" style:contextual-spacing="false" fo:line-height="100%" fo:text-align="start" style:justify-single-word="false" fo:keep-together="always" fo:orphans="2" fo:widows="2" fo:hyphenation-ladder-count="no-limit" fo:text-indent="0cm" style:auto-text-indent="false" fo:keep-with-next="always"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22" style:family="paragraph" style:parent-style-name="Heading_20_1" style:list-style-name="WWNum9">
      <style:paragraph-properties fo:margin-left="-0.009cm" fo:margin-right="5.413cm" fo:margin-top="0cm" fo:margin-bottom="0.753cm" style:contextual-spacing="false" fo:line-height="100%" fo:text-indent="-0.018cm" style:auto-text-indent="false"/>
      <style:text-properties officeooo:paragraph-rsid="0003816f"/>
    </style:style>
    <style:style style:name="P123" style:family="paragraph" style:parent-style-name="Heading_20_1" style:list-style-name="WWNum9">
      <style:paragraph-properties fo:margin-left="0cm" fo:margin-right="0cm" fo:margin-top="0cm" fo:margin-bottom="0.753cm" style:contextual-spacing="false" fo:line-height="100%" fo:text-indent="0cm" style:auto-text-indent="false"/>
      <style:text-properties officeooo:paragraph-rsid="0003816f"/>
    </style:style>
    <style:style style:name="P124" style:family="paragraph" style:parent-style-name="Heading_20_1" style:list-style-name="WWNum9">
      <style:paragraph-properties fo:margin-left="0cm" fo:margin-right="0cm" fo:margin-top="0cm" fo:margin-bottom="0.753cm" style:contextual-spacing="false" fo:line-height="100%" fo:text-indent="0cm" style:auto-text-indent="false"/>
      <style:text-properties officeooo:rsid="0055e858" officeooo:paragraph-rsid="0055e858"/>
    </style:style>
    <style:style style:name="P125" style:family="paragraph" style:parent-style-name="Heading_20_1" style:list-style-name="WWNum9">
      <style:paragraph-properties fo:margin-left="0cm" fo:margin-right="0cm" fo:margin-top="0cm" fo:margin-bottom="0.753cm" style:contextual-spacing="false" fo:line-height="100%" fo:text-indent="0cm" style:auto-text-indent="false"/>
      <style:text-properties officeooo:rsid="0055e858" officeooo:paragraph-rsid="0058c28d"/>
    </style:style>
    <style:style style:name="P126" style:family="paragraph" style:parent-style-name="List_20_Paragraph" style:list-style-name="WWNum8">
      <style:paragraph-properties fo:margin-left="0.6cm" fo:margin-right="0cm" fo:margin-top="0cm" fo:margin-bottom="0.36cm" style:contextual-spacing="true" fo:line-height="110%" fo:text-align="justify" style:justify-single-word="false" fo:orphans="2" fo:widows="2" fo:hyphenation-ladder-count="no-limit" fo:text-indent="-0.6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27" style:family="paragraph" style:parent-style-name="List_20_Paragraph" style:list-style-name="WWNum8">
      <style:paragraph-properties fo:margin-left="0.6cm" fo:margin-right="0cm" fo:margin-top="0cm" fo:margin-bottom="0.318cm" style:contextual-spacing="true" fo:line-height="110%" fo:text-align="justify" style:justify-single-word="false" fo:orphans="2" fo:widows="2" fo:hyphenation-ladder-count="no-limit" fo:text-indent="-0.6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style:paragraph-properties fo:margin-top="0cm" fo:margin-bottom="0cm" style:contextual-spacing="false" fo:text-align="center" style:justify-single-word="false"/>
      <style:text-properties officeooo:paragraph-rsid="0003816f"/>
    </style:style>
    <style:style style:name="P129" style:family="paragraph" style:parent-style-name="Standard">
      <style:paragraph-properties fo:margin-top="0cm" fo:margin-bottom="0cm" style:contextual-spacing="false" fo:text-align="center" style:justify-single-word="false"/>
      <style:text-properties fo:language="en" fo:country="GB" officeooo:paragraph-rsid="0003816f"/>
    </style:style>
    <style:style style:name="P130" style:family="paragraph" style:parent-style-name="Standard">
      <style:paragraph-properties fo:margin-left="-0.009cm" fo:margin-right="0.295cm" fo:margin-top="0cm" fo:margin-bottom="0.016cm" style:contextual-spacing="false" fo:text-indent="-0.018cm" style:auto-text-indent="false"/>
      <style:text-properties fo:language="en" fo:country="GB" officeooo:paragraph-rsid="0003816f"/>
    </style:style>
    <style:style style:name="P131" style:family="paragraph" style:parent-style-name="Standard">
      <style:paragraph-properties fo:margin-left="-0.004cm" fo:margin-top="0cm" fo:margin-bottom="0.45cm" style:contextual-spacing="false"/>
      <style:text-properties fo:language="en" fo:country="GB" officeooo:paragraph-rsid="0003816f"/>
    </style:style>
    <style:style style:name="P132" style:family="paragraph" style:parent-style-name="Standard">
      <style:paragraph-properties fo:margin-left="-0.009cm" fo:margin-right="6.036cm" fo:margin-top="0cm" fo:margin-bottom="0.016cm" style:contextual-spacing="false" fo:line-height="198%" fo:text-indent="-0.018cm" style:auto-text-indent="false"/>
      <style:text-properties fo:language="en" fo:country="GB" officeooo:paragraph-rsid="0003816f"/>
    </style:style>
    <style:style style:name="P133"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134"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135"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136" style:family="paragraph" style:parent-style-name="Standard">
      <style:paragraph-properties fo:margin-left="-0.009cm" fo:margin-right="0.062cm" fo:margin-top="0cm" fo:margin-bottom="0.092cm" style:contextual-spacing="false" fo:line-height="100%" fo:text-indent="-0.018cm" style:auto-text-indent="false"/>
      <style:text-properties style:font-name="Times New Roman" fo:language="en" fo:country="GB" officeooo:paragraph-rsid="0003816f" style:font-name-asian="Times New Roman1" style:language-asian="en" style:country-asian="IN" style:font-name-complex="Times New Roman1" style:language-complex="ar" style:country-complex="SA"/>
    </style:style>
    <style:style style:name="P137"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text-properties officeooo:paragraph-rsid="0003816f"/>
    </style:style>
    <style:style style:name="P138"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officeooo:paragraph-rsid="0003816f"/>
    </style:style>
    <style:style style:name="P139" style:family="paragraph" style:parent-style-name="Standard">
      <style:paragraph-properties fo:margin-left="-0.009cm" fo:margin-right="0.025cm" fo:margin-top="0cm" fo:margin-bottom="0.243cm" style:contextual-spacing="false" fo:line-height="110%" fo:text-align="justify" style:justify-single-word="false" fo:text-indent="-0.018cm" style:auto-text-indent="false"/>
      <style:text-properties officeooo:paragraph-rsid="0003816f"/>
    </style:style>
    <style:style style:name="P140" style:family="paragraph" style:parent-style-name="Standard">
      <style:paragraph-properties fo:margin-left="-0.009cm" fo:margin-right="0.025cm" fo:margin-top="0cm" fo:margin-bottom="0.427cm" style:contextual-spacing="false" fo:line-height="110%" fo:text-align="justify" style:justify-single-word="false" fo:text-indent="-0.018cm" style:auto-text-indent="false"/>
      <style:text-properties officeooo:paragraph-rsid="0003816f"/>
    </style:style>
    <style:style style:name="P141" style:family="paragraph" style:parent-style-name="Standard">
      <style:paragraph-properties fo:margin-left="-0.009cm" fo:margin-right="0.025cm" fo:margin-top="0cm" fo:margin-bottom="1.531cm" style:contextual-spacing="false" fo:line-height="110%" fo:text-align="justify" style:justify-single-word="false" fo:text-indent="-0.018cm" style:auto-text-indent="false"/>
      <style:text-properties officeooo:paragraph-rsid="0003816f"/>
    </style:style>
    <style:style style:name="P142"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officeooo:paragraph-rsid="0003816f"/>
    </style:style>
    <style:style style:name="P143" style:family="paragraph" style:parent-style-name="Standard">
      <style:paragraph-properties fo:margin-left="-0.009cm" fo:margin-right="0.025cm" fo:margin-top="0cm" fo:margin-bottom="1.201cm" style:contextual-spacing="false" fo:line-height="110%" fo:text-align="justify" style:justify-single-word="false" fo:text-indent="-0.018cm" style:auto-text-indent="false"/>
      <style:text-properties officeooo:paragraph-rsid="0003816f"/>
    </style:style>
    <style:style style:name="P144" style:family="paragraph" style:parent-style-name="Standard">
      <style:paragraph-properties fo:margin-left="-0.009cm" fo:margin-right="0.025cm" fo:margin-top="0cm" fo:margin-bottom="1.535cm" style:contextual-spacing="false" fo:line-height="110%" fo:text-align="justify" style:justify-single-word="false" fo:text-indent="-0.018cm" style:auto-text-indent="false"/>
      <style:text-properties officeooo:paragraph-rsid="0003816f"/>
    </style:style>
    <style:style style:name="P145" style:family="paragraph" style:parent-style-name="Standard">
      <style:paragraph-properties fo:margin-left="-0.009cm" fo:margin-right="0.025cm" fo:margin-top="0cm" fo:margin-bottom="1.224cm" style:contextual-spacing="false" fo:line-height="110%" fo:text-align="justify" style:justify-single-word="false" fo:text-indent="-0.018cm" style:auto-text-indent="false"/>
      <style:text-properties officeooo:paragraph-rsid="0003816f"/>
    </style:style>
    <style:style style:name="P146" style:family="paragraph" style:parent-style-name="Standard">
      <style:paragraph-properties fo:margin-left="-0.009cm" fo:margin-right="0.025cm" fo:margin-top="0cm" fo:margin-bottom="1.198cm" style:contextual-spacing="false" fo:line-height="110%" fo:text-align="justify" style:justify-single-word="false" fo:text-indent="-0.018cm" style:auto-text-indent="false"/>
      <style:text-properties officeooo:paragraph-rsid="0003816f"/>
    </style:style>
    <style:style style:name="P147" style:family="paragraph" style:parent-style-name="Standard">
      <style:paragraph-properties fo:margin-left="-0.009cm" fo:margin-right="0.025cm" fo:margin-top="0cm" fo:margin-bottom="1.178cm" style:contextual-spacing="false" fo:line-height="110%" fo:text-align="justify" style:justify-single-word="false" fo:text-indent="-0.018cm" style:auto-text-indent="false"/>
      <style:text-properties officeooo:paragraph-rsid="0003816f"/>
    </style:style>
    <style:style style:name="P148" style:family="paragraph" style:parent-style-name="Standard">
      <style:paragraph-properties fo:margin-left="-0.009cm" fo:margin-right="0.025cm" fo:margin-top="0cm" fo:margin-bottom="0.476cm" style:contextual-spacing="false" fo:line-height="110%" fo:text-align="justify" style:justify-single-word="false" fo:text-indent="-0.018cm" style:auto-text-indent="false"/>
      <style:text-properties officeooo:paragraph-rsid="0003816f"/>
    </style:style>
    <style:style style:name="P149" style:family="paragraph" style:parent-style-name="Standard">
      <style:paragraph-properties fo:margin-left="-0.009cm" fo:margin-right="0.025cm" fo:margin-top="0cm" fo:margin-bottom="0.377cm" style:contextual-spacing="false" fo:line-height="110%" fo:text-align="justify" style:justify-single-word="false" fo:text-indent="-0.018cm" style:auto-text-indent="false"/>
      <style:text-properties officeooo:paragraph-rsid="0003816f"/>
    </style:style>
    <style:style style:name="P150" style:family="paragraph" style:parent-style-name="Standard">
      <style:paragraph-properties fo:margin-left="-0.009cm" fo:margin-right="0.025cm" fo:margin-top="0cm" fo:margin-bottom="1.175cm" style:contextual-spacing="false" fo:line-height="110%" fo:text-align="justify" style:justify-single-word="false" fo:text-indent="-0.018cm" style:auto-text-indent="false"/>
      <style:text-properties officeooo:paragraph-rsid="0003816f"/>
    </style:style>
    <style:style style:name="P151" style:family="paragraph" style:parent-style-name="Standard">
      <style:paragraph-properties fo:margin-left="-0.009cm" fo:margin-right="0.025cm" fo:margin-top="0cm" fo:margin-bottom="0.667cm" style:contextual-spacing="false" fo:line-height="110%" fo:text-align="justify" style:justify-single-word="false" fo:text-indent="-0.018cm" style:auto-text-indent="false"/>
      <style:text-properties officeooo:paragraph-rsid="0003816f"/>
    </style:style>
    <style:style style:name="P152" style:family="paragraph" style:parent-style-name="Standard">
      <style:paragraph-properties fo:margin-left="-0.009cm" fo:margin-right="0.025cm" fo:margin-top="0cm" fo:margin-bottom="0cm" style:contextual-spacing="false" fo:line-height="110%" fo:text-align="justify" style:justify-single-word="false" fo:text-indent="-0.018cm" style:auto-text-indent="false"/>
      <style:text-properties officeooo:paragraph-rsid="0003816f"/>
    </style:style>
    <style:style style:name="P153" style:family="paragraph" style:parent-style-name="Standard">
      <style:paragraph-properties fo:margin-left="-0.009cm" fo:margin-right="0.025cm" fo:margin-top="0cm" fo:margin-bottom="1.228cm" style:contextual-spacing="false" fo:line-height="110%" fo:text-align="justify" style:justify-single-word="false" fo:text-indent="-0.018cm" style:auto-text-indent="false"/>
      <style:text-properties officeooo:paragraph-rsid="0003816f"/>
    </style:style>
    <style:style style:name="P154" style:family="paragraph" style:parent-style-name="Standard">
      <style:paragraph-properties fo:margin-left="-0.009cm" fo:margin-right="0.025cm" fo:margin-top="0cm" fo:margin-bottom="0.445cm" style:contextual-spacing="false" fo:line-height="110%" fo:text-align="justify" style:justify-single-word="false" fo:text-indent="-0.018cm" style:auto-text-indent="false"/>
      <style:text-properties officeooo:paragraph-rsid="0003816f"/>
    </style:style>
    <style:style style:name="P155" style:family="paragraph" style:parent-style-name="Standard">
      <style:paragraph-properties fo:margin-left="-0.009cm" fo:margin-right="0.025cm" fo:margin-top="0cm" fo:margin-bottom="0.395cm" style:contextual-spacing="false" fo:line-height="110%" fo:text-align="justify" style:justify-single-word="false" fo:text-indent="-0.018cm" style:auto-text-indent="false"/>
      <style:text-properties officeooo:paragraph-rsid="0003816f"/>
    </style:style>
    <style:style style:name="P156" style:family="paragraph" style:parent-style-name="Standard">
      <style:paragraph-properties fo:margin-left="-0.009cm" fo:margin-right="0.025cm" fo:margin-top="0cm" fo:margin-bottom="0.39cm" style:contextual-spacing="false" fo:line-height="110%" fo:text-align="justify" style:justify-single-word="false" fo:text-indent="-0.018cm" style:auto-text-indent="false"/>
      <style:text-properties officeooo:paragraph-rsid="0003816f"/>
    </style:style>
    <style:style style:name="P157" style:family="paragraph" style:parent-style-name="Standard">
      <style:paragraph-properties fo:margin-left="-0.009cm" fo:margin-right="0.025cm" fo:margin-top="0cm" fo:margin-bottom="1.309cm" style:contextual-spacing="false" fo:line-height="110%" fo:text-align="justify" style:justify-single-word="false" fo:text-indent="-0.018cm" style:auto-text-indent="false"/>
      <style:text-properties officeooo:paragraph-rsid="0003816f"/>
    </style:style>
    <style:style style:name="P158" style:family="paragraph" style:parent-style-name="Standard">
      <style:paragraph-properties fo:margin-left="-0.009cm" fo:margin-right="0.025cm" fo:margin-top="0cm" fo:margin-bottom="1.633cm" style:contextual-spacing="false" fo:line-height="110%" fo:text-align="justify" style:justify-single-word="false" fo:text-indent="-0.018cm" style:auto-text-indent="false"/>
      <style:text-properties officeooo:paragraph-rsid="0003816f"/>
    </style:style>
    <style:style style:name="P159" style:family="paragraph" style:parent-style-name="Standard">
      <style:paragraph-properties fo:margin-left="-0.009cm" fo:margin-right="0.025cm" fo:margin-top="0cm" fo:margin-bottom="0.416cm" style:contextual-spacing="false" fo:line-height="110%" fo:text-align="justify" style:justify-single-word="false" fo:text-indent="-0.018cm" style:auto-text-indent="false"/>
      <style:text-properties officeooo:paragraph-rsid="0003816f"/>
    </style:style>
    <style:style style:name="P160" style:family="paragraph" style:parent-style-name="Standard">
      <style:paragraph-properties fo:margin-left="-0.009cm" fo:margin-right="0.025cm" fo:margin-top="0cm" fo:margin-bottom="1.321cm" style:contextual-spacing="false" fo:line-height="110%" fo:text-align="justify" style:justify-single-word="false" fo:text-indent="-0.018cm" style:auto-text-indent="false"/>
      <style:text-properties officeooo:paragraph-rsid="0003816f"/>
    </style:style>
    <style:style style:name="P161" style:family="paragraph" style:parent-style-name="Standard">
      <style:paragraph-properties fo:margin-left="-0.009cm" fo:margin-right="0.025cm" fo:margin-top="0cm" fo:margin-bottom="0.372cm" style:contextual-spacing="false" fo:line-height="110%" fo:text-align="justify" style:justify-single-word="false" fo:text-indent="-0.018cm" style:auto-text-indent="false"/>
      <style:text-properties officeooo:paragraph-rsid="0003816f"/>
    </style:style>
    <style:style style:name="P162" style:family="paragraph" style:parent-style-name="Standard">
      <style:paragraph-properties fo:margin-left="-0.009cm" fo:margin-right="0.025cm" fo:margin-top="0cm" fo:margin-bottom="0.379cm" style:contextual-spacing="false" fo:line-height="110%" fo:text-align="justify" style:justify-single-word="false" fo:text-indent="-0.018cm" style:auto-text-indent="false"/>
      <style:text-properties officeooo:paragraph-rsid="0003816f"/>
    </style:style>
    <style:style style:name="P163" style:family="paragraph" style:parent-style-name="Standard">
      <style:paragraph-properties fo:margin-left="-0.009cm" fo:margin-right="0.025cm" fo:margin-top="0cm" fo:margin-bottom="0.028cm" style:contextual-spacing="false" fo:line-height="110%" fo:text-align="justify" style:justify-single-word="false" fo:text-indent="-0.018cm" style:auto-text-indent="false"/>
      <style:text-properties officeooo:paragraph-rsid="0003816f"/>
    </style:style>
    <style:style style:name="P164" style:family="paragraph" style:parent-style-name="Standard">
      <style:paragraph-properties fo:margin-left="-0.009cm" fo:margin-right="0.025cm" fo:margin-top="0cm" fo:margin-bottom="0.399cm" style:contextual-spacing="false" fo:line-height="110%" fo:text-align="justify" style:justify-single-word="false" fo:text-indent="-0.018cm" style:auto-text-indent="false"/>
      <style:text-properties officeooo:paragraph-rsid="0003816f"/>
    </style:style>
    <style:style style:name="P165" style:family="paragraph" style:parent-style-name="Standard">
      <style:paragraph-properties fo:margin-left="-0.009cm" fo:margin-right="0.025cm" fo:margin-top="0cm" fo:margin-bottom="0.407cm" style:contextual-spacing="false" fo:line-height="110%" fo:text-align="justify" style:justify-single-word="false" fo:text-indent="-0.018cm" style:auto-text-indent="false"/>
      <style:text-properties officeooo:paragraph-rsid="0003816f"/>
    </style:style>
    <style:style style:name="P166" style:family="paragraph" style:parent-style-name="Standard">
      <style:paragraph-properties fo:margin-left="-0.009cm" fo:margin-right="0.025cm" fo:margin-top="0cm" fo:margin-bottom="0.42cm" style:contextual-spacing="false" fo:line-height="110%" fo:text-align="justify" style:justify-single-word="false" fo:text-indent="-0.018cm" style:auto-text-indent="false"/>
      <style:text-properties officeooo:paragraph-rsid="0003816f"/>
    </style:style>
    <style:style style:name="P167" style:family="paragraph" style:parent-style-name="Standard">
      <style:paragraph-properties fo:margin-left="-0.009cm" fo:margin-right="0.025cm" fo:margin-top="0cm" fo:margin-bottom="1.528cm" style:contextual-spacing="false" fo:line-height="110%" fo:text-align="justify" style:justify-single-word="false" fo:text-indent="-0.018cm" style:auto-text-indent="false"/>
      <style:text-properties officeooo:paragraph-rsid="0003816f"/>
    </style:style>
    <style:style style:name="P168" style:family="paragraph" style:parent-style-name="Standard">
      <style:paragraph-properties fo:margin-left="-0.009cm" fo:margin-right="0.025cm" fo:margin-top="0cm" fo:margin-bottom="0.053cm" style:contextual-spacing="false" fo:line-height="110%" fo:text-align="justify" style:justify-single-word="false" fo:text-indent="-0.018cm" style:auto-text-indent="false"/>
      <style:text-properties officeooo:paragraph-rsid="0003816f"/>
    </style:style>
    <style:style style:name="P169" style:family="paragraph" style:parent-style-name="Standard">
      <style:paragraph-properties fo:margin-left="-0.009cm" fo:margin-right="0.025cm" fo:margin-top="0cm" fo:margin-bottom="0.4cm" style:contextual-spacing="false" fo:line-height="110%" fo:text-align="justify" style:justify-single-word="false" fo:text-indent="-0.018cm" style:auto-text-indent="false"/>
      <style:text-properties officeooo:paragraph-rsid="0003816f"/>
    </style:style>
    <style:style style:name="P170" style:family="paragraph" style:parent-style-name="Standard">
      <style:paragraph-properties fo:margin-left="-0.009cm" fo:margin-right="0.025cm" fo:margin-top="0cm" fo:margin-bottom="0.406cm" style:contextual-spacing="false" fo:line-height="110%" fo:text-align="justify" style:justify-single-word="false" fo:text-indent="-0.018cm" style:auto-text-indent="false"/>
      <style:text-properties officeooo:paragraph-rsid="0003816f"/>
    </style:style>
    <style:style style:name="P171" style:family="paragraph" style:parent-style-name="Standard">
      <style:paragraph-properties fo:margin-left="-0.009cm" fo:margin-right="0.025cm" fo:margin-top="0cm" fo:margin-bottom="0.409cm" style:contextual-spacing="false" fo:line-height="110%" fo:text-align="justify" style:justify-single-word="false" fo:text-indent="-0.018cm" style:auto-text-indent="false"/>
      <style:text-properties officeooo:paragraph-rsid="0003816f"/>
    </style:style>
    <style:style style:name="P172" style:family="paragraph" style:parent-style-name="Standard">
      <style:paragraph-properties fo:margin-left="-0.009cm" fo:margin-right="0.025cm" fo:margin-top="0cm" fo:margin-bottom="1.545cm" style:contextual-spacing="false" fo:line-height="110%" fo:text-align="justify" style:justify-single-word="false" fo:text-indent="-0.018cm" style:auto-text-indent="false"/>
      <style:text-properties officeooo:paragraph-rsid="0003816f"/>
    </style:style>
    <style:style style:name="P173" style:family="paragraph" style:parent-style-name="Standard">
      <style:paragraph-properties fo:margin-left="-0.009cm" fo:margin-right="0.025cm" fo:margin-top="0cm" fo:margin-bottom="0.011cm" style:contextual-spacing="false" fo:line-height="110%" fo:text-align="justify" style:justify-single-word="false" fo:text-indent="-0.018cm" style:auto-text-indent="false"/>
      <style:text-properties officeooo:paragraph-rsid="0003816f"/>
    </style:style>
    <style:style style:name="P174" style:family="paragraph" style:parent-style-name="Standard">
      <style:paragraph-properties fo:margin-left="-0.009cm" fo:margin-right="0.025cm" fo:margin-top="0cm" fo:margin-bottom="1.222cm" style:contextual-spacing="false" fo:line-height="110%" fo:text-align="justify" style:justify-single-word="false" fo:text-indent="-0.018cm" style:auto-text-indent="false"/>
      <style:text-properties officeooo:paragraph-rsid="0003816f"/>
    </style:style>
    <style:style style:name="P175" style:family="paragraph" style:parent-style-name="Standard">
      <style:paragraph-properties fo:margin-left="-0.009cm" fo:margin-right="0.025cm" fo:margin-top="0cm" fo:margin-bottom="0.385cm" style:contextual-spacing="false" fo:line-height="110%" fo:text-align="justify" style:justify-single-word="false" fo:text-indent="-0.018cm" style:auto-text-indent="false"/>
      <style:text-properties officeooo:paragraph-rsid="0003816f"/>
    </style:style>
    <style:style style:name="P176" style:family="paragraph" style:parent-style-name="Standard">
      <style:paragraph-properties fo:margin-left="-0.009cm" fo:margin-right="0.025cm" fo:margin-top="0cm" fo:margin-bottom="1.549cm" style:contextual-spacing="false" fo:line-height="110%" fo:text-align="justify" style:justify-single-word="false" fo:text-indent="-0.018cm" style:auto-text-indent="false"/>
      <style:text-properties officeooo:paragraph-rsid="0003816f"/>
    </style:style>
    <style:style style:name="P177" style:family="paragraph" style:parent-style-name="Standard">
      <style:paragraph-properties fo:margin-left="-0.009cm" fo:margin-right="0.025cm" fo:margin-top="0cm" fo:margin-bottom="0.376cm" style:contextual-spacing="false" fo:line-height="110%" fo:text-align="justify" style:justify-single-word="false" fo:text-indent="-0.018cm" style:auto-text-indent="false"/>
      <style:text-properties officeooo:paragraph-rsid="0003816f"/>
    </style:style>
    <style:style style:name="P178" style:family="paragraph" style:parent-style-name="Standard">
      <style:paragraph-properties fo:margin-left="-0.009cm" fo:margin-right="0.025cm" fo:margin-top="0cm" fo:margin-bottom="1.6cm" style:contextual-spacing="false" fo:line-height="110%" fo:text-align="justify" style:justify-single-word="false" fo:text-indent="-0.018cm" style:auto-text-indent="false"/>
      <style:text-properties officeooo:paragraph-rsid="0003816f"/>
    </style:style>
    <style:style style:name="P179" style:family="paragraph" style:parent-style-name="Standard" style:list-style-name="WWNum1">
      <style:paragraph-properties fo:margin-left="0.388cm" fo:margin-right="0.025cm" fo:margin-top="0cm" fo:margin-bottom="0.36cm" style:contextual-spacing="false" fo:line-height="110%" fo:text-align="justify" style:justify-single-word="false" fo:text-indent="-0.388cm" style:auto-text-indent="false"/>
      <style:text-properties officeooo:paragraph-rsid="0003816f"/>
    </style:style>
    <style:style style:name="P180" style:family="paragraph" style:parent-style-name="Standard" style:list-style-name="WWNum1">
      <style:paragraph-properties fo:margin-left="0.388cm" fo:margin-right="0.025cm" fo:margin-top="0cm" fo:margin-bottom="0.363cm" style:contextual-spacing="false" fo:line-height="110%" fo:text-align="justify" style:justify-single-word="false" fo:text-indent="-0.388cm" style:auto-text-indent="false"/>
      <style:text-properties officeooo:paragraph-rsid="0003816f"/>
    </style:style>
    <style:style style:name="P181" style:family="paragraph" style:parent-style-name="Standard" style:list-style-name="WWNum1">
      <style:paragraph-properties fo:margin-left="0.388cm" fo:margin-right="0.025cm" fo:margin-top="0cm" fo:margin-bottom="1.531cm" style:contextual-spacing="false" fo:line-height="110%" fo:text-align="justify" style:justify-single-word="false" fo:text-indent="-0.388cm" style:auto-text-indent="false"/>
      <style:text-properties officeooo:paragraph-rsid="0003816f"/>
    </style:style>
    <style:style style:name="P182" style:family="paragraph" style:parent-style-name="Standard" style:list-style-name="WWNum2">
      <style:paragraph-properties fo:margin-left="0.635cm" fo:margin-right="3.376cm" fo:margin-top="0cm" fo:margin-bottom="0.021cm" style:contextual-spacing="false" fo:line-height="110%" fo:text-align="justify" style:justify-single-word="false" fo:text-indent="-0.635cm" style:auto-text-indent="false"/>
      <style:text-properties officeooo:paragraph-rsid="0003816f"/>
    </style:style>
    <style:style style:name="P183" style:family="paragraph" style:parent-style-name="Standard" style:list-style-name="WWNum2">
      <style:paragraph-properties fo:margin-left="0.635cm" fo:margin-right="3.376cm" fo:margin-top="0cm" fo:margin-bottom="0.369cm" style:contextual-spacing="false" fo:line-height="110%" fo:text-align="justify" style:justify-single-word="false" fo:text-indent="-0.635cm" style:auto-text-indent="false"/>
      <style:text-properties officeooo:paragraph-rsid="0003816f"/>
    </style:style>
    <style:style style:name="P184" style:family="paragraph" style:parent-style-name="Standard">
      <style:paragraph-properties fo:margin-left="0cm" fo:margin-right="0cm" fo:margin-top="0cm" fo:margin-bottom="0.318cm" style:contextual-spacing="false" fo:line-height="110%" fo:text-align="justify"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85" style:family="paragraph" style:parent-style-name="Standard" style:list-style-name="WWNum3">
      <style:paragraph-properties fo:margin-left="0.42cm" fo:margin-right="0.025cm" fo:margin-top="0cm" fo:margin-bottom="0.318cm" style:contextual-spacing="false" fo:line-height="110%" fo:text-align="justify" style:justify-single-word="false" fo:text-indent="-0.42cm" style:auto-text-indent="false"/>
      <style:text-properties officeooo:paragraph-rsid="0003816f"/>
    </style:style>
    <style:style style:name="P186" style:family="paragraph" style:parent-style-name="Standard" style:list-style-name="WWNum3">
      <style:paragraph-properties fo:margin-left="0.42cm" fo:margin-right="0.025cm" fo:margin-top="0cm" fo:margin-bottom="0.363cm" style:contextual-spacing="false" fo:line-height="110%" fo:text-align="justify" style:justify-single-word="false" fo:text-indent="-0.42cm" style:auto-text-indent="false"/>
      <style:text-properties officeooo:paragraph-rsid="0003816f"/>
    </style:style>
    <style:style style:name="P187" style:family="paragraph" style:parent-style-name="Standard" style:list-style-name="WWNum4">
      <style:paragraph-properties fo:margin-left="1.27cm" fo:margin-right="0.025cm" fo:margin-top="0cm" fo:margin-bottom="0cm" style:contextual-spacing="false" fo:line-height="110%" fo:text-align="justify" style:justify-single-word="false" fo:text-indent="-0.635cm" style:auto-text-indent="false"/>
      <style:text-properties officeooo:paragraph-rsid="0003816f"/>
    </style:style>
    <style:style style:name="P188" style:family="paragraph" style:parent-style-name="Standard" style:list-style-name="WWNum4">
      <style:paragraph-properties fo:margin-left="1.27cm" fo:margin-right="0.025cm" fo:margin-top="0cm" fo:margin-bottom="0.815cm" style:contextual-spacing="false" fo:line-height="110%" fo:text-align="justify" style:justify-single-word="false" fo:text-indent="-0.635cm" style:auto-text-indent="false"/>
      <style:text-properties officeooo:paragraph-rsid="0003816f"/>
    </style:style>
    <style:style style:name="P189" style:family="paragraph" style:parent-style-name="Standard" style:list-style-name="WWNum5">
      <style:paragraph-properties fo:margin-left="1.27cm" fo:margin-right="0.025cm" fo:margin-top="0cm" fo:margin-bottom="0.011cm" style:contextual-spacing="false" fo:line-height="110%" fo:text-align="justify" style:justify-single-word="false" fo:text-indent="-0.635cm" style:auto-text-indent="false"/>
      <style:text-properties officeooo:paragraph-rsid="0003816f"/>
    </style:style>
    <style:style style:name="P190" style:family="paragraph" style:parent-style-name="Standard" style:list-style-name="WWNum5">
      <style:paragraph-properties fo:margin-left="1.27cm" fo:margin-right="0.025cm" fo:margin-top="0cm" fo:margin-bottom="0.016cm" style:contextual-spacing="false" fo:line-height="110%" fo:text-align="justify" style:justify-single-word="false" fo:text-indent="-0.635cm" style:auto-text-indent="false"/>
      <style:text-properties officeooo:paragraph-rsid="0003816f"/>
    </style:style>
    <style:style style:name="P191" style:family="paragraph" style:parent-style-name="Standard" style:list-style-name="WWNum5">
      <style:paragraph-properties fo:margin-left="1.27cm" fo:margin-right="0.025cm" fo:margin-top="0cm" fo:margin-bottom="0.358cm" style:contextual-spacing="false" fo:line-height="110%" fo:text-align="justify" style:justify-single-word="false" fo:text-indent="-0.635cm" style:auto-text-indent="false"/>
      <style:text-properties officeooo:paragraph-rsid="0003816f"/>
    </style:style>
    <style:style style:name="P192" style:family="paragraph" style:parent-style-name="Standard" style:list-style-name="WWNum6">
      <style:paragraph-properties fo:margin-left="1.27cm" fo:margin-right="0.025cm" fo:margin-top="0cm" fo:margin-bottom="0cm" style:contextual-spacing="false" fo:line-height="110%" fo:text-align="justify" style:justify-single-word="false" fo:text-indent="-0.635cm" style:auto-text-indent="false"/>
      <style:text-properties officeooo:paragraph-rsid="0003816f"/>
    </style:style>
    <style:style style:name="P193" style:family="paragraph" style:parent-style-name="Standard" style:list-style-name="WWNum6">
      <style:paragraph-properties fo:margin-left="1.27cm" fo:margin-right="0.025cm" fo:margin-top="0cm" fo:margin-bottom="0.489cm" style:contextual-spacing="false" fo:line-height="110%" fo:text-align="justify" style:justify-single-word="false" fo:text-indent="-0.635cm" style:auto-text-indent="false"/>
      <style:text-properties officeooo:paragraph-rsid="0003816f"/>
    </style:style>
    <style:style style:name="P194" style:family="paragraph" style:parent-style-name="Standard" style:list-style-name="WWNum7">
      <style:paragraph-properties fo:margin-left="1.27cm" fo:margin-right="0.025cm" fo:margin-top="0cm" fo:margin-bottom="0cm" style:contextual-spacing="false" fo:line-height="110%" fo:text-align="justify" style:justify-single-word="false" fo:text-indent="-0.635cm" style:auto-text-indent="false"/>
      <style:text-properties officeooo:paragraph-rsid="0003816f"/>
    </style:style>
    <style:style style:name="P195" style:family="paragraph" style:parent-style-name="Standard" style:list-style-name="WWNum7">
      <style:paragraph-properties fo:margin-left="1.27cm" fo:margin-right="0.025cm" fo:margin-top="0cm" fo:margin-bottom="0.318cm" style:contextual-spacing="false" fo:line-height="110%" fo:text-align="justify" style:justify-single-word="false" fo:text-indent="-0.635cm" style:auto-text-indent="false"/>
      <style:text-properties officeooo:paragraph-rsid="0003816f"/>
    </style:style>
    <style:style style:name="P196" style:family="paragraph" style:parent-style-name="Standard" style:list-style-name="WWNum7">
      <style:paragraph-properties fo:margin-left="1.27cm" fo:margin-right="0.025cm" fo:margin-top="0cm" fo:margin-bottom="0.609cm" style:contextual-spacing="false" fo:line-height="110%" fo:text-align="justify" style:justify-single-word="false" fo:text-indent="-0.635cm" style:auto-text-indent="false"/>
      <style:text-properties officeooo:paragraph-rsid="0003816f"/>
    </style:style>
    <style:style style:name="P197" style:family="paragraph" style:parent-style-name="Standard">
      <style:paragraph-properties fo:margin-left="-0.009cm" fo:margin-top="0cm" fo:margin-bottom="1.233cm" style:contextual-spacing="false" fo:line-height="110%" fo:text-indent="-0.018cm" style:auto-text-indent="false"/>
      <style:text-properties officeooo:paragraph-rsid="0003816f"/>
    </style:style>
    <style:style style:name="P198" style:family="paragraph" style:parent-style-name="Standard">
      <style:paragraph-properties fo:margin-left="-0.009cm" fo:margin-top="0cm" fo:margin-bottom="0.369cm" style:contextual-spacing="false" fo:line-height="110%" fo:text-indent="-0.018cm" style:auto-text-indent="false"/>
      <style:text-properties officeooo:paragraph-rsid="0003816f"/>
    </style:style>
    <style:style style:name="P199" style:family="paragraph" style:parent-style-name="Standard">
      <style:paragraph-properties fo:margin-left="-0.009cm" fo:margin-top="0cm" fo:margin-bottom="0.325cm" style:contextual-spacing="false" fo:line-height="110%" fo:text-indent="-0.018cm" style:auto-text-indent="false"/>
      <style:text-properties officeooo:paragraph-rsid="0003816f"/>
    </style:style>
    <style:style style:name="P200" style:family="paragraph" style:parent-style-name="Standard">
      <style:paragraph-properties fo:margin-left="-0.009cm" fo:margin-top="0cm" fo:margin-bottom="0.543cm" style:contextual-spacing="false" fo:line-height="110%" fo:text-indent="-0.018cm" style:auto-text-indent="false"/>
      <style:text-properties officeooo:paragraph-rsid="0003816f"/>
    </style:style>
    <style:style style:name="P201" style:family="paragraph" style:parent-style-name="Standard">
      <style:paragraph-properties fo:margin-left="-0.009cm" fo:margin-right="0.062cm" fo:margin-top="0cm" fo:margin-bottom="1.265cm" style:contextual-spacing="false" fo:line-height="110%" fo:text-indent="-0.018cm" style:auto-text-indent="false"/>
      <style:text-properties officeooo:paragraph-rsid="0003816f"/>
    </style:style>
    <style:style style:name="P202" style:family="paragraph" style:parent-style-name="Standard">
      <style:paragraph-properties fo:margin-left="-0.009cm" fo:margin-right="0.062cm" fo:margin-top="0cm" fo:margin-bottom="0.367cm" style:contextual-spacing="false" fo:line-height="110%" fo:text-indent="-0.018cm" style:auto-text-indent="false"/>
      <style:text-properties officeooo:paragraph-rsid="0003816f"/>
    </style:style>
    <style:style style:name="P203" style:family="paragraph" style:parent-style-name="Standard">
      <style:paragraph-properties fo:margin-left="-0.009cm" fo:margin-right="0.062cm" fo:margin-top="0cm" fo:margin-bottom="1.261cm" style:contextual-spacing="false" fo:line-height="110%" fo:text-indent="-0.018cm" style:auto-text-indent="false"/>
      <style:text-properties officeooo:paragraph-rsid="0003816f"/>
    </style:style>
    <style:style style:name="P204" style:family="paragraph" style:parent-style-name="Standard">
      <style:paragraph-properties fo:margin-left="-0.009cm" fo:margin-right="0.062cm" fo:margin-top="0cm" fo:margin-bottom="1.579cm" style:contextual-spacing="false" fo:line-height="110%" fo:text-indent="-0.018cm" style:auto-text-indent="false"/>
      <style:text-properties officeooo:paragraph-rsid="0003816f"/>
    </style:style>
    <style:style style:name="P205" style:family="paragraph" style:parent-style-name="Standard">
      <style:paragraph-properties fo:margin-left="-0.009cm" fo:margin-right="0.062cm" fo:margin-top="0cm" fo:margin-bottom="0.413cm" style:contextual-spacing="false" fo:line-height="110%" fo:text-indent="-0.018cm" style:auto-text-indent="false"/>
      <style:text-properties officeooo:paragraph-rsid="0003816f"/>
    </style:style>
    <style:style style:name="P206" style:family="paragraph" style:parent-style-name="Standard">
      <style:paragraph-properties fo:margin-left="-0.009cm" fo:margin-right="0.062cm" fo:margin-top="0cm" fo:margin-bottom="0.415cm" style:contextual-spacing="false" fo:line-height="110%" fo:text-indent="-0.018cm" style:auto-text-indent="false"/>
      <style:text-properties officeooo:paragraph-rsid="0003816f"/>
    </style:style>
    <style:style style:name="P207" style:family="paragraph" style:parent-style-name="Standard">
      <style:paragraph-properties fo:margin-left="-0.009cm" fo:margin-right="0.062cm" fo:margin-top="0cm" fo:margin-bottom="0.416cm" style:contextual-spacing="false" fo:line-height="110%" fo:text-indent="-0.018cm" style:auto-text-indent="false"/>
      <style:text-properties officeooo:paragraph-rsid="0003816f"/>
    </style:style>
    <style:style style:name="P208" style:family="paragraph" style:parent-style-name="Standard">
      <style:paragraph-properties fo:margin-left="-0.009cm" fo:margin-right="0.062cm" fo:margin-top="0cm" fo:margin-bottom="1.572cm" style:contextual-spacing="false" fo:line-height="110%" fo:text-indent="-0.018cm" style:auto-text-indent="false"/>
      <style:text-properties officeooo:paragraph-rsid="0003816f"/>
    </style:style>
    <style:style style:name="P209" style:family="paragraph" style:parent-style-name="Standard">
      <style:paragraph-properties fo:margin-left="-0.009cm" fo:margin-right="0.062cm" fo:margin-top="0cm" fo:margin-bottom="0.409cm" style:contextual-spacing="false" fo:line-height="110%" fo:text-indent="-0.018cm" style:auto-text-indent="false"/>
      <style:text-properties officeooo:paragraph-rsid="0003816f"/>
    </style:style>
    <style:style style:name="P210" style:family="paragraph" style:parent-style-name="Standard">
      <style:paragraph-properties fo:margin-left="-0.009cm" fo:margin-right="0.062cm" fo:margin-top="0cm" fo:margin-bottom="0.549cm" style:contextual-spacing="false" fo:line-height="110%" fo:text-indent="-0.018cm" style:auto-text-indent="false"/>
      <style:text-properties officeooo:paragraph-rsid="0003816f"/>
    </style:style>
    <style:style style:name="P211" style:family="paragraph" style:parent-style-name="Standard">
      <style:paragraph-properties fo:margin-left="-0.009cm" fo:margin-right="0.062cm" fo:margin-top="0cm" fo:margin-bottom="1.272cm" style:contextual-spacing="false" fo:line-height="110%" fo:text-indent="-0.018cm" style:auto-text-indent="false"/>
      <style:text-properties officeooo:paragraph-rsid="0003816f"/>
    </style:style>
    <style:style style:name="P212" style:family="paragraph" style:parent-style-name="Standard">
      <style:paragraph-properties fo:margin-left="-0.009cm" fo:margin-right="0.062cm" fo:margin-top="0cm" fo:margin-bottom="0.016cm" style:contextual-spacing="false" fo:line-height="110%" fo:text-indent="-0.018cm" style:auto-text-indent="false"/>
      <style:text-properties officeooo:paragraph-rsid="0003816f"/>
    </style:style>
    <style:style style:name="P213" style:family="paragraph" style:parent-style-name="Standard">
      <style:paragraph-properties fo:margin-left="-0.009cm" fo:margin-right="0.062cm" fo:margin-top="0cm" fo:margin-bottom="0.46cm" style:contextual-spacing="false" fo:line-height="110%" fo:text-indent="-0.018cm" style:auto-text-indent="false"/>
      <style:text-properties officeooo:paragraph-rsid="0003816f"/>
    </style:style>
    <style:style style:name="P214" style:family="paragraph" style:parent-style-name="Standard">
      <style:paragraph-properties fo:margin-left="-0.009cm" fo:margin-top="0cm" fo:margin-bottom="1.54cm" style:contextual-spacing="false" fo:line-height="110%" fo:text-indent="-0.018cm" style:auto-text-indent="false"/>
      <style:text-properties officeooo:paragraph-rsid="0003816f"/>
    </style:style>
    <style:style style:name="P215" style:family="paragraph" style:parent-style-name="Standard">
      <style:paragraph-properties fo:margin-left="1.288cm" fo:margin-right="0.062cm" fo:margin-top="0cm" fo:margin-bottom="0.367cm" style:contextual-spacing="false" fo:line-height="110%" fo:text-indent="-0.018cm" style:auto-text-indent="false"/>
      <style:text-properties officeooo:paragraph-rsid="0003816f"/>
    </style:style>
    <style:style style:name="P216" style:family="paragraph" style:parent-style-name="Standard">
      <style:paragraph-properties fo:margin-left="0cm" fo:margin-right="0cm" fo:margin-top="0cm" fo:margin-bottom="0.367cm" style:contextual-spacing="false" fo:line-height="110%" fo:text-indent="0cm" style:auto-text-indent="false"/>
      <style:text-properties officeooo:paragraph-rsid="0003816f"/>
    </style:style>
    <style:style style:name="P217" style:family="paragraph" style:parent-style-name="Standard">
      <style:paragraph-properties fo:margin-left="0cm" fo:margin-right="0cm" fo:margin-top="0cm" fo:margin-bottom="0.367cm" style:contextual-spacing="false" fo:line-height="110%"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18" style:family="paragraph" style:parent-style-name="Standard">
      <style:paragraph-properties fo:margin-left="-0.026cm" fo:margin-top="0cm" fo:margin-bottom="0.367cm" style:contextual-spacing="false" fo:line-height="110%">
        <style:tab-stops>
          <style:tab-stop style:position="2.318cm" style:type="center"/>
        </style:tab-stops>
      </style:paragraph-properties>
      <style:text-properties officeooo:paragraph-rsid="0003816f"/>
    </style:style>
    <style:style style:name="P219" style:family="paragraph" style:parent-style-name="Standard">
      <style:paragraph-properties fo:margin-left="-0.026cm" fo:margin-top="0cm" fo:margin-bottom="0.367cm" style:contextual-spacing="false" fo:line-height="110%">
        <style:tab-stops>
          <style:tab-stop style:position="2.9cm" style:type="center"/>
        </style:tab-stops>
      </style:paragraph-properties>
      <style:text-properties officeooo:paragraph-rsid="0003816f"/>
    </style:style>
    <style:style style:name="P220" style:family="paragraph" style:parent-style-name="Standard">
      <style:paragraph-properties fo:margin-left="-0.026cm" fo:margin-top="0cm" fo:margin-bottom="0.367cm" style:contextual-spacing="false" fo:line-height="110%">
        <style:tab-stops>
          <style:tab-stop style:position="2.667cm" style:type="center"/>
        </style:tab-stops>
      </style:paragraph-properties>
      <style:text-properties officeooo:paragraph-rsid="0003816f"/>
    </style:style>
    <style:style style:name="P221" style:family="paragraph" style:parent-style-name="Standard">
      <style:paragraph-properties fo:margin-left="-0.026cm" fo:margin-top="0cm" fo:margin-bottom="0.367cm" style:contextual-spacing="false" fo:line-height="110%">
        <style:tab-stops>
          <style:tab-stop style:position="3.133cm" style:type="center"/>
        </style:tab-stops>
      </style:paragraph-properties>
      <style:text-properties officeooo:paragraph-rsid="0003816f"/>
    </style:style>
    <style:style style:name="P222" style:family="paragraph" style:parent-style-name="Standard">
      <style:paragraph-properties fo:margin-left="-0.026cm" fo:margin-top="0cm" fo:margin-bottom="0.367cm" style:contextual-spacing="false" fo:line-height="110%">
        <style:tab-stops>
          <style:tab-stop style:position="4.858cm" style:type="center"/>
        </style:tab-stops>
      </style:paragraph-properties>
      <style:text-properties officeooo:paragraph-rsid="0003816f"/>
    </style:style>
    <style:style style:name="P223" style:family="paragraph" style:parent-style-name="Standard">
      <style:paragraph-properties fo:margin-left="-0.026cm" fo:margin-top="0cm" fo:margin-bottom="0.367cm" style:contextual-spacing="false" fo:line-height="110%">
        <style:tab-stops>
          <style:tab-stop style:position="3.598cm" style:type="center"/>
        </style:tab-stops>
      </style:paragraph-properties>
      <style:text-properties officeooo:paragraph-rsid="0003816f"/>
    </style:style>
    <style:style style:name="P224" style:family="paragraph" style:parent-style-name="Standard">
      <style:paragraph-properties fo:margin-left="-0.026cm" fo:margin-top="0cm" fo:margin-bottom="0.367cm" style:contextual-spacing="false" fo:line-height="110%">
        <style:tab-stops>
          <style:tab-stop style:position="2.085cm" style:type="center"/>
        </style:tab-stops>
      </style:paragraph-properties>
      <style:text-properties officeooo:paragraph-rsid="0003816f"/>
    </style:style>
    <style:style style:name="P225" style:family="paragraph" style:parent-style-name="Standard">
      <style:paragraph-properties fo:margin-left="-0.026cm" fo:margin-top="0cm" fo:margin-bottom="0.367cm" style:contextual-spacing="false" fo:line-height="110%">
        <style:tab-stops>
          <style:tab-stop style:position="1.969cm" style:type="center"/>
        </style:tab-stops>
      </style:paragraph-properties>
      <style:text-properties officeooo:paragraph-rsid="0003816f"/>
    </style:style>
    <style:style style:name="P226" style:family="paragraph" style:parent-style-name="Standard">
      <style:paragraph-properties fo:margin-left="-0.026cm" fo:margin-top="0cm" fo:margin-bottom="1.572cm" style:contextual-spacing="false" fo:line-height="110%">
        <style:tab-stops>
          <style:tab-stop style:position="3.366cm" style:type="center"/>
        </style:tab-stops>
      </style:paragraph-properties>
      <style:text-properties officeooo:paragraph-rsid="0003816f"/>
    </style:style>
    <style:style style:name="P227" style:family="paragraph" style:parent-style-name="Standard">
      <style:paragraph-properties fo:margin-left="-0.026cm" fo:margin-right="0.448cm" fo:margin-top="0cm" fo:margin-bottom="0.118cm" style:contextual-spacing="false" fo:line-height="175%" fo:text-indent="0cm" style:auto-text-indent="false"/>
      <style:text-properties style:font-name="Courier New" fo:language="en" fo:country="GB" officeooo:paragraph-rsid="0003816f" style:font-name-asian="Courier New1" style:font-name-complex="Courier New1"/>
    </style:style>
    <style:style style:name="P228" style:family="paragraph" style:parent-style-name="Standard">
      <style:paragraph-properties fo:margin-left="-0.026cm" fo:margin-right="0.448cm" fo:margin-top="0cm" fo:margin-bottom="0.118cm" style:contextual-spacing="false" fo:line-height="175%" fo:text-indent="1.27cm" style:auto-text-indent="false"/>
      <style:text-properties style:font-name="Courier New" fo:language="en" fo:country="GB" officeooo:paragraph-rsid="0003816f" style:font-name-asian="Courier New1" style:font-name-complex="Courier New1"/>
    </style:style>
    <style:style style:name="P229" style:family="paragraph" style:parent-style-name="Standard">
      <style:paragraph-properties fo:margin-left="0cm" fo:margin-right="0cm" fo:margin-top="0cm" fo:margin-bottom="0.016cm" style:contextual-spacing="false" fo:line-height="198%" fo:text-indent="0cm" style:auto-text-indent="false"/>
      <style:text-properties style:font-name="Courier New" fo:language="en" fo:country="GB" officeooo:paragraph-rsid="0003816f" style:font-name-asian="Courier New1" style:font-name-complex="Courier New1"/>
    </style:style>
    <style:style style:name="P230" style:family="paragraph" style:parent-style-name="Standard">
      <style:paragraph-properties fo:margin-left="-0.009cm" fo:margin-right="0.295cm" fo:margin-top="0cm" fo:margin-bottom="0.016cm" style:contextual-spacing="false" fo:text-indent="-0.018cm" style:auto-text-indent="false"/>
      <style:text-properties style:font-name="Courier New" fo:language="en" fo:country="GB" officeooo:paragraph-rsid="0003816f" style:font-name-asian="Courier New1" style:font-name-complex="Courier New1"/>
    </style:style>
    <style:style style:name="P231" style:family="paragraph" style:parent-style-name="Standard">
      <style:paragraph-properties fo:margin-left="-0.009cm" fo:margin-right="0.295cm" fo:margin-top="0cm" fo:margin-bottom="0.342cm" style:contextual-spacing="false" fo:text-indent="-0.018cm" style:auto-text-indent="false"/>
      <style:text-properties style:font-name="Courier New" fo:language="en" fo:country="GB" officeooo:paragraph-rsid="0003816f" style:font-name-asian="Courier New1" style:font-name-complex="Courier New1"/>
    </style:style>
    <style:style style:name="P232" style:family="paragraph" style:parent-style-name="Standard">
      <style:paragraph-properties fo:margin-left="-0.009cm" fo:margin-right="0.295cm" fo:margin-top="0cm" fo:margin-bottom="0.342cm" style:contextual-spacing="false" fo:text-indent="-0.018cm" style:auto-text-indent="false"/>
      <style:text-properties style:font-name="Courier New" fo:language="en" fo:country="GB" officeooo:paragraph-rsid="00166acb" style:font-name-asian="Courier New1" style:font-name-complex="Courier New1"/>
    </style:style>
    <style:style style:name="P233"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officeooo:paragraph-rsid="0003816f" style:font-name-asian="Courier New1" style:font-name-complex="Courier New1"/>
    </style:style>
    <style:style style:name="P234"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officeooo:paragraph-rsid="004eaae9" style:font-name-asian="Courier New1" style:font-name-complex="Courier New1"/>
    </style:style>
    <style:style style:name="P235"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officeooo:paragraph-rsid="004eada9" style:font-name-asian="Courier New1" style:font-name-complex="Courier New1"/>
    </style:style>
    <style:style style:name="P236" style:family="paragraph" style:parent-style-name="Standard">
      <style:paragraph-properties fo:margin-left="-0.009cm" fo:margin-right="0.295cm" fo:margin-top="0cm" fo:margin-bottom="0.411cm" style:contextual-spacing="false" fo:text-indent="-0.018cm" style:auto-text-indent="false"/>
      <style:text-properties officeooo:paragraph-rsid="0003816f"/>
    </style:style>
    <style:style style:name="P237" style:family="paragraph" style:parent-style-name="Standard">
      <style:paragraph-properties fo:margin-left="-0.009cm" fo:margin-right="0.295cm" fo:margin-top="0cm" fo:margin-bottom="0.016cm" style:contextual-spacing="false" fo:text-indent="-0.018cm" style:auto-text-indent="false"/>
      <style:text-properties officeooo:paragraph-rsid="0003816f"/>
    </style:style>
    <style:style style:name="P238" style:family="paragraph" style:parent-style-name="Standard">
      <style:paragraph-properties fo:margin-left="-0.009cm" fo:margin-right="0.295cm" fo:margin-top="0cm" fo:margin-bottom="0.437cm" style:contextual-spacing="false" fo:text-indent="-0.018cm" style:auto-text-indent="false"/>
      <style:text-properties officeooo:paragraph-rsid="0003816f"/>
    </style:style>
    <style:style style:name="P239" style:family="paragraph" style:parent-style-name="Standard">
      <style:paragraph-properties fo:margin-left="-0.009cm" fo:margin-right="0.295cm" fo:margin-top="0cm" fo:margin-bottom="0.392cm" style:contextual-spacing="false" fo:text-indent="-0.018cm" style:auto-text-indent="false"/>
      <style:text-properties officeooo:paragraph-rsid="0003816f"/>
    </style:style>
    <style:style style:name="P240" style:family="paragraph" style:parent-style-name="Standard">
      <style:paragraph-properties fo:margin-left="-0.009cm" fo:margin-right="0.295cm" fo:margin-top="0cm" fo:margin-bottom="0.407cm" style:contextual-spacing="false" fo:text-indent="-0.018cm" style:auto-text-indent="false"/>
      <style:text-properties officeooo:paragraph-rsid="0003816f"/>
    </style:style>
    <style:style style:name="P241" style:family="paragraph" style:parent-style-name="Standard">
      <style:paragraph-properties fo:margin-left="-0.009cm" fo:margin-right="0.295cm" fo:margin-top="0cm" fo:margin-bottom="0.342cm" style:contextual-spacing="false" fo:text-indent="-0.018cm" style:auto-text-indent="false"/>
      <style:text-properties officeooo:paragraph-rsid="0003816f"/>
    </style:style>
    <style:style style:name="P242" style:family="paragraph" style:parent-style-name="Standard">
      <style:paragraph-properties fo:margin-left="-0.009cm" fo:margin-right="0.295cm" fo:margin-top="0cm" fo:margin-bottom="0.46cm" style:contextual-spacing="false" fo:text-indent="-0.018cm" style:auto-text-indent="false"/>
      <style:text-properties officeooo:paragraph-rsid="0003816f"/>
    </style:style>
    <style:style style:name="P243" style:family="paragraph" style:parent-style-name="Standard">
      <style:paragraph-properties fo:margin-left="-0.009cm" fo:margin-right="0.295cm" fo:margin-top="0cm" fo:margin-bottom="0.473cm" style:contextual-spacing="false" fo:text-indent="-0.018cm" style:auto-text-indent="false"/>
      <style:text-properties officeooo:paragraph-rsid="0003816f"/>
    </style:style>
    <style:style style:name="P244" style:family="paragraph" style:parent-style-name="Standard">
      <style:paragraph-properties fo:margin-left="-0.009cm" fo:margin-right="0.295cm" fo:margin-top="0cm" fo:margin-bottom="0.601cm" style:contextual-spacing="false" fo:text-indent="-0.018cm" style:auto-text-indent="false"/>
      <style:text-properties officeooo:paragraph-rsid="0003816f"/>
    </style:style>
    <style:style style:name="P245" style:family="paragraph" style:parent-style-name="Standard">
      <style:paragraph-properties fo:margin-left="-0.009cm" fo:margin-right="0.295cm" fo:margin-top="0cm" fo:margin-bottom="0.767cm" style:contextual-spacing="false" fo:text-indent="-0.018cm" style:auto-text-indent="false"/>
      <style:text-properties officeooo:paragraph-rsid="0003816f"/>
    </style:style>
    <style:style style:name="P246" style:family="paragraph" style:parent-style-name="Standard">
      <style:paragraph-properties fo:margin-left="1.288cm" fo:margin-right="0.295cm" fo:margin-top="0cm" fo:margin-bottom="0.342cm" style:contextual-spacing="false" fo:text-indent="-0.018cm" style:auto-text-indent="false"/>
      <style:text-properties officeooo:paragraph-rsid="0003816f"/>
    </style:style>
    <style:style style:name="P247" style:family="paragraph" style:parent-style-name="Standard">
      <style:paragraph-properties fo:margin-left="1.288cm" fo:margin-right="0.295cm" fo:margin-top="0cm" fo:margin-bottom="0.392cm" style:contextual-spacing="false" fo:text-indent="-0.018cm" style:auto-text-indent="false"/>
      <style:text-properties officeooo:paragraph-rsid="0003816f"/>
    </style:style>
    <style:style style:name="P248" style:family="paragraph" style:parent-style-name="Standard">
      <style:paragraph-properties fo:margin-top="0cm" fo:margin-bottom="0.46cm" style:contextual-spacing="false"/>
      <style:text-properties officeooo:paragraph-rsid="0003816f"/>
    </style:style>
    <style:style style:name="P249" style:family="paragraph" style:parent-style-name="Standard">
      <style:paragraph-properties fo:margin-top="0cm" fo:margin-bottom="0.953cm" style:contextual-spacing="false"/>
      <style:text-properties officeooo:paragraph-rsid="0003816f"/>
    </style:style>
    <style:style style:name="P250" style:family="paragraph" style:parent-style-name="Standard">
      <style:paragraph-properties fo:margin-top="0cm" fo:margin-bottom="0cm" style:contextual-spacing="false"/>
      <style:text-properties officeooo:paragraph-rsid="0003816f"/>
    </style:style>
    <style:style style:name="P251" style:family="paragraph" style:parent-style-name="Standard">
      <style:paragraph-properties fo:margin-left="0cm" fo:margin-right="0cm" fo:margin-top="0cm" fo:margin-bottom="0.411cm" style:contextual-spacing="false" fo:text-indent="0cm" style:auto-text-indent="false"/>
      <style:text-properties officeooo:paragraph-rsid="0003816f"/>
    </style:style>
    <style:style style:name="P252" style:family="paragraph" style:parent-style-name="Standard">
      <style:paragraph-properties fo:margin-top="0cm" fo:margin-bottom="0.379cm" style:contextual-spacing="false"/>
      <style:text-properties officeooo:paragraph-rsid="0003816f"/>
    </style:style>
    <style:style style:name="P253" style:family="paragraph" style:parent-style-name="Standard">
      <style:paragraph-properties fo:margin-top="0cm" fo:margin-bottom="0.34cm" style:contextual-spacing="false"/>
      <style:text-properties officeooo:paragraph-rsid="0003816f"/>
    </style:style>
    <style:style style:name="P254" style:family="paragraph" style:parent-style-name="Standard">
      <style:paragraph-properties fo:margin-left="-0.004cm" fo:margin-top="0cm" fo:margin-bottom="0cm" style:contextual-spacing="false"/>
      <style:text-properties officeooo:paragraph-rsid="0003816f"/>
    </style:style>
    <style:style style:name="P255" style:family="paragraph" style:parent-style-name="Standard">
      <style:paragraph-properties fo:margin-left="-0.026cm" fo:margin-right="0.448cm" fo:margin-top="0cm" fo:margin-bottom="0.118cm" style:contextual-spacing="false" fo:line-height="175%" fo:text-indent="1.27cm" style:auto-text-indent="false"/>
      <style:text-properties officeooo:paragraph-rsid="0003816f"/>
    </style:style>
    <style:style style:name="P256" style:family="paragraph" style:parent-style-name="Standard">
      <style:paragraph-properties fo:margin-left="-0.009cm" fo:margin-right="0.295cm" fo:margin-top="0cm" fo:margin-bottom="0.947cm" style:contextual-spacing="false" fo:line-height="198%" fo:text-indent="-0.018cm" style:auto-text-indent="false"/>
      <style:text-properties officeooo:paragraph-rsid="0003816f"/>
    </style:style>
    <style:style style:name="P257" style:family="paragraph" style:parent-style-name="Standard">
      <style:paragraph-properties fo:margin-left="-0.009cm" fo:margin-right="0.295cm" fo:margin-top="0cm" fo:margin-bottom="0.997cm" style:contextual-spacing="false" fo:line-height="198%" fo:text-indent="-0.018cm" style:auto-text-indent="false"/>
      <style:text-properties officeooo:paragraph-rsid="0003816f"/>
    </style:style>
    <style:style style:name="P258" style:family="paragraph" style:parent-style-name="Standard">
      <style:paragraph-properties fo:margin-left="-0.009cm" fo:margin-right="0.295cm" fo:margin-top="0cm" fo:margin-bottom="0.974cm" style:contextual-spacing="false" fo:line-height="198%" fo:text-indent="-0.018cm" style:auto-text-indent="false"/>
      <style:text-properties officeooo:paragraph-rsid="0003816f"/>
    </style:style>
    <style:style style:name="P259" style:family="paragraph" style:parent-style-name="Standard">
      <style:paragraph-properties fo:margin-left="-0.009cm" fo:margin-right="0.295cm" fo:margin-top="0cm" fo:margin-bottom="1.304cm" style:contextual-spacing="false" fo:line-height="198%" fo:text-indent="-0.018cm" style:auto-text-indent="false"/>
      <style:text-properties officeooo:paragraph-rsid="0003816f"/>
    </style:style>
    <style:style style:name="P260" style:family="paragraph" style:parent-style-name="Standard">
      <style:paragraph-properties fo:margin-left="-0.009cm" fo:margin-right="0.295cm" fo:margin-top="0cm" fo:margin-bottom="1.281cm" style:contextual-spacing="false" fo:line-height="198%" fo:text-indent="-0.018cm" style:auto-text-indent="false"/>
      <style:text-properties officeooo:paragraph-rsid="0003816f"/>
    </style:style>
    <style:style style:name="P261" style:family="paragraph" style:parent-style-name="Standard">
      <style:paragraph-properties fo:margin-left="-0.009cm" fo:margin-right="0.295cm" fo:margin-top="0cm" fo:margin-bottom="0.016cm" style:contextual-spacing="false" fo:line-height="198%" fo:text-indent="-0.018cm" style:auto-text-indent="false"/>
      <style:text-properties officeooo:paragraph-rsid="0003816f"/>
    </style:style>
    <style:style style:name="P262" style:family="paragraph" style:parent-style-name="Standard">
      <style:paragraph-properties fo:margin-left="-0.009cm" fo:margin-right="4.872cm" fo:margin-top="0cm" fo:margin-bottom="0.016cm" style:contextual-spacing="false" fo:line-height="198%" fo:text-indent="-0.018cm" style:auto-text-indent="false"/>
      <style:text-properties officeooo:paragraph-rsid="0003816f"/>
    </style:style>
    <style:style style:name="P263" style:family="paragraph" style:parent-style-name="Standard">
      <style:paragraph-properties fo:margin-left="-0.009cm" fo:margin-right="11.963cm" fo:margin-top="0cm" fo:margin-bottom="0.016cm" style:contextual-spacing="false" fo:line-height="198%" fo:text-indent="-0.018cm" style:auto-text-indent="false"/>
      <style:text-properties officeooo:paragraph-rsid="0003816f"/>
    </style:style>
    <style:style style:name="P264" style:family="paragraph" style:parent-style-name="Standard">
      <style:paragraph-properties fo:margin-left="-0.009cm" fo:margin-right="12.196cm" fo:margin-top="0cm" fo:margin-bottom="0cm" style:contextual-spacing="false" fo:line-height="198%" fo:text-indent="-0.018cm" style:auto-text-indent="false"/>
      <style:text-properties officeooo:paragraph-rsid="0003816f"/>
    </style:style>
    <style:style style:name="P265" style:family="paragraph" style:parent-style-name="Standard">
      <style:paragraph-properties fo:margin-left="-0.009cm" fo:margin-right="4.978cm" fo:margin-top="0cm" fo:margin-bottom="0.016cm" style:contextual-spacing="false" fo:line-height="198%" fo:text-indent="-0.018cm" style:auto-text-indent="false"/>
      <style:text-properties officeooo:paragraph-rsid="0003816f"/>
    </style:style>
    <style:style style:name="P266" style:family="paragraph" style:parent-style-name="Standard">
      <style:paragraph-properties fo:margin-left="-0.009cm" fo:margin-right="8.703cm" fo:margin-top="0cm" fo:margin-bottom="0.016cm" style:contextual-spacing="false" fo:line-height="198%" fo:text-indent="-0.018cm" style:auto-text-indent="false"/>
      <style:text-properties officeooo:paragraph-rsid="0003816f"/>
    </style:style>
    <style:style style:name="P267" style:family="paragraph" style:parent-style-name="Standard">
      <style:paragraph-properties fo:margin-left="-0.009cm" fo:margin-right="5.419cm" fo:margin-top="0cm" fo:margin-bottom="1.251cm" style:contextual-spacing="false" fo:line-height="198%" fo:text-indent="-0.018cm" style:auto-text-indent="false"/>
      <style:text-properties officeooo:paragraph-rsid="0003816f"/>
    </style:style>
    <style:style style:name="P268" style:family="paragraph" style:parent-style-name="Standard">
      <style:paragraph-properties fo:margin-left="-0.009cm" fo:margin-right="4.745cm" fo:margin-top="0cm" fo:margin-bottom="0.016cm" style:contextual-spacing="false" fo:line-height="198%" fo:text-indent="-0.018cm" style:auto-text-indent="false"/>
      <style:text-properties officeooo:paragraph-rsid="0003816f"/>
    </style:style>
    <style:style style:name="P269" style:family="paragraph" style:parent-style-name="Standard">
      <style:paragraph-properties fo:margin-left="-0.009cm" fo:margin-right="5.676cm" fo:margin-top="0cm" fo:margin-bottom="0.926cm" style:contextual-spacing="false" fo:line-height="198%" fo:text-indent="-0.018cm" style:auto-text-indent="false"/>
      <style:text-properties officeooo:paragraph-rsid="0003816f"/>
    </style:style>
    <style:style style:name="P270" style:family="paragraph" style:parent-style-name="Standard">
      <style:paragraph-properties fo:margin-left="-0.009cm" fo:margin-right="8.237cm" fo:margin-top="0cm" fo:margin-bottom="0.016cm" style:contextual-spacing="false" fo:line-height="198%" fo:text-indent="-0.018cm" style:auto-text-indent="false"/>
      <style:text-properties officeooo:paragraph-rsid="0003816f"/>
    </style:style>
    <style:style style:name="P271" style:family="paragraph" style:parent-style-name="Standard">
      <style:paragraph-properties fo:margin-left="-0.009cm" fo:margin-right="9.994cm" fo:margin-top="0cm" fo:margin-bottom="0.016cm" style:contextual-spacing="false" fo:line-height="198%" fo:text-indent="-0.018cm" style:auto-text-indent="false"/>
      <style:text-properties officeooo:paragraph-rsid="0003816f"/>
    </style:style>
    <style:style style:name="P272" style:family="paragraph" style:parent-style-name="Standard">
      <style:paragraph-properties fo:margin-left="-0.009cm" fo:margin-right="11.031cm" fo:margin-top="0cm" fo:margin-bottom="0.016cm" style:contextual-spacing="false" fo:line-height="198%" fo:text-indent="-0.018cm" style:auto-text-indent="false"/>
      <style:text-properties officeooo:paragraph-rsid="0003816f"/>
    </style:style>
    <style:style style:name="P273" style:family="paragraph" style:parent-style-name="Standard">
      <style:paragraph-properties fo:margin-left="-0.009cm" fo:margin-right="10.46cm" fo:margin-top="0cm" fo:margin-bottom="0.016cm" style:contextual-spacing="false" fo:line-height="198%" fo:text-indent="-0.018cm" style:auto-text-indent="false"/>
      <style:text-properties officeooo:paragraph-rsid="0003816f"/>
    </style:style>
    <style:style style:name="P274" style:family="paragraph" style:parent-style-name="Standard">
      <style:paragraph-properties fo:margin-left="-0.009cm" fo:margin-right="3.115cm" fo:margin-top="0cm" fo:margin-bottom="0.203cm" style:contextual-spacing="false" fo:line-height="198%" fo:text-indent="-0.018cm" style:auto-text-indent="false"/>
      <style:text-properties officeooo:paragraph-rsid="0003816f"/>
    </style:style>
    <style:style style:name="P275" style:family="paragraph" style:parent-style-name="Standard">
      <style:paragraph-properties fo:margin-left="0cm" fo:margin-right="0cm" fo:margin-top="0cm" fo:margin-bottom="0.016cm" style:contextual-spacing="false" fo:line-height="198%" fo:text-indent="0cm" style:auto-text-indent="false"/>
      <style:text-properties officeooo:paragraph-rsid="0003816f"/>
    </style:style>
    <style:style style:name="P276" style:family="paragraph" style:parent-style-name="Standard">
      <style:paragraph-properties fo:margin-left="0cm" fo:margin-right="-0.101cm" fo:margin-top="0cm" fo:margin-bottom="0.016cm" style:contextual-spacing="false" fo:line-height="198%" fo:text-indent="0cm" style:auto-text-indent="false"/>
      <style:text-properties officeooo:paragraph-rsid="0003816f"/>
    </style:style>
    <style:style style:name="P277"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78" style:family="paragraph" style:parent-style-name="Standard">
      <style:paragraph-properties fo:margin-left="0cm" fo:margin-right="-0.101cm" fo:margin-top="0cm" fo:margin-bottom="0.016cm" style:contextual-spacing="false" fo:line-height="198%"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79" style:family="paragraph" style:parent-style-name="Standard">
      <style:paragraph-properties fo:margin-left="0cm" fo:margin-right="0cm" fo:margin-top="0cm" fo:margin-bottom="0.353cm" style:contextual-spacing="false" fo:line-height="121%"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80" style:family="paragraph" style:parent-style-name="Standard">
      <style:paragraph-properties fo:margin-left="0cm" fo:margin-right="0cm" fo:margin-top="0cm" fo:margin-bottom="0.353cm" style:contextual-spacing="false" fo:line-height="121%" fo:text-indent="0cm" style:auto-text-indent="false"/>
      <style:text-properties officeooo:paragraph-rsid="0003816f"/>
    </style:style>
    <style:style style:name="P281" style:family="paragraph" style:parent-style-name="Standard">
      <style:paragraph-properties fo:margin-left="-0.009cm" fo:margin-right="0.295cm" fo:margin-top="0cm" fo:margin-bottom="0.353cm" style:contextual-spacing="false" fo:line-height="121%" fo:text-indent="-0.018cm" style:auto-text-indent="false"/>
      <style:text-properties officeooo:paragraph-rsid="0003816f"/>
    </style:style>
    <style:style style:name="P282" style:family="paragraph" style:parent-style-name="Standard">
      <style:paragraph-properties fo:margin-left="-0.009cm" fo:margin-right="12.196cm" fo:margin-top="0cm" fo:margin-bottom="0cm" style:contextual-spacing="false" fo:line-height="100%" fo:text-indent="-0.018cm" style:auto-text-indent="false"/>
      <style:text-properties officeooo:paragraph-rsid="0003816f"/>
    </style:style>
    <style:style style:name="P283" style:family="paragraph" style:parent-style-name="Standard">
      <style:paragraph-properties fo:margin-left="-0.009cm" fo:margin-right="0.062cm" fo:margin-top="0cm" fo:margin-bottom="0.367cm" style:contextual-spacing="false" fo:line-height="100%" fo:text-indent="-0.018cm" style:auto-text-indent="false"/>
      <style:text-properties officeooo:paragraph-rsid="0003816f"/>
    </style:style>
    <style:style style:name="P284" style:family="paragraph" style:parent-style-name="Standard">
      <style:paragraph-properties fo:margin-left="-0.009cm" fo:margin-right="0.062cm" fo:margin-top="0cm" fo:margin-bottom="0.092cm" style:contextual-spacing="false" fo:line-height="100%" fo:text-indent="-0.018cm" style:auto-text-indent="false"/>
      <style:text-properties officeooo:paragraph-rsid="0003816f"/>
    </style:style>
    <style:style style:name="P285" style:family="paragraph" style:parent-style-name="Standard">
      <style:paragraph-properties fo:margin-left="-0.009cm" fo:margin-top="0cm" fo:margin-bottom="0.295cm" style:contextual-spacing="false" fo:line-height="100%" fo:text-indent="-0.018cm" style:auto-text-indent="false"/>
      <style:text-properties officeooo:paragraph-rsid="0003816f"/>
    </style:style>
    <style:style style:name="P286" style:family="paragraph" style:parent-style-name="Standard">
      <style:paragraph-properties fo:margin-left="-0.009cm" fo:margin-right="0.062cm" fo:margin-top="0cm" fo:margin-bottom="0.092cm" style:contextual-spacing="false" fo:line-height="100%" fo:text-indent="0cm" style:auto-text-indent="false"/>
      <style:text-properties officeooo:paragraph-rsid="0003816f"/>
    </style:style>
    <style:style style:name="P287" style:family="paragraph" style:parent-style-name="Standard">
      <style:paragraph-properties fo:margin-left="0cm" fo:margin-right="0cm" fo:margin-top="0cm" fo:margin-bottom="0.753cm" style:contextual-spacing="false" fo:line-height="100%" fo:text-indent="0cm" style:auto-text-indent="false"/>
      <style:text-properties officeooo:paragraph-rsid="0003816f"/>
    </style:style>
    <style:style style:name="P288" style:family="paragraph" style:parent-style-name="Standard">
      <style:paragraph-properties fo:margin-top="0cm" fo:margin-bottom="0cm" style:contextual-spacing="false" fo:line-height="100%" fo:text-align="start" style:justify-single-word="false" fo:orphans="2" fo:widows="2" fo:hyphenation-ladder-count="no-limit"/>
      <style:text-properties officeooo:paragraph-rsid="0003816f" fo:hyphenate="false" fo:hyphenation-remain-char-count="2" fo:hyphenation-push-char-count="2" loext:hyphenation-no-caps="false" loext:hyphenation-no-last-word="false" loext:hyphenation-word-char-count="5" loext:hyphenation-zone="no-limit"/>
    </style:style>
    <style:style style:name="P289" style:family="paragraph" style:parent-style-name="Standard">
      <style:paragraph-properties fo:margin-left="-0.009cm" fo:margin-right="0.025cm" fo:margin-top="0cm" fo:margin-bottom="0.318cm" style:contextual-spacing="false" fo:line-height="100%" fo:text-align="justify" style:justify-single-word="false" fo:text-indent="-0.018cm" style:auto-text-indent="false"/>
      <style:text-properties officeooo:paragraph-rsid="0003816f"/>
    </style:style>
    <style:style style:name="P290" style:family="paragraph" style:parent-style-name="Standard">
      <style:paragraph-properties fo:margin-left="-0.009cm" fo:margin-right="0.025cm" fo:margin-top="0cm" fo:margin-bottom="0.36cm" style:contextual-spacing="false" fo:line-height="100%" fo:text-align="justify" style:justify-single-word="false" fo:text-indent="-0.018cm" style:auto-text-indent="false"/>
      <style:text-properties officeooo:paragraph-rsid="0003816f"/>
    </style:style>
    <style:style style:name="P291" style:family="paragraph" style:parent-style-name="Standard">
      <style:paragraph-properties fo:margin-left="-0.009cm" fo:margin-right="0.062cm" fo:margin-top="0cm" fo:margin-bottom="0.092cm" style:contextual-spacing="false" fo:line-height="100%" fo:text-indent="-0.018cm" style:auto-text-indent="false"/>
      <style:text-properties officeooo:paragraph-rsid="004fdd88"/>
    </style:style>
    <style:style style:name="P292" style:family="paragraph" style:parent-style-name="Standard" style:list-style-name="L1">
      <style:paragraph-properties fo:margin-left="-0.009cm" fo:margin-right="0.062cm" fo:margin-top="0cm" fo:margin-bottom="0.092cm" style:contextual-spacing="false" fo:line-height="100%" fo:text-indent="-0.018cm" style:auto-text-indent="false"/>
      <style:text-properties officeooo:paragraph-rsid="0003816f"/>
    </style:style>
    <style:style style:name="P293" style:family="paragraph" style:parent-style-name="Standard">
      <style:paragraph-properties fo:margin-left="-0.009cm" fo:margin-right="12.428cm" fo:margin-top="0cm" fo:margin-bottom="0cm" style:contextual-spacing="false" fo:line-height="150%" fo:text-indent="-0.018cm" style:auto-text-indent="false"/>
      <style:text-properties officeooo:paragraph-rsid="0003816f"/>
    </style:style>
    <style:style style:name="P294" style:family="paragraph" style:parent-style-name="Standard">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95" style:family="paragraph" style:parent-style-name="Standard">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writing-mode="lr-tb"/>
      <style:text-properties officeooo:paragraph-rsid="000e88d9" fo:hyphenate="false" fo:hyphenation-remain-char-count="2" fo:hyphenation-push-char-count="2" loext:hyphenation-no-caps="false" loext:hyphenation-no-last-word="false" loext:hyphenation-word-char-count="5" loext:hyphenation-zone="no-limit"/>
    </style:style>
    <style:style style:name="P296" style:family="paragraph" style:parent-style-name="Standard">
      <style:paragraph-properties fo:margin-left="-0.009cm" fo:margin-top="0cm" fo:margin-bottom="0cm" style:contextual-spacing="false" fo:line-height="150%" fo:text-align="start" style:justify-single-word="false" fo:text-indent="-0.018cm" style:auto-text-indent="false"/>
      <style:text-properties officeooo:paragraph-rsid="0003816f"/>
    </style:style>
    <style:style style:name="P297"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officeooo:rsid="00127d63" officeooo:paragraph-rsid="00127d63" fo:hyphenate="false" fo:hyphenation-remain-char-count="2" fo:hyphenation-push-char-count="2" loext:hyphenation-no-caps="false" loext:hyphenation-no-last-word="false" loext:hyphenation-word-char-count="5" loext:hyphenation-zone="no-limit"/>
    </style:style>
    <style:style style:name="P298" style:family="paragraph" style:parent-style-name="Standard">
      <style:paragraph-properties fo:margin-left="-0.009cm" fo:margin-right="3.239cm" fo:margin-top="0cm" fo:margin-bottom="0.067cm" style:contextual-spacing="false" fo:line-height="185%" fo:text-align="justify" style:justify-single-word="false" fo:text-indent="-0.018cm" style:auto-text-indent="false"/>
      <style:text-properties officeooo:paragraph-rsid="0003816f"/>
    </style:style>
    <style:style style:name="P299" style:family="paragraph" style:parent-style-name="Standard">
      <style:paragraph-properties fo:margin-left="-0.009cm" fo:margin-right="0.295cm" fo:margin-top="0cm" fo:margin-bottom="0.402cm" style:contextual-spacing="false" fo:line-height="105%" fo:text-indent="-0.018cm" style:auto-text-indent="false"/>
      <style:text-properties officeooo:paragraph-rsid="0003816f"/>
    </style:style>
    <style:style style:name="P300" style:family="paragraph" style:parent-style-name="Standard">
      <style:paragraph-properties fo:margin-left="-0.009cm" fo:margin-right="0.295cm" fo:margin-top="0cm" fo:margin-bottom="1.528cm" style:contextual-spacing="false" fo:line-height="105%" fo:text-indent="-0.018cm" style:auto-text-indent="false"/>
      <style:text-properties officeooo:paragraph-rsid="0003816f"/>
    </style:style>
    <style:style style:name="P301" style:family="paragraph" style:parent-style-name="Standard">
      <style:paragraph-properties fo:margin-left="-0.009cm" fo:margin-right="0.025cm" fo:margin-top="0cm" fo:margin-bottom="0.201cm" style:contextual-spacing="false" fo:line-height="145%" fo:text-align="justify" style:justify-single-word="false" fo:text-indent="-0.018cm" style:auto-text-indent="false"/>
      <style:text-properties officeooo:paragraph-rsid="0003816f"/>
    </style:style>
    <style:style style:name="P302" style:family="paragraph" style:parent-style-name="Standard">
      <style:paragraph-properties fo:margin-left="-0.009cm" fo:margin-right="0.025cm" fo:margin-top="0cm" fo:margin-bottom="0.318cm" style:contextual-spacing="false" fo:line-height="145%" fo:text-align="justify" style:justify-single-word="false" fo:text-indent="-0.018cm" style:auto-text-indent="false"/>
      <style:text-properties officeooo:paragraph-rsid="0003816f"/>
    </style:style>
    <style:style style:name="P303" style:family="paragraph" style:parent-style-name="Standard">
      <style:paragraph-properties fo:margin-left="-0.009cm" fo:margin-right="0.025cm" fo:margin-top="0cm" fo:margin-bottom="0.318cm" style:contextual-spacing="false" fo:line-height="138%" fo:text-align="justify" style:justify-single-word="false" fo:text-indent="-0.018cm" style:auto-text-indent="false"/>
      <style:text-properties officeooo:paragraph-rsid="0003816f"/>
    </style:style>
    <style:style style:name="P304" style:family="paragraph" style:parent-style-name="Standard">
      <style:paragraph-properties fo:margin-left="-0.009cm" fo:margin-right="0.025cm" fo:margin-top="0cm" fo:margin-bottom="0.563cm" style:contextual-spacing="false" fo:line-height="135%" fo:text-align="justify" style:justify-single-word="false" fo:text-indent="-0.018cm" style:auto-text-indent="false"/>
      <style:text-properties officeooo:paragraph-rsid="0003816f"/>
    </style:style>
    <style:style style:name="P305" style:family="paragraph" style:parent-style-name="Standard">
      <style:paragraph-properties fo:margin-left="-0.009cm" fo:margin-right="0.025cm" fo:margin-top="0cm" fo:margin-bottom="0.559cm" style:contextual-spacing="false" fo:line-height="135%" fo:text-align="justify" style:justify-single-word="false" fo:text-indent="-0.018cm" style:auto-text-indent="false"/>
      <style:text-properties officeooo:paragraph-rsid="0003816f"/>
    </style:style>
    <style:style style:name="P306" style:family="paragraph" style:parent-style-name="Standard">
      <style:paragraph-properties fo:margin-left="-0.009cm" fo:margin-right="0.025cm" fo:margin-top="0cm" fo:margin-bottom="0.025cm" style:contextual-spacing="false" fo:line-height="210%" fo:text-align="justify" style:justify-single-word="false" fo:text-indent="-0.018cm" style:auto-text-indent="false"/>
      <style:text-properties officeooo:paragraph-rsid="0003816f"/>
    </style:style>
    <style:style style:name="P307" style:family="paragraph" style:parent-style-name="Standard">
      <style:paragraph-properties fo:margin-left="-0.009cm" fo:margin-right="0.025cm" fo:margin-top="0cm" fo:margin-bottom="0.318cm" style:contextual-spacing="false" fo:line-height="160%" fo:text-align="justify" style:justify-single-word="false" fo:text-indent="-0.018cm" style:auto-text-indent="false"/>
      <style:text-properties officeooo:paragraph-rsid="0003816f"/>
    </style:style>
    <style:style style:name="P308" style:family="paragraph" style:parent-style-name="Standard">
      <style:paragraph-properties fo:margin-left="-0.009cm" fo:margin-right="3.193cm" fo:margin-top="0cm" fo:margin-bottom="0.011cm" style:contextual-spacing="false" fo:line-height="200%" fo:text-align="justify" style:justify-single-word="false" fo:text-indent="-0.018cm" style:auto-text-indent="false"/>
      <style:text-properties officeooo:paragraph-rsid="0003816f"/>
    </style:style>
    <style:style style:name="P309" style:family="paragraph" style:parent-style-name="Standard">
      <style:paragraph-properties fo:margin-left="-0.009cm" fo:margin-right="3.193cm" fo:margin-top="0cm" fo:margin-bottom="0.189cm" style:contextual-spacing="false" fo:line-height="200%" fo:text-align="justify" style:justify-single-word="false" fo:text-indent="-0.018cm" style:auto-text-indent="false"/>
      <style:text-properties officeooo:paragraph-rsid="0003816f"/>
    </style:style>
    <style:style style:name="P310" style:family="paragraph" style:parent-style-name="Standard">
      <style:paragraph-properties fo:margin-left="-0.009cm" fo:margin-right="1.796cm" fo:margin-top="0cm" fo:margin-bottom="0cm" style:contextual-spacing="false" fo:line-height="200%" fo:text-align="justify" style:justify-single-word="false" fo:text-indent="-0.018cm" style:auto-text-indent="false"/>
      <style:text-properties officeooo:paragraph-rsid="0003816f"/>
    </style:style>
    <style:style style:name="P311" style:family="paragraph" style:parent-style-name="Standard">
      <style:paragraph-properties fo:margin-left="-0.009cm" fo:margin-right="9.634cm" fo:margin-top="0cm" fo:margin-bottom="0.011cm" style:contextual-spacing="false" fo:line-height="200%" fo:text-align="justify" style:justify-single-word="false" fo:text-indent="-0.018cm" style:auto-text-indent="false"/>
      <style:text-properties officeooo:paragraph-rsid="0003816f"/>
    </style:style>
    <style:style style:name="P312" style:family="paragraph" style:parent-style-name="Standard">
      <style:paragraph-properties fo:margin-right="0.026cm" fo:margin-top="0cm" fo:margin-bottom="1.298cm" style:contextual-spacing="false" fo:line-height="98%" fo:text-align="justify" style:justify-single-word="false"/>
      <style:text-properties officeooo:paragraph-rsid="0003816f"/>
    </style:style>
    <style:style style:name="P313" style:family="paragraph" style:parent-style-name="Standard">
      <style:paragraph-properties fo:margin-left="-0.009cm" fo:margin-top="0cm" fo:margin-bottom="0.991cm" style:contextual-spacing="false" fo:line-height="151%" fo:text-indent="-0.018cm" style:auto-text-indent="false"/>
      <style:text-properties officeooo:paragraph-rsid="0003816f"/>
    </style:style>
    <style:style style:name="P314" style:family="paragraph" style:parent-style-name="Standard">
      <style:paragraph-properties fo:margin-left="-0.009cm" fo:margin-right="0.787cm" fo:margin-top="0cm" fo:margin-bottom="0.176cm" style:contextual-spacing="false" fo:line-height="151%" fo:text-indent="-0.018cm" style:auto-text-indent="false"/>
      <style:text-properties officeooo:paragraph-rsid="0003816f"/>
    </style:style>
    <style:style style:name="P315" style:family="paragraph" style:parent-style-name="Standard">
      <style:paragraph-properties fo:margin-left="-0.009cm" fo:margin-right="0.774cm" fo:margin-top="0cm" fo:margin-bottom="0.138cm" style:contextual-spacing="false" fo:line-height="151%" fo:text-indent="-0.018cm" style:auto-text-indent="false"/>
      <style:text-properties officeooo:paragraph-rsid="0003816f"/>
    </style:style>
    <style:style style:name="P316" style:family="paragraph" style:parent-style-name="Standard">
      <style:paragraph-properties fo:margin-left="-0.009cm" fo:margin-right="0.025cm" fo:margin-top="0cm" fo:margin-bottom="0.168cm" style:contextual-spacing="false" fo:line-height="163%" fo:text-align="justify" style:justify-single-word="false" fo:text-indent="-0.018cm" style:auto-text-indent="false"/>
      <style:text-properties officeooo:paragraph-rsid="0003816f"/>
    </style:style>
    <style:style style:name="P317" style:family="paragraph" style:parent-style-name="Standard">
      <style:paragraph-properties fo:margin-left="0cm" fo:margin-right="0cm" fo:margin-top="0cm" fo:margin-bottom="0.411cm" style:contextual-spacing="false" fo:line-height="108%"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18" style:family="paragraph" style:parent-style-name="Standard">
      <style:paragraph-properties fo:margin-left="0cm" fo:margin-right="0cm" fo:margin-top="0cm" fo:margin-bottom="0cm" style:contextual-spacing="false" fo:line-height="193%"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19" style:family="paragraph" style:parent-style-name="Standard">
      <style:paragraph-properties fo:margin-left="0cm" fo:margin-right="0cm" fo:margin-top="0cm" fo:margin-bottom="0.092cm" style:contextual-spacing="false" fo:line-height="193%"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20" style:family="paragraph" style:parent-style-name="Standard">
      <style:paragraph-properties fo:margin-left="0cm" fo:margin-right="0cm" fo:margin-top="0cm" fo:margin-bottom="0.039cm" style:contextual-spacing="false" fo:line-height="193%"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21" style:family="paragraph" style:parent-style-name="Standard">
      <style:paragraph-properties fo:margin-left="-0.009cm" fo:margin-right="3.814cm" fo:margin-top="0cm" fo:margin-bottom="0cm" style:contextual-spacing="false" fo:line-height="193%" fo:text-indent="-0.018cm" style:auto-text-indent="false"/>
      <style:text-properties officeooo:paragraph-rsid="0003816f"/>
    </style:style>
    <style:style style:name="P322" style:family="paragraph" style:parent-style-name="Standard">
      <style:paragraph-properties fo:margin-left="-0.009cm" fo:margin-right="3.814cm" fo:margin-top="0cm" fo:margin-bottom="0.18cm" style:contextual-spacing="false" fo:line-height="193%" fo:text-indent="-0.018cm" style:auto-text-indent="false"/>
      <style:text-properties officeooo:paragraph-rsid="0003816f"/>
    </style:style>
    <style:style style:name="P323" style:family="paragraph" style:parent-style-name="Standard">
      <style:paragraph-properties fo:margin-left="-0.009cm" fo:margin-right="2.184cm" fo:margin-top="0cm" fo:margin-bottom="0.039cm" style:contextual-spacing="false" fo:line-height="193%" fo:text-indent="-0.018cm" style:auto-text-indent="false"/>
      <style:text-properties officeooo:paragraph-rsid="0003816f"/>
    </style:style>
    <style:style style:name="P324" style:family="paragraph" style:parent-style-name="Standard">
      <style:paragraph-properties fo:margin-left="-0.009cm" fo:margin-right="6.375cm" fo:margin-top="0cm" fo:margin-bottom="0.896cm" style:contextual-spacing="false" fo:line-height="193%" fo:text-indent="-0.018cm" style:auto-text-indent="false"/>
      <style:text-properties officeooo:paragraph-rsid="0003816f"/>
    </style:style>
    <style:style style:name="P325" style:family="paragraph" style:parent-style-name="Standard">
      <style:paragraph-properties fo:margin-left="-0.009cm" fo:margin-right="7.539cm" fo:margin-top="0cm" fo:margin-bottom="0cm" style:contextual-spacing="false" fo:line-height="193%" fo:text-indent="-0.018cm" style:auto-text-indent="false"/>
      <style:text-properties officeooo:paragraph-rsid="0003816f"/>
    </style:style>
    <style:style style:name="P326" style:family="paragraph" style:parent-style-name="Standard">
      <style:paragraph-properties fo:margin-left="-0.009cm" fo:margin-right="11.031cm" fo:margin-top="0cm" fo:margin-bottom="0cm" style:contextual-spacing="false" fo:line-height="193%" fo:text-indent="-0.018cm" style:auto-text-indent="false"/>
      <style:text-properties officeooo:paragraph-rsid="0003816f"/>
    </style:style>
    <style:style style:name="P327" style:family="paragraph" style:parent-style-name="Standard">
      <style:paragraph-properties fo:margin-left="-0.009cm" fo:margin-right="11.031cm" fo:margin-top="0cm" fo:margin-bottom="0.039cm" style:contextual-spacing="false" fo:line-height="193%" fo:text-indent="-0.018cm" style:auto-text-indent="false"/>
      <style:text-properties officeooo:paragraph-rsid="0003816f"/>
    </style:style>
    <style:style style:name="P328" style:family="paragraph" style:parent-style-name="Standard">
      <style:paragraph-properties fo:margin-left="-0.009cm" fo:margin-right="8.47cm" fo:margin-top="0cm" fo:margin-bottom="0.039cm" style:contextual-spacing="false" fo:line-height="193%" fo:text-indent="-0.018cm" style:auto-text-indent="false"/>
      <style:text-properties officeooo:paragraph-rsid="0003816f"/>
    </style:style>
    <style:style style:name="P329" style:family="paragraph" style:parent-style-name="Standard">
      <style:paragraph-properties fo:margin-left="-0.009cm" fo:margin-right="8.47cm" fo:margin-top="0cm" fo:margin-bottom="0cm" style:contextual-spacing="false" fo:line-height="193%" fo:text-indent="-0.018cm" style:auto-text-indent="false"/>
      <style:text-properties officeooo:paragraph-rsid="0003816f"/>
    </style:style>
    <style:style style:name="P330" style:family="paragraph" style:parent-style-name="Standard">
      <style:paragraph-properties fo:margin-left="-0.009cm" fo:margin-right="8.237cm" fo:margin-top="0cm" fo:margin-bottom="0.039cm" style:contextual-spacing="false" fo:line-height="193%" fo:text-indent="-0.018cm" style:auto-text-indent="false"/>
      <style:text-properties officeooo:paragraph-rsid="0003816f"/>
    </style:style>
    <style:style style:name="P331" style:family="paragraph" style:parent-style-name="Standard">
      <style:paragraph-properties fo:margin-left="-0.009cm" fo:margin-right="0.321cm" fo:margin-top="0cm" fo:margin-bottom="0.367cm" style:contextual-spacing="false" fo:line-height="193%" fo:text-indent="-0.018cm" style:auto-text-indent="false"/>
      <style:text-properties officeooo:paragraph-rsid="0003816f"/>
    </style:style>
    <style:style style:name="P332" style:family="paragraph" style:parent-style-name="Standard">
      <style:paragraph-properties fo:margin-left="-0.009cm" fo:margin-right="11.497cm" fo:margin-top="0cm" fo:margin-bottom="0cm" style:contextual-spacing="false" fo:line-height="193%" fo:text-indent="-0.018cm" style:auto-text-indent="false"/>
      <style:text-properties officeooo:paragraph-rsid="0003816f"/>
    </style:style>
    <style:style style:name="P333" style:family="paragraph" style:parent-style-name="Standard">
      <style:paragraph-properties fo:margin-left="-0.009cm" fo:margin-right="11.497cm" fo:margin-top="0cm" fo:margin-bottom="0.903cm" style:contextual-spacing="false" fo:line-height="193%" fo:text-indent="-0.018cm" style:auto-text-indent="false"/>
      <style:text-properties officeooo:paragraph-rsid="0003816f"/>
    </style:style>
    <style:style style:name="P334" style:family="paragraph" style:parent-style-name="Standard">
      <style:paragraph-properties fo:margin-left="-0.009cm" fo:margin-right="3.348cm" fo:margin-top="0cm" fo:margin-bottom="0.367cm" style:contextual-spacing="false" fo:line-height="193%" fo:text-indent="-0.018cm" style:auto-text-indent="false"/>
      <style:text-properties officeooo:paragraph-rsid="0003816f"/>
    </style:style>
    <style:style style:name="P335" style:family="paragraph" style:parent-style-name="Standard">
      <style:paragraph-properties fo:margin-left="-0.009cm" fo:margin-right="12.196cm" fo:margin-top="0cm" fo:margin-bottom="0.039cm" style:contextual-spacing="false" fo:line-height="193%" fo:text-indent="-0.018cm" style:auto-text-indent="false"/>
      <style:text-properties officeooo:paragraph-rsid="0003816f"/>
    </style:style>
    <style:style style:name="P336" style:family="paragraph" style:parent-style-name="Standard">
      <style:paragraph-properties fo:margin-left="-0.009cm" fo:margin-right="8.936cm" fo:margin-top="0cm" fo:margin-bottom="0cm" style:contextual-spacing="false" fo:line-height="193%" fo:text-indent="-0.018cm" style:auto-text-indent="false"/>
      <style:text-properties officeooo:paragraph-rsid="0003816f"/>
    </style:style>
    <style:style style:name="P337" style:family="paragraph" style:parent-style-name="Standard">
      <style:paragraph-properties fo:margin-left="-0.009cm" fo:margin-right="4.046cm" fo:margin-top="0cm" fo:margin-bottom="0.896cm" style:contextual-spacing="false" fo:line-height="193%" fo:text-indent="-0.018cm" style:auto-text-indent="false"/>
      <style:text-properties officeooo:paragraph-rsid="0003816f"/>
    </style:style>
    <style:style style:name="P338" style:family="paragraph" style:parent-style-name="Standard">
      <style:paragraph-properties fo:margin-left="-0.009cm" fo:margin-right="2.078cm" fo:margin-top="0cm" fo:margin-bottom="0cm" style:contextual-spacing="false" fo:line-height="193%" fo:text-indent="-0.018cm" style:auto-text-indent="false"/>
      <style:text-properties officeooo:paragraph-rsid="0003816f"/>
    </style:style>
    <style:style style:name="P339" style:family="paragraph" style:parent-style-name="Standard">
      <style:paragraph-properties fo:margin-left="1.288cm" fo:margin-right="1.612cm" fo:margin-top="0cm" fo:margin-bottom="0cm" style:contextual-spacing="false" fo:line-height="193%" fo:text-indent="-0.018cm" style:auto-text-indent="false"/>
      <style:text-properties officeooo:paragraph-rsid="0003816f"/>
    </style:style>
    <style:style style:name="P340" style:family="paragraph" style:parent-style-name="Standard">
      <style:paragraph-properties fo:margin-left="-0.009cm" fo:margin-right="8.936cm" fo:margin-top="0cm" fo:margin-bottom="0cm" style:contextual-spacing="false" fo:line-height="193%" fo:text-indent="-0.018cm" style:auto-text-indent="false"/>
      <style:text-properties officeooo:paragraph-rsid="004bfcc1"/>
    </style:style>
    <style:style style:name="P341" style:family="paragraph" style:parent-style-name="Standard">
      <style:paragraph-properties fo:margin-left="-0.009cm" fo:margin-right="8.936cm" fo:margin-top="0cm" fo:margin-bottom="0cm" style:contextual-spacing="false" fo:line-height="193%" fo:text-indent="-0.018cm" style:auto-text-indent="false"/>
      <style:text-properties officeooo:paragraph-rsid="004a52ed"/>
    </style:style>
    <style:style style:name="P342" style:family="paragraph" style:parent-style-name="Standard">
      <style:paragraph-properties fo:margin-left="-0.009cm" fo:margin-right="10.746cm" fo:margin-top="0cm" fo:margin-bottom="0cm" style:contextual-spacing="false" fo:line-height="191%" fo:text-align="justify" style:justify-single-word="false" fo:text-indent="-0.018cm" style:auto-text-indent="false"/>
      <style:text-properties officeooo:paragraph-rsid="0003816f"/>
    </style:style>
    <style:style style:name="P343" style:family="paragraph" style:parent-style-name="Standard">
      <style:paragraph-properties fo:margin-left="-0.009cm" fo:margin-top="0cm" fo:margin-bottom="0.335cm" style:contextual-spacing="false" fo:line-height="115%" fo:text-indent="-0.018cm" style:auto-text-indent="false"/>
      <style:text-properties officeooo:paragraph-rsid="0003816f"/>
    </style:style>
    <style:style style:name="P344" style:family="paragraph" style:parent-style-name="Standard" style:list-style-name="WWNum7">
      <style:paragraph-properties fo:margin-left="1.27cm" fo:margin-right="0.025cm" fo:margin-top="0cm" fo:margin-bottom="0cm" style:contextual-spacing="false" fo:line-height="115%" fo:text-align="justify" style:justify-single-word="false" fo:text-indent="-0.635cm" style:auto-text-indent="false"/>
      <style:text-properties officeooo:paragraph-rsid="0003816f"/>
    </style:style>
    <style:style style:name="P345" style:family="paragraph" style:parent-style-name="Standard">
      <style:paragraph-properties fo:margin-left="0cm" fo:margin-right="0cm" fo:margin-top="0cm" fo:margin-bottom="0.411cm" style:contextual-spacing="false" fo:line-height="195%" fo:text-align="justify"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46" style:family="paragraph" style:parent-style-name="Standard">
      <style:paragraph-properties fo:margin-left="-0.009cm" fo:margin-right="4.718cm" fo:margin-top="0cm" fo:margin-bottom="0.411cm" style:contextual-spacing="false" fo:line-height="195%" fo:text-align="justify" style:justify-single-word="false" fo:text-indent="-0.018cm" style:auto-text-indent="false"/>
      <style:text-properties officeooo:paragraph-rsid="0003816f"/>
    </style:style>
    <style:style style:name="P347" style:family="paragraph" style:parent-style-name="Standard">
      <style:paragraph-properties fo:margin-left="-0.009cm" fo:margin-right="4.718cm" fo:margin-top="0cm" fo:margin-bottom="0.175cm" style:contextual-spacing="false" fo:line-height="195%" fo:text-align="justify" style:justify-single-word="false" fo:text-indent="-0.018cm" style:auto-text-indent="false"/>
      <style:text-properties officeooo:paragraph-rsid="0003816f"/>
    </style:style>
    <style:style style:name="P348" style:family="paragraph" style:parent-style-name="Standard">
      <style:paragraph-properties fo:margin-left="-0.009cm" fo:margin-right="4.374cm" fo:margin-top="0cm" fo:margin-bottom="0.03cm" style:contextual-spacing="false" fo:line-height="195%" fo:text-align="justify" style:justify-single-word="false" fo:text-indent="-0.018cm" style:auto-text-indent="false"/>
      <style:text-properties officeooo:paragraph-rsid="0003816f"/>
    </style:style>
    <style:style style:name="P349" style:family="paragraph" style:parent-style-name="Standard">
      <style:paragraph-properties fo:margin-left="-0.009cm" fo:margin-right="7.306cm" fo:margin-top="0cm" fo:margin-bottom="0.071cm" style:contextual-spacing="false" fo:line-height="186%" fo:text-indent="-0.018cm" style:auto-text-indent="false"/>
      <style:text-properties officeooo:paragraph-rsid="0003816f"/>
    </style:style>
    <style:style style:name="P350" style:family="paragraph" style:parent-style-name="Standard">
      <style:paragraph-properties fo:margin-left="-0.009cm" fo:margin-right="6.369cm" fo:margin-top="0cm" fo:margin-bottom="0.85cm" style:contextual-spacing="false" fo:line-height="208%" fo:text-align="justify" style:justify-single-word="false" fo:text-indent="-0.018cm" style:auto-text-indent="false"/>
      <style:text-properties officeooo:paragraph-rsid="0003816f"/>
    </style:style>
    <style:style style:name="P351" style:family="paragraph" style:parent-style-name="Standard">
      <style:paragraph-properties fo:margin-left="-0.009cm" fo:margin-right="0.062cm" fo:margin-top="0cm" fo:margin-bottom="0.092cm" style:contextual-spacing="false" fo:line-height="100%" fo:text-indent="-0.018cm" style:auto-text-indent="false"/>
      <style:text-properties officeooo:rsid="006429d6" officeooo:paragraph-rsid="006429d6"/>
    </style:style>
    <style:style style:name="T1" style:family="text">
      <style:text-properties officeooo:rsid="0027ef11"/>
    </style:style>
    <style:style style:name="T2" style:family="text">
      <style:text-properties fo:color="#365f91" loext:opacity="100%" fo:font-size="30pt" fo:language="en" fo:country="GB" style:font-size-asian="30pt"/>
    </style:style>
    <style:style style:name="T3" style:family="text">
      <style:text-properties fo:language="en" fo:country="GB"/>
    </style:style>
    <style:style style:name="T4" style:family="text">
      <style:text-properties fo:language="en" fo:country="GB" officeooo:rsid="0003816f"/>
    </style:style>
    <style:style style:name="T5" style:family="text">
      <style:text-properties fo:language="en" fo:country="GB" officeooo:rsid="004db866"/>
    </style:style>
    <style:style style:name="T6" style:family="text">
      <style:text-properties fo:language="en" fo:country="GB" officeooo:rsid="005bf0dd"/>
    </style:style>
    <style:style style:name="T7" style:family="text">
      <style:text-properties fo:color="#000000" loext:opacity="100%" style:font-name="Times New Roman" fo:font-size="11pt" fo:language="en" fo:country="GB" style:letter-kerning="false" style:font-name-asian="Times New Roman1" style:font-size-asian="11pt" style:language-asian="en" style:country-asian="IN" style:font-name-complex="Times New Roman1" style:font-size-complex="11pt" style:language-complex="ar" style:country-complex="SA"/>
    </style:style>
    <style:style style:name="T8" style:family="text">
      <style:text-properties fo:color="#000000" loext:opacity="100%" style:font-name="Courier New" fo:font-size="11pt" fo:language="en" fo:country="GB" style:letter-kerning="false" style:font-name-asian="Courier New1" style:font-size-asian="11pt" style:language-asian="en" style:country-asian="IN" style:font-name-complex="Courier New1" style:font-size-complex="11pt" style:language-complex="ar" style:country-complex="SA"/>
    </style:style>
    <style:style style:name="T9" style:family="text">
      <style:text-properties style:font-name="Times New Roman" fo:language="en" fo:country="GB" style:font-name-asian="Times New Roman1" style:font-name-complex="Times New Roman1"/>
    </style:style>
    <style:style style:name="T10" style:family="text">
      <style:text-properties style:font-name="Times New Roman" fo:language="en" fo:country="GB" officeooo:rsid="001f292a" style:font-name-asian="Times New Roman1" style:font-name-complex="Times New Roman1"/>
    </style:style>
    <style:style style:name="T11" style:family="text">
      <style:text-properties style:font-name="Times New Roman" fo:language="en" fo:country="GB" officeooo:rsid="0003816f" style:font-name-asian="Times New Roman1" style:font-name-complex="Times New Roman1"/>
    </style:style>
    <style:style style:name="T12" style:family="text">
      <style:text-properties style:font-name="Times New Roman" fo:language="en" fo:country="GB" officeooo:rsid="00216f05" style:font-name-asian="Times New Roman1" style:font-name-complex="Times New Roman1"/>
    </style:style>
    <style:style style:name="T13" style:family="text">
      <style:text-properties style:font-name="Times New Roman" fo:language="en" fo:country="GB" officeooo:rsid="003dccc4" style:font-name-asian="Times New Roman1" style:font-name-complex="Times New Roman1"/>
    </style:style>
    <style:style style:name="T14" style:family="text">
      <style:text-properties style:font-name="Times New Roman" fo:language="en" fo:country="GB" officeooo:rsid="003f73b2" style:font-name-asian="Times New Roman1" style:font-name-complex="Times New Roman1"/>
    </style:style>
    <style:style style:name="T15" style:family="text">
      <style:text-properties style:font-name="Times New Roman" fo:language="en" fo:country="GB" officeooo:rsid="00411e7d" style:font-name-asian="Times New Roman1" style:font-name-complex="Times New Roman1"/>
    </style:style>
    <style:style style:name="T16" style:family="text">
      <style:text-properties style:font-name="Times New Roman" fo:language="en" fo:country="GB" officeooo:rsid="0045afe7" style:font-name-asian="Times New Roman1" style:font-name-complex="Times New Roman1"/>
    </style:style>
    <style:style style:name="T17" style:family="text">
      <style:text-properties style:font-name="Times New Roman" fo:language="en" fo:country="GB" officeooo:rsid="005da05e" style:font-name-asian="Times New Roman1" style:font-name-complex="Times New Roman1"/>
    </style:style>
    <style:style style:name="T18" style:family="text">
      <style:text-properties style:font-name="Times New Roman" fo:language="en" fo:country="GB" officeooo:rsid="006135f5" style:font-name-asian="Times New Roman1" style:font-name-complex="Times New Roman1"/>
    </style:style>
    <style:style style:name="T19" style:family="text">
      <style:text-properties style:font-name="Times New Roman" fo:language="en" fo:country="GB" style:font-name-asian="Times New Roman1" style:language-asian="en" style:country-asian="IN" style:font-name-complex="Times New Roman1" style:language-complex="ar" style:country-complex="SA"/>
    </style:style>
    <style:style style:name="T20" style:family="text">
      <style:text-properties style:font-name="Times New Roman" fo:language="en" fo:country="GB" officeooo:rsid="0063b9b9" style:font-name-asian="Times New Roman1" style:language-asian="en" style:country-asian="IN" style:font-name-complex="Times New Roman1" style:language-complex="ar" style:country-complex="SA"/>
    </style:style>
    <style:style style:name="T21" style:family="text">
      <style:text-properties style:font-name="Times New Roman" fo:language="en" fo:country="GB" fo:font-weight="bold" style:font-name-asian="Times New Roman1" style:font-weight-asian="bold" style:font-name-complex="Times New Roman1"/>
    </style:style>
    <style:style style:name="T22" style:family="text">
      <style:text-properties style:font-name="Times New Roman" fo:font-size="12pt" fo:language="en" fo:country="GB" style:font-name-asian="Times New Roman1" style:font-size-asian="12pt" style:font-name-complex="Times New Roman1"/>
    </style:style>
    <style:style style:name="T23" style:family="text">
      <style:text-properties style:font-name="Times New Roman" fo:font-size="11pt" fo:language="en" fo:country="GB" fo:font-weight="bold" style:letter-kerning="false" style:font-name-asian="Times New Roman1" style:font-size-asian="11pt" style:language-asian="en" style:country-asian="IN" style:font-weight-asian="bold" style:font-name-complex="Times New Roman1" style:font-size-complex="11pt" style:language-complex="ar" style:country-complex="SA" style:font-weight-complex="bold"/>
    </style:style>
    <style:style style:name="T24" style:family="text">
      <style:text-properties style:font-name="Times New Roman" fo:font-size="11pt" fo:language="en" fo:country="GB" style:letter-kerning="false" style:font-name-asian="Times New Roman1" style:font-size-asian="11pt" style:language-asian="en" style:country-asian="IN" style:font-name-complex="Times New Roman1" style:font-size-complex="11pt" style:language-complex="ar" style:country-complex="SA"/>
    </style:style>
    <style:style style:name="T25" style:family="text">
      <style:text-properties style:font-name="Courier New" fo:language="en" fo:country="GB" style:font-name-asian="Courier New1" style:font-name-complex="Courier New1"/>
    </style:style>
    <style:style style:name="T26" style:family="text">
      <style:text-properties style:font-name="Courier New" fo:language="en" fo:country="GB" officeooo:rsid="00240b95" style:font-name-asian="Courier New1" style:font-name-complex="Courier New1"/>
    </style:style>
    <style:style style:name="T27" style:family="text">
      <style:text-properties style:font-name="Courier New" fo:language="en" fo:country="GB" officeooo:rsid="0003816f" style:font-name-asian="Courier New1" style:font-name-complex="Courier New1"/>
    </style:style>
    <style:style style:name="T28" style:family="text">
      <style:text-properties style:font-name="Courier New" fo:language="en" fo:country="GB" officeooo:rsid="000a64e5" style:font-name-asian="Courier New1" style:font-name-complex="Courier New1"/>
    </style:style>
    <style:style style:name="T29" style:family="text">
      <style:text-properties style:font-name="Courier New" fo:language="en" fo:country="GB" officeooo:rsid="000b9fd7" style:font-name-asian="Courier New1" style:font-name-complex="Courier New1"/>
    </style:style>
    <style:style style:name="T30" style:family="text">
      <style:text-properties style:font-name="Courier New" fo:language="en" fo:country="GB" officeooo:rsid="0010fba0" style:font-name-asian="Courier New1" style:font-name-complex="Courier New1"/>
    </style:style>
    <style:style style:name="T31" style:family="text">
      <style:text-properties style:font-name="Courier New" fo:language="en" fo:country="GB" officeooo:rsid="00131c8d" style:font-name-asian="Courier New1" style:font-name-complex="Courier New1"/>
    </style:style>
    <style:style style:name="T32" style:family="text">
      <style:text-properties style:font-name="Courier New" fo:language="en" fo:country="GB" officeooo:rsid="0014ea17" style:font-name-asian="Courier New1" style:font-name-complex="Courier New1"/>
    </style:style>
    <style:style style:name="T33" style:family="text">
      <style:text-properties style:font-name="Courier New" fo:language="en" fo:country="GB" officeooo:rsid="00150b9c" style:font-name-asian="Courier New1" style:font-name-complex="Courier New1"/>
    </style:style>
    <style:style style:name="T34" style:family="text">
      <style:text-properties style:font-name="Courier New" fo:language="en" fo:country="GB" officeooo:rsid="00216f05" style:font-name-asian="Courier New1" style:font-name-complex="Courier New1"/>
    </style:style>
    <style:style style:name="T35" style:family="text">
      <style:text-properties style:font-name="Courier New" fo:language="en" fo:country="GB" officeooo:rsid="0026df6d" style:font-name-asian="Courier New1" style:font-name-complex="Courier New1"/>
    </style:style>
    <style:style style:name="T36" style:family="text">
      <style:text-properties style:font-name="Courier New" fo:language="en" fo:country="GB" fo:font-weight="bold" style:font-name-asian="Courier New1" style:font-weight-asian="bold" style:font-name-complex="Courier New1"/>
    </style:style>
    <style:style style:name="T37" style:family="text">
      <style:text-properties style:font-name="Courier New" fo:font-size="10pt" fo:language="en" fo:country="GB" style:font-name-asian="Courier New1" style:font-size-asian="10pt" style:font-name-complex="Courier New1"/>
    </style:style>
    <style:style style:name="T38" style:family="text">
      <style:text-properties style:text-position="super 58%" style:font-name="Times New Roman" fo:font-size="10pt" fo:language="en" fo:country="GB" style:font-name-asian="Times New Roman1" style:font-size-asian="10pt" style:font-name-complex="Times New Roman1"/>
    </style:style>
    <style:style style:name="T39" style:family="text">
      <style:text-properties fo:font-size="15pt" fo:language="en" fo:country="GB" style:font-size-asian="15pt"/>
    </style:style>
    <style:style style:name="T40" style:family="text">
      <style:text-properties fo:font-size="12pt" fo:language="en" fo:country="GB" style:font-size-asian="12pt"/>
    </style:style>
    <style:style style:name="T41" style:family="text">
      <style:text-properties officeooo:rsid="001f292a"/>
    </style:style>
    <style:style style:name="T42" style:family="text">
      <style:text-properties officeooo:rsid="0026bbce"/>
    </style:style>
    <style:style style:name="T43" style:family="text">
      <style:text-properties officeooo:rsid="0027c92d"/>
    </style:style>
    <style:style style:name="T44" style:family="text">
      <style:text-properties fo:font-weight="bold" style:font-weight-asian="bold" style:font-weight-complex="bold"/>
    </style:style>
    <style:style style:name="T45" style:family="text">
      <style:text-properties fo:font-size="11pt" fo:language="en" fo:country="IN" style:letter-kerning="false" style:font-size-asian="11pt" style:language-asian="en" style:country-asian="IN" style:font-size-complex="11pt" style:language-complex="ar" style:country-complex="SA"/>
    </style:style>
    <style:style style:name="T46" style:family="text">
      <style:text-properties officeooo:rsid="001b33a4"/>
    </style:style>
    <style:style style:name="T47" style:family="text">
      <style:text-properties officeooo:rsid="001e71e1"/>
    </style:style>
    <style:style style:name="T48" style:family="text">
      <style:text-properties officeooo:rsid="002040ba"/>
    </style:style>
    <style:style style:name="T49" style:family="text">
      <style:text-properties officeooo:rsid="00428f78"/>
    </style:style>
    <style:style style:name="T50" style:family="text">
      <style:text-properties officeooo:rsid="004b02b1"/>
    </style:style>
    <style:style style:name="T51" style:family="text">
      <style:text-properties officeooo:rsid="0058c28d"/>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128" loext:marker-style-name="T3"><text:span text:style-name="T2">Notes on C</text:span></text:p>
      <text:p text:style-name="P129" loext:marker-style-name="T3"/>
      <text:p text:style-name="P41"><draw:frame draw:style-name="fr4" draw:name="Picture 7" text:anchor-type="char" svg:x="2.88cm" svg:y="0.526cm" svg:width="10.16cm" svg:height="15.24cm" draw:z-index="3"><draw:image xlink:href="Pictures/100000000000036F00000526AD82A235.jpg" xlink:type="simple" xlink:show="embed" xlink:actuate="onLoad" draw:mime-type="image/jpeg"/></draw:frame></text:p>
      <text:p text:style-name="P40"/>
      <text:p text:style-name="P41"/>
      <text:p text:style-name="P41"/>
      <text:p text:style-name="P41"/>
      <text:p text:style-name="P41"/>
      <text:p text:style-name="P41"/>
      <text:p text:style-name="P41"/>
      <text:p text:style-name="P41"/>
      <text:p text:style-name="P41"/>
      <text:p text:style-name="P41"/>
      <text:table-of-content text:style-name="Sect1" text:protected="true" text:name="Table of Contents1">
        <text:table-of-content-source text:outline-level="1" text:use-index-marks="false">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Content</text:p>
          </text:index-title>
          <text:p text:style-name="P73"><text:a xlink:type="simple" xlink:href="#__RefHeading___Toc2140_1327778131" text:style-name="Index_20_Link" text:visited-style-name="Index_20_Link">1. Pointer and memory<text:tab/>5</text:a></text:p>
          <text:p text:style-name="P73"><text:a xlink:type="simple" xlink:href="#__RefHeading___Toc2142_1327778131" text:style-name="Index_20_Link" text:visited-style-name="Index_20_Link">2. Variadic functions<text:tab/>5</text:a></text:p>
          <text:p text:style-name="P73"><text:a xlink:type="simple" xlink:href="#__RefHeading___Toc2144_1327778131" text:style-name="Index_20_Link" text:visited-style-name="Index_20_Link">3. Pointers and Local variables in functions<text:tab/>8</text:a></text:p>
          <text:p text:style-name="P73"><text:a xlink:type="simple" xlink:href="#__RefHeading___Toc2146_1327778131" text:style-name="Index_20_Link" text:visited-style-name="Index_20_Link">4. Ternary operator<text:tab/>10</text:a></text:p>
          <text:p text:style-name="P73"><text:a xlink:type="simple" xlink:href="#__RefHeading___Toc2148_1327778131" text:style-name="Index_20_Link" text:visited-style-name="Index_20_Link">5. Terminating a program using exit() while inside a function without return type<text:tab/>11</text:a></text:p>
          <text:p text:style-name="P73"><text:a xlink:type="simple" xlink:href="#__RefHeading___Toc2150_1327778131" text:style-name="Index_20_Link" text:visited-style-name="Index_20_Link">6. Structure Packing and Padding<text:tab/>11</text:a></text:p>
          <text:p text:style-name="P73"><text:a xlink:type="simple" xlink:href="#__RefHeading___Toc3977_460557994" text:style-name="Index_20_Link" text:visited-style-name="Index_20_Link">7. Arguments and Options<text:tab/>12</text:a></text:p>
          <text:p text:style-name="P73"><text:a xlink:type="simple" xlink:href="#__RefHeading___Toc2154_1327778131" text:style-name="Index_20_Link" text:visited-style-name="Index_20_Link">8. Memory Mapping an SFR<text:tab/>15</text:a></text:p>
          <text:p text:style-name="P73"><text:a xlink:type="simple" xlink:href="#__RefHeading___Toc2156_1327778131" text:style-name="Index_20_Link" text:visited-style-name="Index_20_Link">9. Convert Hexadecimal to Binary<text:tab/>15</text:a></text:p>
          <text:p text:style-name="P73"><text:a xlink:type="simple" xlink:href="#__RefHeading___Toc2158_1327778131" text:style-name="Index_20_Link" text:visited-style-name="Index_20_Link">10. <text:s/>Convert Byte to Binary<text:tab/>16</text:a></text:p>
          <text:p text:style-name="P73"><text:a xlink:type="simple" xlink:href="#__RefHeading___Toc2160_1327778131" text:style-name="Index_20_Link" text:visited-style-name="Index_20_Link">11. <text:s/>How does free() know the size of memory to be deallocated?<text:tab/>17</text:a></text:p>
          <text:p text:style-name="P73"><text:a xlink:type="simple" xlink:href="#__RefHeading___Toc2162_1327778131" text:style-name="Index_20_Link" text:visited-style-name="Index_20_Link">12. <text:s/>Setter and Getter Functions<text:tab/>17</text:a></text:p>
          <text:p text:style-name="P73"><text:a xlink:type="simple" xlink:href="#__RefHeading___Toc2164_1327778131" text:style-name="Index_20_Link" text:visited-style-name="Index_20_Link">13. <text:s/>Interrupt Handling in Microcontroller<text:tab/>17</text:a></text:p>
          <text:p text:style-name="P73"><text:a xlink:type="simple" xlink:href="#__RefHeading___Toc2166_1327778131" text:style-name="Index_20_Link" text:visited-style-name="Index_20_Link">14. <text:s/>Bit rate vs Baud rate<text:tab/>17</text:a></text:p>
          <text:p text:style-name="P73"><text:a xlink:type="simple" xlink:href="#__RefHeading___Toc2168_1327778131" text:style-name="Index_20_Link" text:visited-style-name="Index_20_Link">15. <text:s/>Static vs Global variables<text:tab/>18</text:a></text:p>
          <text:p text:style-name="P73"><text:a xlink:type="simple" xlink:href="#__RefHeading___Toc2170_1327778131" text:style-name="Index_20_Link" text:visited-style-name="Index_20_Link">16. <text:s/>memset() function<text:tab/>19</text:a></text:p>
          <text:p text:style-name="P73"><text:a xlink:type="simple" xlink:href="#__RefHeading___Toc2172_1327778131" text:style-name="Index_20_Link" text:visited-style-name="Index_20_Link">17. <text:s/>Dangling pointer<text:tab/>22</text:a></text:p>
          <text:p text:style-name="P73"><text:a xlink:type="simple" xlink:href="#__RefHeading___Toc2174_1327778131" text:style-name="Index_20_Link" text:visited-style-name="Index_20_Link">18. <text:s/>Void pointer<text:tab/>22</text:a></text:p>
          <text:p text:style-name="P73"><text:a xlink:type="simple" xlink:href="#__RefHeading___Toc2176_1327778131" text:style-name="Index_20_Link" text:visited-style-name="Index_20_Link">19. <text:s/>NULL Pointer<text:tab/>23</text:a></text:p>
          <text:p text:style-name="P73"><text:a xlink:type="simple" xlink:href="#__RefHeading___Toc2178_1327778131" text:style-name="Index_20_Link" text:visited-style-name="Index_20_Link">20. <text:s/>Wild pointer<text:tab/>24</text:a></text:p>
          <text:p text:style-name="P73"><text:a xlink:type="simple" xlink:href="#__RefHeading___Toc2180_1327778131" text:style-name="Index_20_Link" text:visited-style-name="Index_20_Link">21. <text:s/>Double Pointer (Pointer to Pointer)<text:tab/>24</text:a></text:p>
          <text:p text:style-name="P73"><text:a xlink:type="simple" xlink:href="#__RefHeading___Toc2182_1327778131" text:style-name="Index_20_Link" text:visited-style-name="Index_20_Link">22. <text:s/>Call by value function<text:tab/>27</text:a></text:p>
          <text:p text:style-name="P73"><text:a xlink:type="simple" xlink:href="#__RefHeading___Toc2184_1327778131" text:style-name="Index_20_Link" text:visited-style-name="Index_20_Link">23. <text:s/>volatile and const volatile keyword<text:tab/>29</text:a></text:p>
          <text:p text:style-name="P73"><text:a xlink:type="simple" xlink:href="#__RefHeading___Toc2186_1327778131" text:style-name="Index_20_Link" text:visited-style-name="Index_20_Link">24. <text:s/>static extern is invalid<text:tab/>29</text:a></text:p>
          <text:p text:style-name="P73"><text:a xlink:type="simple" xlink:href="#__RefHeading___Toc2188_1327778131" text:style-name="Index_20_Link" text:visited-style-name="Index_20_Link">25. <text:s/>inline Function<text:tab/>30</text:a></text:p>
          <text:p text:style-name="P73"><text:a xlink:type="simple" xlink:href="#__RefHeading___Toc2190_1327778131" text:style-name="Index_20_Link" text:visited-style-name="Index_20_Link">26. <text:s/>Storage class<text:tab/>31</text:a></text:p>
          <text:p text:style-name="P73"><text:a xlink:type="simple" xlink:href="#__RefHeading___Toc2192_1327778131" text:style-name="Index_20_Link" text:visited-style-name="Index_20_Link">27. <text:s/>Structure declaration and definition<text:tab/>35</text:a></text:p>
          <text:p text:style-name="P73"><text:a xlink:type="simple" xlink:href="#__RefHeading___Toc2194_1327778131" text:style-name="Index_20_Link" text:visited-style-name="Index_20_Link">28. <text:s/>typedef and struct<text:tab/>36</text:a></text:p>
          <text:p text:style-name="P73"><text:a xlink:type="simple" xlink:href="#__RefHeading___Toc2196_1327778131" text:style-name="Index_20_Link" text:visited-style-name="Index_20_Link">29. <text:s/>Passing structure to function<text:tab/>36</text:a></text:p>
          <text:p text:style-name="P73"><text:a xlink:type="simple" xlink:href="#__RefHeading___Toc2198_1327778131" text:style-name="Index_20_Link" text:visited-style-name="Index_20_Link">30. <text:s/>Static Function<text:tab/>40</text:a></text:p>
          <text:p text:style-name="P73"><text:a xlink:type="simple" xlink:href="#__RefHeading___Toc2200_1327778131" text:style-name="Index_20_Link" text:visited-style-name="Index_20_Link">31. <text:s/>Type casting<text:tab/>41</text:a></text:p>
          <text:p text:style-name="P73"><text:a xlink:type="simple" xlink:href="#__RefHeading___Toc2202_1327778131" text:style-name="Index_20_Link" text:visited-style-name="Index_20_Link">32. <text:s/>Integer Promotion<text:tab/>42</text:a></text:p>
          <text:p text:style-name="P73"><text:a xlink:type="simple" xlink:href="#__RefHeading___Toc2204_1327778131" text:style-name="Index_20_Link" text:visited-style-name="Index_20_Link"><text:soft-page-break/>33. <text:s/>Dynamic Memory Allocation<text:tab/>43</text:a></text:p>
          <text:p text:style-name="P73"><text:a xlink:type="simple" xlink:href="#__RefHeading___Toc2206_1327778131" text:style-name="Index_20_Link" text:visited-style-name="Index_20_Link">34. <text:s/>Union<text:tab/>49</text:a></text:p>
          <text:p text:style-name="P73"><text:a xlink:type="simple" xlink:href="#__RefHeading___Toc2208_1327778131" text:style-name="Index_20_Link" text:visited-style-name="Index_20_Link">35. <text:s/>Linked List<text:tab/>53</text:a></text:p>
          <text:p text:style-name="P73"><text:a xlink:type="simple" xlink:href="#__RefHeading___Toc2210_1327778131" text:style-name="Index_20_Link" text:visited-style-name="Index_20_Link">36. <text:s/>Splitting a string using strtok()<text:tab/>58</text:a></text:p>
          <text:p text:style-name="P73"><text:a xlink:type="simple" xlink:href="#__RefHeading___Toc2212_1327778131" text:style-name="Index_20_Link" text:visited-style-name="Index_20_Link">37. <text:s/>Pointer to Structure<text:tab/>59</text:a></text:p>
          <text:p text:style-name="P73"><text:a xlink:type="simple" xlink:href="#__RefHeading___Toc2214_1327778131" text:style-name="Index_20_Link" text:visited-style-name="Index_20_Link">38. <text:s/>Easy way to find the number of elements in an array<text:tab/>59</text:a></text:p>
          <text:p text:style-name="P73"><text:a xlink:type="simple" xlink:href="#__RefHeading___Toc2216_1327778131" text:style-name="Index_20_Link" text:visited-style-name="Index_20_Link">39. <text:s/>Function Pointers<text:tab/>59</text:a></text:p>
          <text:p text:style-name="P73"><text:a xlink:type="simple" xlink:href="#__RefHeading___Toc2218_1327778131" text:style-name="Index_20_Link" text:visited-style-name="Index_20_Link">40. <text:s/>Call back function using function pointer – Example<text:tab/>66</text:a></text:p>
          <text:p text:style-name="P73"><text:a xlink:type="simple" xlink:href="#__RefHeading___Toc2220_1327778131" text:style-name="Index_20_Link" text:visited-style-name="Index_20_Link">41. <text:s/>Function pointer without a name in C<text:tab/>67</text:a></text:p>
          <text:p text:style-name="P73"><text:a xlink:type="simple" xlink:href="#__RefHeading___Toc2222_1327778131" text:style-name="Index_20_Link" text:visited-style-name="Index_20_Link">42. <text:s/>C program to check Endianness<text:tab/>68</text:a></text:p>
          <text:p text:style-name="P73"><text:a xlink:type="simple" xlink:href="#__RefHeading___Toc2224_1327778131" text:style-name="Index_20_Link" text:visited-style-name="Index_20_Link">43. <text:s/>Initializing multi-dimensional array pointer<text:tab/>69</text:a></text:p>
          <text:p text:style-name="P73"><text:a xlink:type="simple" xlink:href="#__RefHeading___Toc2228_1327778131" text:style-name="Index_20_Link" text:visited-style-name="Index_20_Link">44. <text:s/>Bit-Shift and Bitwise operators<text:tab/>69</text:a></text:p>
          <text:p text:style-name="P73"><text:a xlink:type="simple" xlink:href="#__RefHeading___Toc2230_1327778131" text:style-name="Index_20_Link" text:visited-style-name="Index_20_Link">45. <text:s/>Pointer Arithmetic<text:tab/>70</text:a></text:p>
          <text:p text:style-name="P73"><text:a xlink:type="simple" xlink:href="#__RefHeading___Toc2232_1327778131" text:style-name="Index_20_Link" text:visited-style-name="Index_20_Link">46. <text:s/>enum<text:tab/>71</text:a></text:p>
          <text:p text:style-name="P73"><text:a xlink:type="simple" xlink:href="#__RefHeading___Toc2234_1327778131" text:style-name="Index_20_Link" text:visited-style-name="Index_20_Link">47. <text:s/>Bit Fields<text:tab/>74</text:a></text:p>
          <text:p text:style-name="P73"><text:a xlink:type="simple" xlink:href="#__RefHeading___Toc2236_1327778131" text:style-name="Index_20_Link" text:visited-style-name="Index_20_Link">48. <text:s/>Assigning Pointer address manually<text:tab/>76</text:a></text:p>
          <text:p text:style-name="P73"><text:a xlink:type="simple" xlink:href="#__RefHeading___Toc2238_1327778131" text:style-name="Index_20_Link" text:visited-style-name="Index_20_Link">49. <text:s/>Format Specifiers<text:tab/>77</text:a></text:p>
          <text:p text:style-name="P73"><text:a xlink:type="simple" xlink:href="#__RefHeading___Toc2240_1327778131" text:style-name="Index_20_Link" text:visited-style-name="Index_20_Link">50. <text:s/>Bootloader, Bootstrap Loader and Start-up Code<text:tab/>78</text:a></text:p>
          <text:p text:style-name="P73"><text:a xlink:type="simple" xlink:href="#__RefHeading___Toc2242_1327778131" text:style-name="Index_20_Link" text:visited-style-name="Index_20_Link">51. <text:s/>Header Include Guard<text:tab/>78</text:a></text:p>
          <text:p text:style-name="P73"><text:a xlink:type="simple" xlink:href="#__RefHeading___Toc2244_1327778131" text:style-name="Index_20_Link" text:visited-style-name="Index_20_Link">52. <text:s/>Memory Layout in C<text:tab/>82</text:a></text:p>
          <text:p text:style-name="P73"><text:a xlink:type="simple" xlink:href="#__RefHeading___Toc2246_1327778131" text:style-name="Index_20_Link" text:visited-style-name="Index_20_Link">53. <text:s/>Passing an array to a function<text:tab/>92</text:a></text:p>
          <text:p text:style-name="P73"><text:a xlink:type="simple" xlink:href="#__RefHeading___Toc2248_1327778131" text:style-name="Index_20_Link" text:visited-style-name="Index_20_Link">54. <text:s/>Normal declaration of array of pointers vs. array allocated with malloc()<text:tab/>93</text:a></text:p>
          <text:p text:style-name="P73"><text:a xlink:type="simple" xlink:href="#__RefHeading___Toc2261_1327778131" text:style-name="Index_20_Link" text:visited-style-name="Index_20_Link">55. <text:s/>Token-pasting operator (##)<text:tab/>94</text:a></text:p>
          <text:p text:style-name="P73"><text:a xlink:type="simple" xlink:href="#__RefHeading___Toc2271_1327778131" text:style-name="Index_20_Link" text:visited-style-name="Index_20_Link">56. <text:s/>Macro with variable arguments<text:tab/>97</text:a></text:p>
          <text:p text:style-name="P73"><text:a xlink:type="simple" xlink:href="#__RefHeading___Toc2273_1327778131" text:style-name="Index_20_Link" text:visited-style-name="Index_20_Link">57. <text:s/>Stringizing operator (#)<text:tab/>98</text:a></text:p>
          <text:p text:style-name="P73"><text:a xlink:type="simple" xlink:href="#__RefHeading___Toc2256_1327778131" text:style-name="Index_20_Link" text:visited-style-name="Index_20_Link">58. <text:s/>Both Stringize and the Token-pasting operators in a single macro<text:tab/>99</text:a></text:p>
          <text:p text:style-name="P73"><text:a xlink:type="simple" xlink:href="#__RefHeading___Toc3901_3692198669" text:style-name="Index_20_Link" text:visited-style-name="Index_20_Link">59. Const and Pointer<text:tab/>99</text:a></text:p>
          <text:p text:style-name="P73"><text:a xlink:type="simple" xlink:href="#__RefHeading___Toc3901_3692198669_Copy_1" text:style-name="Index_20_Link" text:visited-style-name="Index_20_Link">60. Swapping without using Third variable<text:tab/>100</text:a></text:p>
          <text:p text:style-name="P73"><text:a xlink:type="simple" xlink:href="#__RefHeading___Toc3901_3692198669_Copy_2" text:style-name="Index_20_Link" text:visited-style-name="Index_20_Link">61. Swapping using Bitwise operator<text:tab/>100</text:a></text:p>
          <text:p text:style-name="P73"><text:a xlink:type="simple" xlink:href="#__RefHeading___Toc3901_3692198669_Copy_3" text:style-name="Index_20_Link" text:visited-style-name="Index_20_Link">62. Application of union<text:tab/>100</text:a></text:p>
          <text:p text:style-name="P73"><text:a xlink:type="simple" xlink:href="#__RefHeading___Toc3901_3692198669_Copy_4" text:style-name="Index_20_Link" text:visited-style-name="Index_20_Link">63. Acesss a variable in another file without making it global<text:tab/>101</text:a></text:p>
          <text:p text:style-name="P73"><text:a xlink:type="simple" xlink:href="#__RefHeading___Toc4154_2971701815" text:style-name="Index_20_Link" text:visited-style-name="Index_20_Link">64. Reversing of register<text:tab/>102</text:a></text:p>
          <text:p text:style-name="P73"><text:a xlink:type="simple" xlink:href="#__RefHeading___Toc4154_2971701815%20Copy%201" text:style-name="Index_20_Link" text:visited-style-name="Index_20_Link">65. scanf() to read until new line<text:tab/>104</text:a></text:p>
          <text:p text:style-name="P73"><text:a xlink:type="simple" xlink:href="#__RefHeading___Toc4154_2971701815%20Copy%201%20Copy%201" text:style-name="Index_20_Link" text:visited-style-name="Index_20_Link"><text:soft-page-break/>66. Fall-through<text:tab/>104</text:a></text:p>
          <text:p text:style-name="P73"><text:a xlink:type="simple" xlink:href="#__RefHeading___Toc4154_2971701815%20Copy%201%20Copy%201%20Copy%201" text:style-name="Index_20_Link" text:visited-style-name="Index_20_Link">67. Driver library<text:tab/>105</text:a></text:p>
          <text:p text:style-name="P73"><text:a xlink:type="simple" xlink:href="#__RefHeading___Toc4154_2971701815%20Copy%201%20Copy%201%20Copy%201%20Copy%201" text:style-name="Index_20_Link" text:visited-style-name="Index_20_Link">68. Number of bits to convert integer a to integer b<text:tab/>106</text:a></text:p>
        </text:index-body>
      </text:table-of-content>
      <text:h text:style-name="P74" text:outline-level="1" loext:marker-style-name="T3"/>
      <text:list text:style-name="WWNum9">
        <text:list-item>
          <text:h text:style-name="P76" text:outline-level="1" loext:marker-style-name="T3"><text:bookmark-start text:name="_Toc195978849"/><text:bookmark-start text:name="__RefHeading___Toc2140_1327778131"/><text:span text:style-name="T3">Point</text:span><text:bookmark-end text:name="_Toc195978849"/><text:span text:style-name="T4">er and memory</text:span><text:bookmark-end text:name="__RefHeading___Toc2140_1327778131"/></text:h>
        </text:list-item>
      </text:list>
      <text:p text:style-name="P8">{</text:p>
      <text:p text:style-name="P8"><text:tab/>int a = 30;</text:p>
      <text:p text:style-name="P8"><text:tab/>int *b =&amp;a;</text:p>
      <text:p text:style-name="P8">}</text:p>
      <text:p text:style-name="P133" loext:marker-style-name="T3">All variables are stored on stack.</text:p>
      <text:p text:style-name="P9">int *c = 42;</text:p>
      <text:p text:style-name="P55"><text:span text:style-name="T27">c </text:span><text:span text:style-name="T9">on stack and </text:span><text:span text:style-name="T27">42 </text:span><text:span text:style-name="T9">on </text:span><text:span text:style-name="T14">i</text:span><text:span text:style-name="T13">nitialised </text:span><text:span text:style-name="T15">data</text:span><text:span text:style-name="T13"> segment</text:span><text:span text:style-name="T9">.</text:span></text:p>
      <text:p text:style-name="P56"><text:span text:style-name="T11">The heap is only used when you explicitly request memory at runtime using functions like</text:span><text:span text:style-name="T27"> malloc()</text:span><text:span text:style-name="T11">,</text:span><text:span text:style-name="T27"> calloc()</text:span><text:span text:style-name="T11">,</text:span><text:span text:style-name="T27"> </text:span><text:span text:style-name="T11">or</text:span><text:span text:style-name="T27"> realloc()</text:span><text:span text:style-name="T11">. Since you didn't use those here, everything stays on the stack.</text:span></text:p>
      <text:p text:style-name="P8">{</text:p>
      <text:p text:style-name="P8">int *p = malloc(sizeof(int));</text:p>
      <text:p text:style-name="P8">*p = 78;</text:p>
      <text:p text:style-name="P8">}</text:p>
      <text:p text:style-name="P8">printf("%d", *p);</text:p>
      <text:p text:style-name="P56"><text:span text:style-name="T11">While the pointer variable (the address) dies at the end of the block, the memory it pointed to stays allocated. Without the pointer, you no longer have the "map" to find that memory to use it or free it. </text:span><text:span text:style-name="T34">p</text:span><text:span text:style-name="T12"> is stored on stack. But the memory it points to is on heap.</text:span></text:p>
      <text:p text:style-name="P44"/>
      <text:list text:continue-numbering="true" text:style-name="WWNum9">
        <text:list-item>
          <text:h text:style-name="P77" text:outline-level="1" loext:marker-style-name="T3"><text:bookmark-start text:name="_Toc195978850"/><text:bookmark-start text:name="__RefHeading___Toc2142_1327778131"/><text:span text:style-name="T3">Variadic functions</text:span><text:bookmark-end text:name="_Toc195978850"/><text:bookmark-end text:name="__RefHeading___Toc2142_1327778131"/></text:h>
        </text:list-item>
      </text:list>
      <text:p text:style-name="P137" loext:marker-style-name="T3"><text:span text:style-name="T9">Variadic functions are functions that accept variable number of arguments. The type of the parameters is assumed beforehand and is hard coded. Below are two examples of the same.</text:span></text:p>
      <text:p text:style-name="P138" loext:marker-style-name="T3"><text:span text:style-name="T9">Example 1</text:span></text:p>
      <text:p text:style-name="P227" loext:marker-style-name="T3">#include &lt;stdarg.h&gt;</text:p>
      <text:p text:style-name="P227" loext:marker-style-name="T3">#include &lt;stdio.h&gt;</text:p>
      <text:p text:style-name="P236" loext:marker-style-name="T3"><text:span text:style-name="T25">double average(int count, ...)</text:span></text:p>
      <text:p text:style-name="P237" loext:marker-style-name="T3"><text:span text:style-name="T25">{</text:span></text:p>
      <text:p text:style-name="P255" loext:marker-style-name="T3"><text:span text:style-name="T25">va_list ap;</text:span></text:p>
      <text:p text:style-name="P255" loext:marker-style-name="T3"><text:span text:style-name="T25">int j;</text:span></text:p>
      <text:p text:style-name="P7"><text:soft-page-break/>double sum = 0;</text:p>
      <text:p text:style-name="P255" loext:marker-style-name="T3"><text:span text:style-name="T25">va_start(ap, count); /* Requires the last fixed parameter (to get the address) */</text:span></text:p>
      <text:p text:style-name="P7" loext:marker-style-name="T3">for (j = 0; j &lt; count; j++)</text:p>
      <text:p text:style-name="P7" loext:marker-style-name="T3">{</text:p>
      <text:p text:style-name="P7" loext:marker-style-name="T3">sum += va_arg(ap, int); /* Increments ap to the next </text:p>
      <text:p text:style-name="P7" loext:marker-style-name="T3">argument. */</text:p>
      <text:p text:style-name="P7" loext:marker-style-name="T3">}</text:p>
      <text:p text:style-name="P7" loext:marker-style-name="T3">va_end(ap);</text:p>
      <text:p text:style-name="P7" loext:marker-style-name="T3">return(sum / count);</text:p>
      <text:p text:style-name="P256" loext:marker-style-name="T3"><text:span text:style-name="T25">}</text:span></text:p>
      <text:p text:style-name="P262" loext:marker-style-name="T3"><text:span text:style-name="T25">int main(void)</text:span></text:p>
      <text:p text:style-name="P262" loext:marker-style-name="T3"><text:span text:style-name="T25">{</text:span></text:p>
      <text:p text:style-name="P262" loext:marker-style-name="T3"><text:span text:style-name="T25"><text:tab/><text:tab/>printf("%f\n", average(3, 8, 3, 1)); <text:tab/>printf("%f\n", average(5, 8, 2, 5, 7,9)); <text:tab/>return(0);</text:span></text:p>
      <text:p text:style-name="P257" loext:marker-style-name="T3"><text:span text:style-name="T25">}</text:span></text:p>
      <text:p text:style-name="P138" loext:marker-style-name="T3"><text:span text:style-name="T9">Output:</text:span></text:p>
      <text:p text:style-name="P236" loext:marker-style-name="T3"><text:span text:style-name="T25">4.000000</text:span></text:p>
      <text:p text:style-name="P258" loext:marker-style-name="T3"><text:span text:style-name="T25">6.200000</text:span></text:p>
      <text:p text:style-name="P138" loext:marker-style-name="T3"><text:span text:style-name="T9">Example 2</text:span></text:p>
      <text:p text:style-name="P10">#include &lt;stdio.h&gt;</text:p>
      <text:p text:style-name="P10">#include &lt;stdarg.h&gt;</text:p>
      <text:p text:style-name="P28"/>
      <text:p text:style-name="P16"><text:soft-page-break/>/* print all args one at a time until a negative argument is seen. All args are assumed to be of int type */</text:p>
      <text:p text:style-name="P28"/>
      <text:p text:style-name="P10">void printargs(int arg1, ...)</text:p>
      <text:p text:style-name="P10">{</text:p>
      <text:p text:style-name="P10"><text:tab/><text:tab/><text:tab/>va_list ap;</text:p>
      <text:p text:style-name="P10"><text:tab/><text:tab/><text:tab/>int i;</text:p>
      <text:p text:style-name="P10"><text:tab/><text:tab/><text:tab/>va_start(ap, arg1);</text:p>
      <text:p text:style-name="P16"><text:tab/>for (i = arg1; i &gt;= 0; i = va_arg(ap, int))</text:p>
      <text:p text:style-name="P12">{</text:p>
      <text:p text:style-name="P11"><text:tab/><text:tab/><text:tab/>printf("%d ", i);</text:p>
      <text:p text:style-name="P12">}</text:p>
      <text:p text:style-name="P13">va_end(ap);</text:p>
      <text:p text:style-name="P13">putchar('\n');</text:p>
      <text:p text:style-name="P10">}</text:p>
      <text:p text:style-name="P11">int main(void)</text:p>
      <text:p text:style-name="P11">{</text:p>
      <text:p text:style-name="P16"><text:tab/>printargs(5, 2, 14, 84, 97, 15, -1, 48, -1);</text:p>
      <text:p text:style-name="P11"><text:tab/><text:tab/>printargs(84, 51, -1, 3);</text:p>
      <text:p text:style-name="P11"><text:tab/><text:tab/>printargs(-1);</text:p>
      <text:p text:style-name="P11"><text:tab/><text:tab/>printargs(1, -1);</text:p>
      <text:p text:style-name="P11"><text:tab/><text:tab/>return(0);</text:p>
      <text:p text:style-name="P11">}</text:p>
      <text:p text:style-name="P42"/>
      <text:p text:style-name="P138" loext:marker-style-name="T3"><text:span text:style-name="T9">Output:</text:span></text:p>
      <text:p text:style-name="P263" loext:marker-style-name="T3"><text:span text:style-name="T25">5 2 14 84 97 15 84 51</text:span></text:p>
      <text:p text:style-name="P259" loext:marker-style-name="T3"><text:soft-page-break/><text:span text:style-name="T25">1</text:span></text:p>
      <text:list text:continue-numbering="true" text:style-name="WWNum9">
        <text:list-item>
          <text:h text:style-name="P77" text:outline-level="1" loext:marker-style-name="T3"><text:bookmark-start text:name="_Toc195978851"/><text:bookmark-start text:name="__RefHeading___Toc2144_1327778131"/><text:span text:style-name="T3">Pointers and Local variables in functions</text:span><text:bookmark-end text:name="_Toc195978851"/><text:bookmark-end text:name="__RefHeading___Toc2144_1327778131"/></text:h>
        </text:list-item>
      </text:list>
      <text:p text:style-name="P8">#include &lt;stdio.h&gt;</text:p>
      <text:p text:style-name="P8">#include &lt;stdlib.h&gt;</text:p>
      <text:p text:style-name="P8">int *fun_1(void)</text:p>
      <text:p text:style-name="P8">{</text:p>
      <text:p text:style-name="P279" loext:marker-style-name="T3"><text:span text:style-name="T25"><text:s text:c="4"/>static int x = 10; <text:s/>//x is stored in the initialized .data section of memory. So it does not gets deleted even when the function returns. </text:span><text:span text:style-name="T32">But accessing x by value is restricted only to this function. Also x is initialized only once at the first </text:span><text:span text:style-name="T33">time</text:span><text:span text:style-name="T32">.</text:span></text:p>
      <text:p text:style-name="P264" loext:marker-style-name="T3"><text:span text:style-name="T25"><text:s text:c="4"/>return(&amp;x);</text:span></text:p>
      <text:p text:style-name="P282" loext:marker-style-name="T3"><text:span text:style-name="T25">}</text:span></text:p>
      <text:p text:style-name="P34"/>
      <text:p text:style-name="P8">int *fun_2(void)</text:p>
      <text:p text:style-name="P8">{</text:p>
      <text:p text:style-name="P55"><text:span text:style-name="T25"><text:tab/>int *ptr = (int *)malloc(sizeof(int)); <text:s/>//</text:span><text:span text:style-name="Source_20_Text"><text:span text:style-name="T25">malloc()</text:span></text:span><text:span text:style-name="T25"> allocates memory on the heap, it remains valid until you explicitly free it. </text:span><text:span text:style-name="T28">But ptr becomes invalid once this function returns. </text:span><text:span text:style-name="T30">R</text:span><text:span text:style-name="T28">eturning ptr is </text:span><text:span text:style-name="T30">safe</text:span><text:span text:style-name="T28">. </text:span><text:span text:style-name="T30">But once this fu</text:span><text:span text:style-name="T35">n</text:span><text:span text:style-name="T30">ction returns it is the caller’s responsibility to free the memory allocated in the heap which was pointed by ptr.</text:span></text:p>
      <text:p text:style-name="P55" loext:marker-style-name="T3"><text:span text:style-name="T25"><text:tab/>if (ptr == NULL) <text:s/>//Check if malloc failed.</text:span></text:p>
      <text:p text:style-name="P279" loext:marker-style-name="T3"><text:span text:style-name="T25"><text:tab/>{</text:span></text:p>
      <text:p text:style-name="P279" loext:marker-style-name="T3"><text:span text:style-name="T25"><text:s text:c="6"/><text:tab/>printf("Memory allocation failed!\n");</text:span></text:p>
      <text:p text:style-name="P279" loext:marker-style-name="T3"><text:span text:style-name="T25"><text:s text:c="6"/><text:tab/>return(NULL); <text:s/>//Return NULL if malloc fails</text:span></text:p>
      <text:p text:style-name="P279" loext:marker-style-name="T3"><text:span text:style-name="T25"><text:tab/>}</text:span></text:p>
      <text:p text:style-name="P279" loext:marker-style-name="T3"><text:span text:style-name="T25"><text:tab/>*ptr = 20;</text:span></text:p>
      <text:p text:style-name="P279" loext:marker-style-name="T3"><text:span text:style-name="T25"><text:tab/>return(ptr);</text:span></text:p>
      <text:p text:style-name="P8">}</text:p>
      <text:p text:style-name="P34"/>
      <text:p text:style-name="P265" loext:marker-style-name="T3"><text:span text:style-name="T25">int *fun_3(void)</text:span></text:p>
      <text:p text:style-name="P265" loext:marker-style-name="T3"><text:soft-page-break/><text:span text:style-name="T25">{</text:span></text:p>
      <text:p text:style-name="P277" loext:marker-style-name="T3"><text:span text:style-name="T25"><text:tab/>int y = 30; <text:s/>//y is stored in stack memory.</text:span></text:p>
      <text:p text:style-name="P277" loext:marker-style-name="T3"><text:span text:style-name="T25"><text:tab/>int *a = &amp;y; <text:s/>//a is stored in stack memory.</text:span></text:p>
      <text:p text:style-name="P277" loext:marker-style-name="T3"><text:span text:style-name="T25"><text:tab/>return(a); <text:s/>//</text:span><text:span text:style-name="T29">U</text:span><text:span text:style-name="T25">sing </text:span><text:span text:style-name="T29">a for returning address will </text:span><text:span text:style-name="T25">cause undefined behaviour </text:span><text:span text:style-name="T29">as a will be destroyed once this function completes execution</text:span><text:span text:style-name="T25">.</text:span></text:p>
      <text:p text:style-name="P277" loext:marker-style-name="T3"><text:span text:style-name="T25">}</text:span></text:p>
      <text:p text:style-name="P29"/>
      <text:p text:style-name="P263" loext:marker-style-name="T3"><text:span text:style-name="T25">int *fun_4(void) {</text:span></text:p>
      <text:p text:style-name="P281" loext:marker-style-name="T3"><text:span text:style-name="T25"><text:s text:c="4"/>int z = 40; <text:s/>//Local variables are created in stack and they have scope. So, they are not accessible everywhere.</text:span></text:p>
      <text:p text:style-name="P281" loext:marker-style-name="T3"><text:span text:style-name="T25"><text:s text:c="4"/>return(&amp;z); <text:s/>//z is created on stack. So, it is destroyed when the function returns. Therefore, &amp;z is invalid address.</text:span></text:p>
      <text:p text:style-name="P237" loext:marker-style-name="T3"><text:span text:style-name="T25">}</text:span></text:p>
      <text:p text:style-name="P38"/>
      <text:p text:style-name="P293" loext:marker-style-name="T3"><text:span text:style-name="T25">int main(void) {</text:span></text:p>
      <text:p text:style-name="P294" loext:marker-style-name="T3"><text:span text:style-name="T25"><text:tab/>int *p = fun_1();</text:span></text:p>
      <text:p text:style-name="P294" loext:marker-style-name="T3"><text:span text:style-name="T25"><text:tab/>printf("%d\n", *p); <text:s/>//Prints 10.</text:span></text:p>
      <text:p text:style-name="P294" loext:marker-style-name="T3"><text:span text:style-name="T25"><text:tab/>p = fun_2();</text:span></text:p>
      <text:p text:style-name="P295" loext:marker-style-name="T3"><text:span text:style-name="T25"><text:tab/>printf("%d\n", *p); <text:s/>//</text:span><text:span text:style-name="T31">Prints 20</text:span><text:span text:style-name="T25">.</text:span></text:p>
      <text:p text:style-name="P295" loext:marker-style-name="T3"><text:span text:style-name="T25"><text:tab/></text:span><text:span text:style-name="T31">free(p);</text:span></text:p>
      <text:p text:style-name="P294" loext:marker-style-name="T3"><text:span text:style-name="T25"><text:s text:c="5"/>p = fun_3();</text:span></text:p>
      <text:p text:style-name="P294" loext:marker-style-name="T3"><text:span text:style-name="T25"><text:tab/>printf("%d\n", *p); <text:s/>//Segmentation fault occurs and the program terminates here.</text:span></text:p>
      <text:p text:style-name="P294" loext:marker-style-name="T3"><text:span text:style-name="T25"><text:tab/>p = fun_4();</text:span></text:p>
      <text:p text:style-name="P294" loext:marker-style-name="T3"><text:span text:style-name="T25"><text:tab/>printf("%d\n", *p); <text:s/>//Segmentation fault occurs and the program terminates here.</text:span></text:p>
      <text:p text:style-name="P36"/>
      <text:p text:style-name="P294" loext:marker-style-name="T3"><text:span text:style-name="T25"><text:tab/>return(0);</text:span></text:p>
      <text:p text:style-name="P294" loext:marker-style-name="T3"><text:span text:style-name="T25">}</text:span></text:p>
      <text:p text:style-name="P33"/>
      <text:p text:style-name="P138" loext:marker-style-name="T3"><text:span text:style-name="T9">Output:</text:span></text:p>
      <text:p text:style-name="P277" loext:marker-style-name="T3"><text:span text:style-name="T25">10</text:span></text:p>
      <text:p text:style-name="P297" loext:marker-style-name="T3"><text:soft-page-break/><text:span text:style-name="T25">20</text:span></text:p>
      <text:p text:style-name="P14">&lt;Segmentation fault&gt;</text:p>
      <text:p text:style-name="P14">&lt;Segmentation fault&gt;</text:p>
      <text:p text:style-name="P14"/>
      <text:list text:continue-numbering="true" text:style-name="WWNum9">
        <text:list-item>
          <text:h text:style-name="P75" text:outline-level="1"><text:bookmark-start text:name="_Toc195978852"/><text:bookmark-start text:name="__RefHeading___Toc2146_1327778131"/>Ternary operator<text:bookmark-end text:name="_Toc195978852"/><text:bookmark-end text:name="__RefHeading___Toc2146_1327778131"/></text:h>
        </text:list-item>
      </text:list>
      <text:p text:style-name="P14" loext:marker-style-name="T3">#include &lt;stdio.h&gt;</text:p>
      <text:p text:style-name="P14" loext:marker-style-name="T3">int main(void)</text:p>
      <text:p text:style-name="P14" loext:marker-style-name="T3">{</text:p>
      <text:p text:style-name="P14" loext:marker-style-name="T3"><text:tab/>int a, b, result;</text:p>
      <text:p text:style-name="P275" loext:marker-style-name="T3"><text:span text:style-name="T25"><text:tab/>printf("Enter first number: ");</text:span></text:p>
      <text:p text:style-name="P14"><text:s text:c="4"/><text:tab/>scanf("%d", &amp;a);</text:p>
      <text:p text:style-name="P275" loext:marker-style-name="T3"><text:span text:style-name="T25"><text:s text:c="4"/><text:tab/>printf("Enter second number: ");</text:span></text:p>
      <text:p text:style-name="P275" loext:marker-style-name="T3"><text:span text:style-name="T25"><text:tab/>scanf("%d", &amp;b);</text:span></text:p>
      <text:p text:style-name="P275" loext:marker-style-name="T3"><text:span text:style-name="T25"><text:tab/>result = (a &gt; b)? a : b; <text:s text:c="4"/>printf("Highest is: %d\n", result);</text:span></text:p>
      <text:p text:style-name="P14"><text:s text:c="4"/>(a &gt; b)? printf("First number is highest") : printf("Second number is highest");</text:p>
      <text:p text:style-name="P14"><text:s text:c="6"/>return(0);</text:p>
      <text:p text:style-name="P14">}</text:p>
      <text:p text:style-name="P31"/>
      <text:p text:style-name="P138" loext:marker-style-name="T3"><text:span text:style-name="T9">Output:</text:span></text:p>
      <text:p text:style-name="P236" loext:marker-style-name="T3"><text:span text:style-name="T25">Enter first number: 87</text:span></text:p>
      <text:p text:style-name="P266" loext:marker-style-name="T3"><text:span text:style-name="T25">Enter second number: 765 Highest is: 765</text:span></text:p>
      <text:p text:style-name="P259" loext:marker-style-name="T3"><text:span text:style-name="T25">Second number is highest</text:span></text:p>
      <text:list text:continue-numbering="true" text:style-name="WWNum9">
        <text:list-item>
          <text:h text:style-name="P79" text:outline-level="1" loext:marker-style-name="T3"><text:bookmark-start text:name="_Toc195978853"/><text:bookmark-start text:name="__RefHeading___Toc2148_1327778131"/><text:soft-page-break/><text:span text:style-name="T3">Terminating a program using exit() while inside a function without return type</text:span><text:bookmark-end text:name="_Toc195978853"/><text:bookmark-end text:name="__RefHeading___Toc2148_1327778131"/></text:h>
        </text:list-item>
      </text:list>
      <text:p text:style-name="P18" loext:marker-style-name="T3">#include &lt;stdio.h&gt;</text:p>
      <text:p text:style-name="P18" loext:marker-style-name="T3">#include &lt;stdlib.h&gt;</text:p>
      <text:p text:style-name="P18" loext:marker-style-name="T3"/>
      <text:p text:style-name="P18" loext:marker-style-name="T3">void foo(void) {</text:p>
      <text:p text:style-name="P237" loext:marker-style-name="T3"><text:span text:style-name="T25"><text:s text:c="4"/>printf("Inside foo() before exit()\n");</text:span></text:p>
      <text:p text:style-name="P237" loext:marker-style-name="T3"><text:span text:style-name="T25"><text:s text:c="4"/>exit(1); <text:s/>//Exiting with failure. exit(0) for exiting with success.</text:span></text:p>
      <text:p text:style-name="P18"><text:s text:c="4"/>printf("Inside foo() after exit()\n");</text:p>
      <text:p text:style-name="P18">}</text:p>
      <text:p text:style-name="P30"/>
      <text:p text:style-name="P18">int main(void)</text:p>
      <text:p text:style-name="P18">{</text:p>
      <text:p text:style-name="P18"><text:tab/><text:tab/><text:tab/>printf("Inside main() before foo()\n");</text:p>
      <text:p text:style-name="P18"><text:tab/><text:tab/><text:tab/>foo();</text:p>
      <text:p text:style-name="P18"><text:tab/><text:tab/><text:tab/>printf("Inside main() after foo()\n");</text:p>
      <text:p text:style-name="P237" loext:marker-style-name="T3"><text:span text:style-name="T25"><text:tab/><text:tab/><text:tab/>return(0);</text:span></text:p>
      <text:p text:style-name="P18">}</text:p>
      <text:p text:style-name="P38"/>
      <text:p text:style-name="P138" loext:marker-style-name="T3"><text:span text:style-name="T9">Output:</text:span></text:p>
      <text:p text:style-name="P236" loext:marker-style-name="T3"><text:span text:style-name="T25">Inside main() before foo()</text:span></text:p>
      <text:p text:style-name="P259" loext:marker-style-name="T3"><text:span text:style-name="T25">Inside foo() before exit()</text:span></text:p>
      <text:list text:continue-numbering="true" text:style-name="WWNum9">
        <text:list-item>
          <text:h text:style-name="P78" text:outline-level="1" loext:marker-style-name="T3"><text:bookmark-start text:name="_Toc195978854"/><text:bookmark-start text:name="__RefHeading___Toc2150_1327778131"/><text:span text:style-name="T3">Structure Packing and Padding</text:span><text:bookmark-end text:name="_Toc195978854"/><text:bookmark-end text:name="__RefHeading___Toc2150_1327778131"/></text:h>
        </text:list-item>
      </text:list>
      <text:p text:style-name="P278" loext:marker-style-name="T3"><text:span text:style-name="T25">#include &lt;stdio.h&gt;</text:span></text:p>
      <text:p text:style-name="P278" loext:marker-style-name="T3"><text:span text:style-name="T25">#pragma pack(push, 4) <text:s/>//4-byte alignment.</text:span></text:p>
      <text:p text:style-name="P278" loext:marker-style-name="T3"><text:span text:style-name="T25">typedef struct</text:span></text:p>
      <text:p text:style-name="P15">{</text:p>
      <text:p text:style-name="P15"><text:tab/>int x; char y; int z;</text:p>
      <text:p text:style-name="P15">}packed_4;</text:p>
      <text:p text:style-name="P32"/>
      <text:p text:style-name="P15">#pragma pack(push, 1) <text:s/>//1-byte alignment.</text:p>
      <text:p text:style-name="P15">typedef struct</text:p>
      <text:p text:style-name="P15">{</text:p>
      <text:p text:style-name="P15"><text:tab/>char a;</text:p>
      <text:p text:style-name="P15"><text:soft-page-break/><text:tab/>int b;</text:p>
      <text:p text:style-name="P15"><text:tab/>packed_4 s1; <text:s/>//4-byte alignment.</text:p>
      <text:p text:style-name="P15">}nested_packed_1;</text:p>
      <text:p text:style-name="P32"/>
      <text:p text:style-name="P16">#pragma pack(pop);</text:p>
      <text:p text:style-name="P16">/* Pops out to previous alignment rule. ie, pack(push, 4) in this case will be active from here on.*/</text:p>
      <text:p text:style-name="P32"/>
      <text:p text:style-name="P15">int main(void)</text:p>
      <text:p text:style-name="P15">(</text:p>
      <text:p text:style-name="P15"><text:tab/>printf("Size of int: %d\n", (size_t)sizeof(int)); <text:s text:c="4"/><text:tab/>printf("Size of packed_4: %d\n", (size_t)sizeof(packed_4));</text:p>
      <text:p text:style-name="P15"><text:tab/>printf("Size of nested_packed_1: %d\n", <text:tab/>(size_t)sizeof(nested_packed_1));</text:p>
      <text:p text:style-name="P15"><text:tab/>return(0);</text:p>
      <text:p text:style-name="P15">}</text:p>
      <text:p text:style-name="P248" loext:marker-style-name="T3"><text:span text:style-name="T25"><text:s/></text:span></text:p>
      <text:p text:style-name="P138" loext:marker-style-name="T3"><text:span text:style-name="T9">Output:</text:span></text:p>
      <text:p text:style-name="P236" loext:marker-style-name="T3"><text:span text:style-name="T25">Size of int: 4</text:span></text:p>
      <text:p text:style-name="P236" loext:marker-style-name="T3"><text:span text:style-name="T25">Size of packed_4: 12</text:span></text:p>
      <text:p text:style-name="P259" loext:marker-style-name="T3"><text:span text:style-name="T25">Size of nested_packed_1: 17</text:span></text:p>
      <text:list text:continue-numbering="true" text:style-name="WWNum9">
        <text:list-item>
          <text:h text:style-name="P78" text:outline-level="1" loext:marker-style-name="T3"><text:bookmark-start text:name="_Toc195978855"/><text:bookmark-start text:name="__RefHeading___Toc3977_460557994"/><text:span text:style-name="T3">Arguments and Options</text:span><text:bookmark-end text:name="_Toc195978855"/><text:bookmark-end text:name="__RefHeading___Toc3977_460557994"/></text:h>
        </text:list-item>
      </text:list>
      <text:p text:style-name="P15">#include &lt;stdio.h&gt;</text:p>
      <text:p text:style-name="P15">#include &lt;stdlib.h&gt; <text:s/>//For atof().</text:p>
      <text:p text:style-name="P15">#include &lt;string.h&gt; <text:s/>//For strcmp().</text:p>
      <text:p text:style-name="P32"/>
      <text:p text:style-name="P15"><text:soft-page-break/>int main(int argc, char *argv[])</text:p>
      <text:p text:style-name="P15">{</text:p>
      <text:p text:style-name="P15"><text:tab/>if(argc == 2 &amp;&amp; (strcmp(argv[1], "-h") || strcmp(argv[1], "-help")))</text:p>
      <text:p text:style-name="P15"><text:tab/>{</text:p>
      <text:p text:style-name="P16"><text:tab/><text:tab/>printf("Usage: calc [option] [operand 1] [operand 2]\n");</text:p>
      <text:p text:style-name="P16"><text:s text:c="8"/><text:tab/>printf("-a, --add - Addition\n-s, --substract - </text:p>
      <text:p text:style-name="P15">Substraction\n-m, --multiply - Multiplication\n-d, --divide - </text:p>
      <text:p text:style-name="P15">Division\n");</text:p>
      <text:p text:style-name="P15"><text:tab/><text:tab/>return(0);</text:p>
      <text:p text:style-name="P15"><text:tab/>}</text:p>
      <text:p text:style-name="P15"><text:tab/>else if(argc != 4)</text:p>
      <text:p text:style-name="P276" loext:marker-style-name="T3"><text:span text:style-name="T25"><text:tab/>{</text:span></text:p>
      <text:p text:style-name="P276" loext:marker-style-name="T3"><text:span text:style-name="T25"><text:tab/><text:tab/>printf("Usage: calc [option] [operand 1] [operand 2]\n");</text:span></text:p>
      <text:p text:style-name="P277" loext:marker-style-name="T3"><text:span text:style-name="T25"><text:tab/><text:tab/>printf("-a, --add - Addition\n-s, --substract - </text:span></text:p>
      <text:p text:style-name="P15">Substraction\n-m, --multiply - Multiplication\n-d, --divide - </text:p>
      <text:p text:style-name="P15">Division\n");</text:p>
      <text:p text:style-name="P15"><text:tab/><text:tab/>return(-1);</text:p>
      <text:p text:style-name="P15"><text:tab/>}</text:p>
      <text:p text:style-name="P15"><text:tab/>else</text:p>
      <text:p text:style-name="P15"><text:tab/>{}</text:p>
      <text:p text:style-name="P15"><text:s text:c="2"/></text:p>
      <text:p text:style-name="P15"><text:tab/>if(strcmp(argv[1], "-a") == 0 || strcmp(argv[1], "--add") == 0) <text:s text:c="4"/><text:tab/>{</text:p>
      <text:p text:style-name="P15"><text:tab/><text:tab/>printf("Addition is: %f\n", atof(argv[2]) + atof(argv[3]));</text:p>
      <text:p text:style-name="P15"><text:tab/><text:tab/>return(0);</text:p>
      <text:p text:style-name="P276" loext:marker-style-name="T3"><text:soft-page-break/><text:span text:style-name="T25"><text:s text:c="4"/>}</text:span></text:p>
      <text:p text:style-name="P15"><text:s text:c="4"/>else if(strcmp(argv[1], "-s") == 0 || strcmp(argv[1], "-substract") == 0)</text:p>
      <text:p text:style-name="P15"><text:tab/>{</text:p>
      <text:p text:style-name="P15"><text:tab/><text:tab/>printf("Substraction is: %f\n", atof(argv[2]) - atof(argv[3])); <text:s text:c="8"/>return(0); <text:s text:c="4"/>}</text:p>
      <text:p text:style-name="P15"><text:s text:c="4"/>else if(strcmp(argv[1], "-m") == 0 || strcmp(argv[1], "-multiply") == 0)</text:p>
      <text:p text:style-name="P15"><text:tab/>{</text:p>
      <text:p text:style-name="P15"><text:tab/><text:tab/>printf("Multiplication is: %f\n", atof(argv[2]) * atof(argv[3]));</text:p>
      <text:p text:style-name="P15"><text:tab/><text:tab/>return(0);</text:p>
      <text:p text:style-name="P15"><text:tab/>}</text:p>
      <text:p text:style-name="P15"><text:s text:c="4"/>else if(strcmp(argv[1], "-d") == 0 || strcmp(argv[1], "-divide") == 0)</text:p>
      <text:p text:style-name="P15"><text:tab/>{</text:p>
      <text:p text:style-name="P15"><text:tab/><text:tab/>printf("Division is: %f\n", atof(argv[2]) / atof(argv[3]));</text:p>
      <text:p text:style-name="P15"><text:tab/><text:tab/>return(0);</text:p>
      <text:p text:style-name="P15"><text:tab/>}</text:p>
      <text:p text:style-name="P15"><text:tab/>else</text:p>
      <text:p text:style-name="P15"><text:tab/>{</text:p>
      <text:p text:style-name="P15"><text:tab/><text:tab/>printf("Bad option(s) or/and argument(s)\n"); <text:s text:c="8"/><text:tab/><text:tab/><text:tab/>return(-1);</text:p>
      <text:p text:style-name="P15"><text:tab/>}</text:p>
      <text:p text:style-name="P15">}</text:p>
      <text:p text:style-name="P32"/>
      <text:p text:style-name="P138" loext:marker-style-name="T3"><text:soft-page-break/><text:span text:style-name="T9">Output:</text:span></text:p>
      <text:p text:style-name="P238" loext:marker-style-name="T3"><text:span text:style-name="T36">$ </text:span><text:span text:style-name="T25">./calc --add 2 3 </text:span></text:p>
      <text:p text:style-name="P18">Addition is: 5.000000</text:p>
      <text:p text:style-name="P130" loext:marker-style-name="T3"/>
      <text:list text:continue-numbering="true" text:style-name="WWNum9">
        <text:list-item>
          <text:h text:style-name="P78" text:outline-level="1" loext:marker-style-name="T3"><text:bookmark-start text:name="_Toc195978856"/><text:bookmark-start text:name="__RefHeading___Toc2154_1327778131"/><text:span text:style-name="T3">Memory Mapping an SFR</text:span><text:bookmark-end text:name="_Toc195978856"/><text:bookmark-end text:name="__RefHeading___Toc2154_1327778131"/></text:h>
        </text:list-item>
      </text:list>
      <text:p text:style-name="P239" loext:marker-style-name="T3"><text:span text:style-name="T25">#define REGISTER_NAME (*(volatile unsigned char *) 0x1234)</text:span></text:p>
      <text:p text:style-name="P138" loext:marker-style-name="T3"><text:span text:style-name="T9">More specifically,</text:span></text:p>
      <text:p text:style-name="P240" loext:marker-style-name="T3"><text:span text:style-name="T25">*(volatile unsigned char *) 0x1234</text:span></text:p>
      <text:p text:style-name="P139" loext:marker-style-name="T3"><text:span text:style-name="T9">is an integer constant </text:span><text:span text:style-name="T25">0x1234</text:span><text:span text:style-name="T9">, that is typecast to a pointer (an address) that points to a volatile unsigned char (a single byte), So, the data that is to be read or written to should be having a data type of </text:span><text:span text:style-name="T25">volatile unsigned char</text:span><text:span text:style-name="T9">. The pointer has been dereferenced (by the star on the far left). This means that it is accessing (whether reading or writing) the value at the address </text:span><text:span text:style-name="T25">0x1234</text:span><text:span text:style-name="T9">. The </text:span><text:span text:style-name="T25">volatile</text:span><text:span text:style-name="T9"> means that the value of the byte that is pointed to, can change due to something outside the main code, either through an Interrupt Service Routine (ISR), or more likely in this case, the hardware itself (because we are memory mapping a register).</text:span></text:p>
      <text:p text:style-name="P239" loext:marker-style-name="T3"><text:span text:style-name="T25">(*(volatile unsigned char *) 0x1234)</text:span></text:p>
      <text:p text:style-name="P298" loext:marker-style-name="T3"><text:span text:style-name="T9">is the same as above, but with extra parentheses around it to avoid confusion. </text:span><text:span text:style-name="T25">foo = (*(volatile unsigned char *) 0x1234);</text:span></text:p>
      <text:p text:style-name="P140" loext:marker-style-name="T3"><text:span text:style-name="T9">is taking the value stored at address </text:span><text:span text:style-name="T25">0x1234</text:span><text:span text:style-name="T9"> and storing it in the variable foo.</text:span></text:p>
      <text:p text:style-name="P267" loext:marker-style-name="T3"><text:span text:style-name="T25">(*(volatile unsigned char *) 0x1234) = 0xAA; </text:span><text:span text:style-name="T9">is storing the value </text:span><text:span text:style-name="T25">0xAA</text:span><text:span text:style-name="T9"> in address </text:span><text:span text:style-name="T25">0x1234</text:span><text:span text:style-name="T9">.</text:span></text:p>
      <text:list text:continue-numbering="true" text:style-name="WWNum9">
        <text:list-item>
          <text:h text:style-name="P78" text:outline-level="1" loext:marker-style-name="T3"><text:bookmark-start text:name="_Toc195978857"/><text:bookmark-start text:name="__RefHeading___Toc2156_1327778131"/><text:span text:style-name="T3">Convert Hexadecimal to Binary</text:span><text:bookmark-end text:name="_Toc195978857"/><text:bookmark-end text:name="__RefHeading___Toc2156_1327778131"/></text:h>
        </text:list-item>
      </text:list>
      <text:p text:style-name="P15">#include &lt;stdio.h&gt;</text:p>
      <text:p text:style-name="P15">#include &lt;stdint.h&gt;</text:p>
      <text:p text:style-name="P32"/>
      <text:p text:style-name="P15">int main(void)</text:p>
      <text:p text:style-name="P15">{<text:line-break/><text:tab/>uint8_t hex, bit;</text:p>
      <text:p text:style-name="P15"><text:tab/>int8_t i; <text:s/>//Since its value would become –1.</text:p>
      <text:p text:style-name="P15"><text:tab/>printf("Enter the 1-byte Hex number: 0x");</text:p>
      <text:p text:style-name="P15"><text:soft-page-break/><text:tab/>scanf("%x", &amp;hex);</text:p>
      <text:p text:style-name="P15"><text:tab/>printf("The Bin equivalent is: 0b");</text:p>
      <text:p text:style-name="P15"><text:tab/>for(i = 7; i &gt;= 0; i--)</text:p>
      <text:p text:style-name="P15"><text:tab/>{</text:p>
      <text:p text:style-name="P15"><text:tab/><text:tab/>bit = ((hex &gt;&gt; i) &amp; 1);</text:p>
      <text:p text:style-name="P15"><text:tab/><text:tab/>printf("%d", bit);</text:p>
      <text:p text:style-name="P15"><text:tab/>}</text:p>
      <text:p text:style-name="P15"><text:tab/>return(0);</text:p>
      <text:p text:style-name="P15">}</text:p>
      <text:list text:continue-numbering="true" text:style-name="WWNum9">
        <text:list-item>
          <text:h text:style-name="P78" text:outline-level="1" loext:marker-style-name="T3"><text:bookmark-start text:name="__RefHeading___Toc2158_1327778131"/><text:span text:style-name="T3"><text:s text:c="3"/></text:span><text:bookmark-start text:name="_Toc195978858"/><text:span text:style-name="T3">Convert Byte to Binary</text:span><text:bookmark-end text:name="__RefHeading___Toc2158_1327778131"/><text:bookmark-end text:name="_Toc195978858"/></text:h>
        </text:list-item>
      </text:list>
      <text:p text:style-name="P241" loext:marker-style-name="T3"><text:span text:style-name="T25">#define BYTE_TO_BINARY_PATTERN "%c%c%c%c%c%c%c%c"</text:span></text:p>
      <text:p text:style-name="P241" loext:marker-style-name="T3"><text:span text:style-name="T25">#define BYTE_TO_BINARY(byte) <text:s/>\</text:span></text:p>
      <text:p text:style-name="P246" loext:marker-style-name="T3"><text:span text:style-name="T25">(byte &amp; 0x80 ? '1' : '0'), \</text:span></text:p>
      <text:p text:style-name="P246" loext:marker-style-name="T3"><text:span text:style-name="T25">(byte &amp; 0x40 ? '1' : '0'), \</text:span></text:p>
      <text:p text:style-name="P246" loext:marker-style-name="T3"><text:span text:style-name="T25">(byte &amp; 0x20 ? '1' : '0'), \</text:span></text:p>
      <text:p text:style-name="P246" loext:marker-style-name="T3"><text:span text:style-name="T25">(byte &amp; 0x10 ? '1' : '0'), \</text:span></text:p>
      <text:p text:style-name="P246" loext:marker-style-name="T3"><text:span text:style-name="T25">(byte &amp; 0x08 ? '1' : '0'), \</text:span></text:p>
      <text:p text:style-name="P246" loext:marker-style-name="T3"><text:span text:style-name="T25">(byte &amp; 0x04 ? '1' : '0'), \</text:span></text:p>
      <text:p text:style-name="P246" loext:marker-style-name="T3"><text:span text:style-name="T25">(byte &amp; 0x02 ? '1' : '0'), \</text:span></text:p>
      <text:p text:style-name="P247" loext:marker-style-name="T3"><text:span text:style-name="T25">(byte &amp; 0x01 ? '1' : '0')</text:span></text:p>
      <text:p text:style-name="P138" loext:marker-style-name="T3"><text:span text:style-name="T9">Usage in driver code:</text:span></text:p>
      <text:p text:style-name="P299" loext:marker-style-name="T3"><text:span text:style-name="T25">printf("Leading text ""BYTE_TO_BINARY_PATTERN"\n", BYTE_TO_BINARY(byte));</text:span></text:p>
      <text:p text:style-name="P138" loext:marker-style-name="T3"><text:span text:style-name="T9">For multi-byte types:</text:span></text:p>
      <text:p text:style-name="P300" loext:marker-style-name="T3"><text:span text:style-name="T25">printf("m: "BYTE_TO_BINARY_PATTERN" "BYTE_TO_BINARY_PATTERN"\n", BYTE_TO_BINARY(m&gt;&gt;8), BYTE_TO_BINARY(m));</text:span></text:p>
      <text:list text:continue-numbering="true" text:style-name="WWNum9">
        <text:list-item>
          <text:h text:style-name="P77" text:outline-level="1" loext:marker-style-name="T3"><text:bookmark-start text:name="__RefHeading___Toc2160_1327778131"/><text:soft-page-break/><text:span text:style-name="T3"><text:s text:c="3"/></text:span><text:bookmark-start text:name="_Toc195978859"/><text:span text:style-name="T3">How does free() know the size of memory to be deallocated?</text:span><text:bookmark-end text:name="__RefHeading___Toc2160_1327778131"/><text:bookmark-end text:name="_Toc195978859"/></text:h>
        </text:list-item>
      </text:list>
      <text:p text:style-name="P138" loext:marker-style-name="T3"><text:span text:style-name="T9">The free() function is used to deallocate memory while it is allocated using malloc(), calloc() and realloc(). The syntax of the free is simple. We simply use free with the pointer. Then it can clean up the memory.</text:span></text:p>
      <text:p text:style-name="P239" loext:marker-style-name="T3"><text:span text:style-name="T25">free(ptr);</text:span></text:p>
      <text:p text:style-name="P137" loext:marker-style-name="T3"><text:span text:style-name="T9">The free() is not taking any size as parameter, but only pointer. So the question comes, that how the free() function know about the size of the block to deallocate?</text:span></text:p>
      <text:p text:style-name="P141" loext:marker-style-name="T3"><text:span text:style-name="T9">When we use the dynamic memory allocation techniques for memory allocations, then this is done in the actual heap section. It creates one word larger than the requested size. This extra word is used to store the size. This size is used by free() when it wants to clear the memory space.</text:span></text:p>
      <text:list text:continue-numbering="true" text:style-name="WWNum9">
        <text:list-item>
          <text:h text:style-name="P80" text:outline-level="1" loext:marker-style-name="T3"><text:bookmark-start text:name="__RefHeading___Toc2162_1327778131"/><text:span text:style-name="T3"><text:s text:c="3"/></text:span><text:bookmark-start text:name="_Toc195978860"/><text:span text:style-name="T3">Setter and Getter Functions</text:span><text:bookmark-end text:name="__RefHeading___Toc2162_1327778131"/><text:bookmark-end text:name="_Toc195978860"/></text:h>
        </text:list-item>
      </text:list>
      <text:p text:style-name="P141" loext:marker-style-name="T3"><text:span text:style-name="T9">“Setter” function is used to Set or Update value to the variable. “Getter” function is used to retrieve value of the variable.</text:span></text:p>
      <text:list xml:id="list185529011648590" text:continue-numbering="true" text:style-name="WWNum9">
        <text:list-item>
          <text:h text:style-name="P81" text:outline-level="1" loext:marker-style-name="T3"><text:bookmark-start text:name="__RefHeading___Toc2164_1327778131"/><text:span text:style-name="T3"><text:s text:c="3"/></text:span><text:bookmark-start text:name="_Toc195978861"/><text:span text:style-name="T3">Interrupt Handling in Microcontroller</text:span><text:bookmark-end text:name="__RefHeading___Toc2164_1327778131"/><text:bookmark-end text:name="_Toc195978861"/></text:h>
        </text:list-item>
      </text:list>
      <text:list text:style-name="WWNum1">
        <text:list-item>
          <text:p text:style-name="P179" loext:marker-style-name="T3"><text:span text:style-name="T9">Microcontroller finishes the current instruction it is executing and saves address of next instruction (which is in the Program Counter) on to the Stack.</text:span></text:p>
        </text:list-item>
        <text:list-item>
          <text:p text:style-name="P180" loext:marker-style-name="T3"><text:span text:style-name="T9">It also saves current status of all the interrupts internally (i.e., not on the Stack).</text:span></text:p>
        </text:list-item>
        <text:list-item>
          <text:p text:style-name="P179" loext:marker-style-name="T3"><text:span text:style-name="T9">It jumps to the memory location of "Interrupt Vector Table". Interrupt Vector Table contains addresses of all ISRs.</text:span></text:p>
        </text:list-item>
        <text:list-item>
          <text:p text:style-name="P179" loext:marker-style-name="T3"><text:span text:style-name="T9">Microcontroller fetches address of the ISR from Interrupt Vector Table and jumps to it. It starts executing the Interrupt Service Routine until it reaches last instruction of ISR.</text:span></text:p>
        </text:list-item>
        <text:list-item>
          <text:p text:style-name="P181" loext:marker-style-name="T3"><text:span text:style-name="T9">Upon executing last instruction, the microcontroller returns to the place where it was interrupted. First it gets the program counter (PC) address from Stack by popping top bytes of the Stack into PC. Then, it starts to execute from that address.</text:span></text:p>
        </text:list-item>
      </text:list>
      <text:list text:continue-list="list185529011648590" text:style-name="WWNum9">
        <text:list-item>
          <text:h text:style-name="P82" text:outline-level="1" loext:marker-style-name="T3"><text:bookmark-start text:name="__RefHeading___Toc2166_1327778131"/><text:span text:style-name="T3"><text:s text:c="3"/></text:span><text:bookmark-start text:name="_Toc195978862"/><text:span text:style-name="T3">Bit rate vs Baud rate</text:span><text:bookmark-end text:name="__RefHeading___Toc2166_1327778131"/><text:bookmark-end text:name="_Toc195978862"/></text:h>
        </text:list-item>
      </text:list>
      <text:p text:style-name="P20">baud rate = number of symbols per second</text:p>
      <text:p text:style-name="P21">bit rate = number of bits per second = (baud rate)*(bits per <text:tab/><text:tab/><text:tab/>symbol)*(number of channels)</text:p>
      <text:list text:continue-numbering="true" text:style-name="WWNum9">
        <text:list-item>
          <text:h text:style-name="P83" text:outline-level="1" loext:marker-style-name="T3"><text:bookmark-start text:name="__RefHeading___Toc2168_1327778131"/><text:soft-page-break/><text:span text:style-name="T3"><text:s text:c="3"/></text:span><text:bookmark-start text:name="_Toc195978863"/><text:span text:style-name="T3">Static vs Global variables</text:span><text:bookmark-end text:name="__RefHeading___Toc2168_1327778131"/><text:bookmark-end text:name="_Toc195978863"/></text:h>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8">Feature</text:p>
          </table:table-cell>
          <table:table-cell table:style-name="Table2.A1" office:value-type="string">
            <text:p text:style-name="P59">Static Variable (inside function)</text:p>
          </table:table-cell>
          <table:table-cell table:style-name="Table2.A1" office:value-type="string">
            <text:p text:style-name="P59">Global Variable</text:p>
          </table:table-cell>
        </table:table-row>
        <table:table-row table:style-name="Table2.1">
          <table:table-cell table:style-name="Table2.A1" office:value-type="string">
            <text:p text:style-name="P59">Lifetime</text:p>
          </table:table-cell>
          <table:table-cell table:style-name="Table2.A1" office:value-type="string">
            <text:p text:style-name="P60">Lives for the entire duration of the program.</text:p>
          </table:table-cell>
          <table:table-cell table:style-name="Table2.A1" office:value-type="string">
            <text:p text:style-name="P60">Lives for the entire duration of the program.</text:p>
          </table:table-cell>
        </table:table-row>
        <table:table-row table:style-name="Table2.1">
          <table:table-cell table:style-name="Table2.A1" office:value-type="string">
            <text:p text:style-name="P59">Scope</text:p>
          </table:table-cell>
          <table:table-cell table:style-name="Table2.A1" office:value-type="string">
            <text:p text:style-name="P60">Local. Only visible inside that specific function.</text:p>
          </table:table-cell>
          <table:table-cell table:style-name="Table2.A1" office:value-type="string">
            <text:p text:style-name="P60">Global. Visible to every function in the file.</text:p>
          </table:table-cell>
        </table:table-row>
        <table:table-row table:style-name="Table2.4">
          <table:table-cell table:style-name="Table2.A1" office:value-type="string">
            <text:p text:style-name="P59">Initialization</text:p>
          </table:table-cell>
          <table:table-cell table:style-name="Table2.A1" office:value-type="string">
            <text:p text:style-name="P60">Initialized only once (the first time the function is called).</text:p>
          </table:table-cell>
          <table:table-cell table:style-name="Table2.A1" office:value-type="string">
            <text:p text:style-name="P60">Initialized once (at program start).</text:p>
          </table:table-cell>
        </table:table-row>
      </table:table>
      <text:p text:style-name="Standard"/>
      <text:p text:style-name="P138" loext:marker-style-name="T3"><text:span text:style-name="T9">If you declare </text:span><text:span text:style-name="T25">static int x = 0;</text:span><text:span text:style-name="T9"> inside </text:span><text:span text:style-name="T25">function_A()</text:span><text:span text:style-name="T9">, you cannot go into </text:span><text:span text:style-name="T25">function_B()</text:span><text:span text:style-name="T9"> and simply type </text:span><text:span text:style-name="T25">x = 5;</text:span><text:span text:style-name="T9">. The compiler will tell you that </text:span><text:span text:style-name="T25">x</text:span><text:span text:style-name="T9"> is undefined. The "</text:span><text:span text:style-name="T25">static</text:span><text:span text:style-name="T9">" keyword effectively locks the variable's name inside the curly braces of the function where it was born.</text:span></text:p>
      <text:p text:style-name="P47" loext:marker-style-name="T3">The "Backdoor" Exception</text:p>
      <text:p text:style-name="P47" loext:marker-style-name="T3">While you cannot access the name of the static variable globally, you could technically access its memory address globally if you pass it out via a pointer.</text:p>
      <text:p text:style-name="P47" loext:marker-style-name="T3">Because a static variable lives in the "Data Segment" of memory (not on the stack), its address remains valid even after the function returns.</text:p>
      <text:p text:style-name="P47" loext:marker-style-name="T3">Example of the "Backdoor" approach:</text:p>
      <text:p text:style-name="P232" loext:marker-style-name="T3">int* get_static_ptr()</text:p>
      <text:p text:style-name="P232" loext:marker-style-name="T3">{</text:p>
      <text:p text:style-name="P231" loext:marker-style-name="T3"><text:s text:c="4"/>static int secret_counter = 0;</text:p>
      <text:p text:style-name="P231" loext:marker-style-name="T3"><text:s text:c="4"/>return &amp;secret_counter; // Returning the address is safe because it's static</text:p>
      <text:p text:style-name="P231" loext:marker-style-name="T3">}</text:p>
      <text:p text:style-name="P232" loext:marker-style-name="T3">int main()</text:p>
      <text:p text:style-name="P232" loext:marker-style-name="T3">{</text:p>
      <text:p text:style-name="P231" loext:marker-style-name="T3"><text:s text:c="4"/>int *ptr = get_static_ptr();</text:p>
      <text:p text:style-name="P231" loext:marker-style-name="T3"><text:s text:c="4"/>*ptr = 100; // You are now modifying a "local" static variable from outside!</text:p>
      <text:p text:style-name="P231" loext:marker-style-name="T3"><text:s text:c="4"/>return 0;</text:p>
      <text:p text:style-name="P231" loext:marker-style-name="T3">}</text:p>
      <text:p text:style-name="P47" loext:marker-style-name="T3"><text:soft-page-break/>When should you use which?</text:p>
      <text:p text:style-name="P47" loext:marker-style-name="T3">Use Global: When many different, unrelated functions truly need to share the same piece of data (use sparingly, as globals make debugging difficult).</text:p>
      <text:p text:style-name="P47" loext:marker-style-name="T3">Use Static (inside function): When you want a function to "remember" something between calls (like a counter or a state) but you want to hide that data from the rest of the program to keep it safe.</text:p>
      <text:p text:style-name="P47" loext:marker-style-name="T3">Summary</text:p>
      <text:p text:style-name="P47" loext:marker-style-name="T3">A static local variable is like a private diary: only you (the function) can read/write in it, but unlike a normal conversation (stack variable), the diary doesn't disappear when you leave the room.</text:p>
      <text:p text:style-name="P47" loext:marker-style-name="T3"/>
      <text:list text:continue-numbering="true" text:style-name="WWNum9">
        <text:list-item>
          <text:h text:style-name="P84" text:outline-level="1" loext:marker-style-name="T3"><text:bookmark-start text:name="__RefHeading___Toc2170_1327778131"/><text:span text:style-name="T3"><text:s text:c="3"/></text:span><text:bookmark-start text:name="_Toc195978864"/><text:span text:style-name="T3">memset() function</text:span><text:bookmark-end text:name="__RefHeading___Toc2170_1327778131"/><text:bookmark-end text:name="_Toc195978864"/></text:h>
        </text:list-item>
      </text:list>
      <text:p text:style-name="P142" loext:marker-style-name="T3"><text:span text:style-name="T9">memset() is used to fill a block of memory with a particular value.</text:span></text:p>
      <text:p text:style-name="P138" loext:marker-style-name="T3"><text:span text:style-name="T9">The syntax of memset() function is as follows :</text:span></text:p>
      <text:p text:style-name="P241" loext:marker-style-name="T3"><text:span text:style-name="T25">// ptr ==&gt; Starting address of memory to be filled</text:span></text:p>
      <text:p text:style-name="P241" loext:marker-style-name="T3"><text:span text:style-name="T25">// x <text:s text:c="2"/>==&gt; Value to be filled</text:span></text:p>
      <text:p text:style-name="P268" loext:marker-style-name="T3"><text:span text:style-name="T25">// n <text:s text:c="2"/>==&gt; Number of bytes to be filled starting // <text:s text:c="8"/>from ptr to be filled void *memset(void *ptr, int x, size_t n);</text:span></text:p>
      <text:p text:style-name="P142" loext:marker-style-name="T3"><text:span text:style-name="T9">Note that ptr is a void pointer, so that we can pass any type of pointer to this function.</text:span></text:p>
      <text:p text:style-name="P143" loext:marker-style-name="T3"><text:span text:style-name="T9">Let us see a simple example in C to demonstrate how memset() function is used:</text:span></text:p>
      <text:p text:style-name="P15">// C program to demonstrate working of memset()</text:p>
      <text:p text:style-name="P15">#include &lt;stdio.h&gt;</text:p>
      <text:p text:style-name="P15">#include &lt;string.h&gt;</text:p>
      <text:p text:style-name="P15">int main()</text:p>
      <text:p text:style-name="P15">{</text:p>
      <text:p text:style-name="P15"><text:tab/>char str[50] = "GeeksForGeeks is for programming geeks."; <text:s text:c="4"/><text:tab/>printf("\nBefore memset(): %s\n", str);</text:p>
      <text:p text:style-name="P15"><text:tab/>// Fill 8 characters starting from str[13] with '.'</text:p>
      <text:p text:style-name="P15"><text:tab/>memset(str + 13, '.', 8*sizeof(char));</text:p>
      <text:p text:style-name="P15"><text:soft-page-break/><text:tab/>printf("After memset(): <text:s/>%s", str);</text:p>
      <text:p text:style-name="P15"><text:tab/>return 0;</text:p>
      <text:p text:style-name="P15">}</text:p>
      <text:p text:style-name="P138" loext:marker-style-name="T3"><text:span text:style-name="T9">Output:</text:span></text:p>
      <text:p text:style-name="P236" loext:marker-style-name="T3"><text:span text:style-name="T25">Before memset(): GeeksForGeeks is for programming geeks.</text:span></text:p>
      <text:p text:style-name="P242" loext:marker-style-name="T3"><text:span text:style-name="T25">After memset(): GeeksForGeeks........programming geeks.</text:span></text:p>
      <text:p text:style-name="P138" loext:marker-style-name="T3"><text:span text:style-name="T9">Explanation: (str + 13) points to first space (0 based index) of the string “GeeksForGeeks is for programming geeks.”, and memset() sets the character ‘.’ starting from first ‘ ‘ of the string up to 8 character positions of the given string and hence we get the output as shown above.</text:span></text:p>
      <text:p text:style-name="P15">// C program to demonstrate working of memset()</text:p>
      <text:p text:style-name="P15">#include &lt;stdio.h&gt;</text:p>
      <text:p text:style-name="P15">#include &lt;string.h&gt;</text:p>
      <text:p text:style-name="P15">void printArray(int arr[], int n)</text:p>
      <text:p text:style-name="P15">{</text:p>
      <text:p text:style-name="P15"><text:tab/>for (int i=0; i&lt;n; i++)</text:p>
      <text:p text:style-name="P15"><text:tab/>{</text:p>
      <text:p text:style-name="P15"><text:tab/><text:tab/>printf("%d ", arr[i]);</text:p>
      <text:p text:style-name="P15"><text:tab/>}</text:p>
      <text:p text:style-name="P32"/>
      <text:p text:style-name="P15">int main()</text:p>
      <text:p text:style-name="P15">{</text:p>
      <text:p text:style-name="P15"><text:tab/>int n = 10;</text:p>
      <text:p text:style-name="P15"><text:tab/>int arr[n]; <text:s text:c="4"/>// Fill whole array with 0.</text:p>
      <text:p text:style-name="P15"><text:tab/>memset(arr, 0, n*sizeof(arr[0]));</text:p>
      <text:p text:style-name="P15"><text:tab/>printf("Array after memset()\n");</text:p>
      <text:p text:style-name="P15"><text:tab/>printArray(arr, n);</text:p>
      <text:p text:style-name="P15"><text:tab/>return 0;</text:p>
      <text:p text:style-name="P15">}</text:p>
      <text:p text:style-name="P42"><text:soft-page-break/></text:p>
      <text:p text:style-name="P138" loext:marker-style-name="T3"><text:span text:style-name="T9">Output:</text:span></text:p>
      <text:p text:style-name="P242" loext:marker-style-name="T3"><text:span text:style-name="T25">0 0 0 0 0 0 0 0 0 0</text:span></text:p>
      <text:p text:style-name="P142" loext:marker-style-name="T3"><text:span text:style-name="T9">Exercise:</text:span></text:p>
      <text:p text:style-name="P138" loext:marker-style-name="T3"><text:span text:style-name="T9">Predict the output of below program.</text:span></text:p>
      <text:p text:style-name="P15">// C program to demonstrate working of memset()</text:p>
      <text:p text:style-name="P15">#include &lt;stdio.h&gt;</text:p>
      <text:p text:style-name="P15">#include &lt;string.h&gt;</text:p>
      <text:p text:style-name="P15">void printArray(int arr[], int n)</text:p>
      <text:p text:style-name="P15">{</text:p>
      <text:p text:style-name="P15"><text:tab/>for (int i=0; i&lt;n; i++)</text:p>
      <text:p text:style-name="P15"><text:tab/>{</text:p>
      <text:p text:style-name="P15"><text:tab/><text:tab/>printf("%d ", arr[i]);</text:p>
      <text:p text:style-name="P15"><text:tab/>}</text:p>
      <text:p text:style-name="P15">}</text:p>
      <text:p text:style-name="P15">int main()</text:p>
      <text:p text:style-name="P15">{</text:p>
      <text:p text:style-name="P15"><text:tab/>int n = 10;</text:p>
      <text:p text:style-name="P15"><text:tab/>int arr[n]; <text:s text:c="4"/>// Fill whole array with 100.</text:p>
      <text:p text:style-name="P15"><text:tab/>memset(arr, 10, n*sizeof(arr[0]));</text:p>
      <text:p text:style-name="P15"><text:tab/>printf("Array after memset()\n");</text:p>
      <text:p text:style-name="P15"><text:tab/>printArray(arr, n);</text:p>
      <text:p text:style-name="P15"><text:tab/>return 0;</text:p>
      <text:p text:style-name="P15">}</text:p>
      <text:p text:style-name="P51">Note that the above code doesn’t set array values to 10 as memset works character by character and an integer contains more than one byte (or characters).</text:p>
      <text:p text:style-name="P52">However, if we replace 10 with -1, we get -1 values. Because representation of -1 contains all 1s in case of both char and int.</text:p>
      <text:list text:continue-numbering="true" text:style-name="WWNum9">
        <text:list-item>
          <text:h text:style-name="P86" text:outline-level="1" loext:marker-style-name="T3"><text:bookmark-start text:name="__RefHeading___Toc2172_1327778131"/><text:soft-page-break/><text:span text:style-name="T3"><text:s text:c="3"/></text:span><text:bookmark-start text:name="_Toc195978865"/><text:span text:style-name="T3">Dangling pointer</text:span><text:bookmark-end text:name="__RefHeading___Toc2172_1327778131"/><text:bookmark-end text:name="_Toc195978865"/></text:h>
        </text:list-item>
      </text:list>
      <text:p text:style-name="P142" loext:marker-style-name="T3"><text:span text:style-name="T9">A pointer pointing to a memory location that has been deleted (or freed) is called dangling pointer. It can also occur if a function returns a pointer to a local variable, once the function scope is exited, that local variable is destroyed, but the pointer still points to the now-invalid memory location.</text:span></text:p>
      <text:p text:style-name="P138" loext:marker-style-name="T3"><text:span text:style-name="T9">Example 1:</text:span></text:p>
      <text:p text:style-name="P15">#include &lt;stdlib.h&gt;</text:p>
      <text:p text:style-name="P15">int main()</text:p>
      <text:p text:style-name="P15">{</text:p>
      <text:p text:style-name="P15"><text:tab/>int* ptr = (int*)malloc(sizeof(int));</text:p>
      <text:p text:style-name="P15"><text:tab/>*ptr = 123;</text:p>
      <text:p text:style-name="P15"><text:tab/>free(ptr); //ptr has now become a dangling pointer.</text:p>
      <text:p text:style-name="P15"><text:tab/>return(0);</text:p>
      <text:p text:style-name="P15">}</text:p>
      <text:p text:style-name="P32"/>
      <text:p text:style-name="P138" loext:marker-style-name="T3"><text:span text:style-name="T9">Example 2:</text:span></text:p>
      <text:p text:style-name="P15">int* getPointer()</text:p>
      <text:p text:style-name="P15">{</text:p>
      <text:p text:style-name="P15"><text:s text:c="4"/>int x = 42;</text:p>
      <text:p text:style-name="P15"><text:s text:c="4"/>return &amp;x; <text:s/>// Returning address of a local variable</text:p>
      <text:p text:style-name="P15">}</text:p>
      <text:list text:continue-numbering="true" text:style-name="WWNum9">
        <text:list-item>
          <text:h text:style-name="P87" text:outline-level="1" loext:marker-style-name="T3"><text:bookmark-start text:name="__RefHeading___Toc2174_1327778131"/><text:span text:style-name="T3"><text:s text:c="3"/></text:span><text:bookmark-start text:name="_Toc195978866"/><text:span text:style-name="T3">Void pointer</text:span><text:bookmark-end text:name="__RefHeading___Toc2174_1327778131"/><text:bookmark-end text:name="_Toc195978866"/></text:h>
        </text:list-item>
      </text:list>
      <text:p text:style-name="P301" loext:marker-style-name="T3"><text:span text:style-name="T9">Void pointer is a specific pointer type – void * – a pointer that points to some data location in storage, which doesn’t have any specific type. Void refers to the type. Basically, the type of data that it points to is can be any. If we assign address of char data type to void pointer it will become char Pointer, if int data type then int pointer and so on. Any pointer type is convertible to a void pointer hence it can point to any value. Important Points void pointers cannot be dereferenced. It can however be done using typecasting the void pointer Pointer arithmetic is not possible on pointers of void due to lack of concrete value and thus size.</text:span></text:p>
      <text:p text:style-name="P138" loext:marker-style-name="T3"><text:span text:style-name="T9">Example:</text:span></text:p>
      <text:p text:style-name="P15">#include&lt;stdlib.h&gt;</text:p>
      <text:p text:style-name="P15"><text:soft-page-break/>int main()</text:p>
      <text:p text:style-name="P15">{</text:p>
      <text:p text:style-name="P15"><text:tab/>int x = 4;</text:p>
      <text:p text:style-name="P15"><text:tab/>float y = 5.5; //A void pointer</text:p>
      <text:p text:style-name="P15"><text:tab/>void *ptr;</text:p>
      <text:p text:style-name="P15"><text:tab/>ptr = &amp;x;</text:p>
      <text:p text:style-name="P15"><text:tab/>// (int*)ptr - does type casting of void.</text:p>
      <text:p text:style-name="P15"><text:tab/>// *((int*)ptr) dereferences the typecasted.</text:p>
      <text:p text:style-name="P15"><text:tab/>// void pointer variable.</text:p>
      <text:p text:style-name="P15"><text:tab/>printf("Integer variable is = %d", *((int*) ptr) ); // void pointer is now float</text:p>
      <text:p text:style-name="P15"><text:tab/>ptr = &amp;y; </text:p>
      <text:p text:style-name="P15"><text:tab/>printf("\nFloat variable is= %f", *((float*) ptr) ); return 0; </text:p>
      <text:p text:style-name="P15">}</text:p>
      <text:p text:style-name="P32"/>
      <text:p text:style-name="P138" loext:marker-style-name="T3"><text:span text:style-name="T9">Output:</text:span></text:p>
      <text:p text:style-name="P236" loext:marker-style-name="T3"><text:span text:style-name="T25">Integer variable is = 4</text:span></text:p>
      <text:p text:style-name="P260" loext:marker-style-name="T3"><text:span text:style-name="T25">Float variable is= 5.500000</text:span></text:p>
      <text:list text:continue-numbering="true" text:style-name="WWNum9">
        <text:list-item>
          <text:h text:style-name="P88" text:outline-level="1" loext:marker-style-name="T3"><text:bookmark-start text:name="__RefHeading___Toc2176_1327778131"/><text:span text:style-name="T3"><text:s text:c="3"/></text:span><text:bookmark-start text:name="_Toc195978867"/><text:span text:style-name="T3">NULL Pointer</text:span><text:bookmark-end text:name="__RefHeading___Toc2176_1327778131"/><text:bookmark-end text:name="_Toc195978867"/></text:h>
        </text:list-item>
      </text:list>
      <text:p text:style-name="P138" loext:marker-style-name="T3"><text:span text:style-name="T9">NULL Pointer is a pointer which is pointing to nothing. In case, if we don’t have address to be assigned to a pointer, then we can simply use NULL.</text:span></text:p>
      <text:p text:style-name="P15">#include &lt;stdio.h&gt;</text:p>
      <text:p text:style-name="P15">int main()</text:p>
      <text:p text:style-name="P15">{</text:p>
      <text:p text:style-name="P15"><text:tab/>// Null Pointer</text:p>
      <text:p text:style-name="P15"><text:tab/>int *ptr = NULL; </text:p>
      <text:p text:style-name="P15"><text:soft-page-break/><text:tab/>printf("The value of ptr is %u", ptr);</text:p>
      <text:p text:style-name="P15"><text:tab/>return 0; </text:p>
      <text:p text:style-name="P15">} </text:p>
      <text:p text:style-name="P42"/>
      <text:p text:style-name="P138" loext:marker-style-name="T3"><text:span text:style-name="T9">Output:</text:span></text:p>
      <text:p text:style-name="P258" loext:marker-style-name="T3"><text:span text:style-name="T25">The value of ptr is 0</text:span></text:p>
      <text:p text:style-name="P138" loext:marker-style-name="T3"><text:span text:style-name="T9">Important Points</text:span></text:p>
      <text:p text:style-name="P137" loext:marker-style-name="T3"><text:span text:style-name="T9">NULL vs Uninitialized pointer – An uninitialized pointer stores an undefined value. A null pointer stores a defined value, but one that is defined by the environment to not be a valid address for any member or object.</text:span></text:p>
      <text:p text:style-name="P144" loext:marker-style-name="T3"><text:span text:style-name="T9">NULL vs Void Pointer – Null pointer is a value, while void pointer is a type</text:span></text:p>
      <text:list text:continue-numbering="true" text:style-name="WWNum9">
        <text:list-item>
          <text:h text:style-name="P89" text:outline-level="1" loext:marker-style-name="T3"><text:bookmark-start text:name="__RefHeading___Toc2178_1327778131"/><text:span text:style-name="T3"><text:s text:c="3"/></text:span><text:bookmark-start text:name="_Toc195978868"/><text:span text:style-name="T3">Wild pointer</text:span><text:bookmark-end text:name="__RefHeading___Toc2178_1327778131"/><text:bookmark-end text:name="_Toc195978868"/></text:h>
        </text:list-item>
      </text:list>
      <text:p text:style-name="P276" loext:marker-style-name="T3"><text:span text:style-name="T9">A pointer which has not been initialized to anything (not even NULL) is known as wild pointer. The pointer may be initialized to a non-NULL garbage value that may not be a valid address.</text:span></text:p>
      <text:p text:style-name="P276" loext:marker-style-name="T3"><text:span text:style-name="T25">int main()</text:span></text:p>
      <text:p text:style-name="P276" loext:marker-style-name="T3"><text:span text:style-name="T25">{</text:span></text:p>
      <text:p text:style-name="P276" loext:marker-style-name="T3"><text:span text:style-name="T25"><text:tab/>int *p; <text:s/>/* wild pointer */</text:span></text:p>
      <text:p text:style-name="P276" loext:marker-style-name="T3"><text:span text:style-name="T25"><text:tab/>int x = 10;</text:span></text:p>
      <text:p text:style-name="P276" loext:marker-style-name="T3"><text:span text:style-name="T25"><text:tab/>p = &amp;x; <text:s/>//p is not a wild pointer now.</text:span></text:p>
      <text:p text:style-name="P15"><text:tab/>return 0; </text:p>
      <text:p text:style-name="P15">} </text:p>
      <text:list text:continue-numbering="true" text:style-name="WWNum9">
        <text:list-item>
          <text:h text:style-name="P90" text:outline-level="1" loext:marker-style-name="T3"><text:bookmark-start text:name="__RefHeading___Toc2180_1327778131"/><text:span text:style-name="T3"><text:s text:c="3"/></text:span><text:bookmark-start text:name="_Toc195978869"/><text:span text:style-name="T3">Double Pointer (Pointer to Pointer)</text:span><text:bookmark-end text:name="__RefHeading___Toc2180_1327778131"/><text:bookmark-end text:name="_Toc195978869"/></text:h>
        </text:list-item>
      </text:list>
      <text:p text:style-name="P145" loext:marker-style-name="T3"><text:span text:style-name="T9">We already know that a pointer points to a location in memory and thus used to store address of variables. So, when we define a pointer to pointer. The first pointer is used to store the address of second pointer. That is why they are also known as double pointers.</text:span></text:p>
      <text:p text:style-name="P142" loext:marker-style-name="T3"><text:span text:style-name="T9">How to declare a pointer to pointer in C?</text:span></text:p>
      <text:p text:style-name="P137" loext:marker-style-name="T3"><text:soft-page-break/><text:span text:style-name="T9">Declaring Pointer to Pointer is similar to declaring pointer in C. The difference is we have to place an additional ‘*’ before the name of pointer.</text:span></text:p>
      <text:p text:style-name="P138" loext:marker-style-name="T3"><text:span text:style-name="T9">Syntax:</text:span></text:p>
      <text:p text:style-name="P242" loext:marker-style-name="T3"><text:span text:style-name="T25">int **ptr; <text:s text:c="3"/>// declaring double pointers</text:span></text:p>
      <text:p text:style-name="P138" loext:marker-style-name="T3"><text:span text:style-name="T9">Below diagram explains the concept of Double Pointers:</text:span></text:p>
      <text:p text:style-name="P249" loext:marker-style-name="T3"><draw:frame draw:style-name="fr2" draw:name="Picture 55232" text:anchor-type="as-char" svg:width="15.857cm" svg:height="3.919cm" draw:z-index="0"><draw:image xlink:href="Pictures/1000000100000751000001CFE97EAF59.png" xlink:type="simple" xlink:show="embed" xlink:actuate="onLoad" draw:mime-type="image/png"/></draw:frame></text:p>
      <text:p text:style-name="P137" loext:marker-style-name="T3"><text:span text:style-name="T9">The above diagram shows the memory representation of a pointer to pointer. The first pointer ptr1 stores the address of the second pointer ptr2 and the second pointer ptr2 stores the address of the variable.</text:span></text:p>
      <text:p text:style-name="P138" loext:marker-style-name="T3"><text:span text:style-name="T9">Let us understand this more clearly with the help of below program:</text:span></text:p>
      <text:p text:style-name="P15">// C program to demonstrate pointer to pointer #include &lt;stdio.h&gt; int main()</text:p>
      <text:p text:style-name="P15">{</text:p>
      <text:p text:style-name="P15"><text:tab/>int var = 789; // pointer for var</text:p>
      <text:p text:style-name="P15"><text:tab/>int *ptr2; // double pointer for ptr2</text:p>
      <text:p text:style-name="P15"><text:tab/>int **ptr1; // storing address of var in ptr2</text:p>
      <text:p text:style-name="P15"><text:tab/>ptr2 = &amp;var; // Storing address of ptr2 in ptr1</text:p>
      <text:p text:style-name="P15"><text:tab/>ptr1 = &amp;ptr2;</text:p>
      <text:p text:style-name="P15"><text:tab/>/* Displaying value of var using both single and double <text:tab/>pointers. */</text:p>
      <text:p text:style-name="P15"><text:tab/>printf("Value of var = %d\n", var ); </text:p>
      <text:p text:style-name="P15"><text:tab/>printf("Value of var using single pointer = %d\n", *ptr2 ); <text:tab/>printf("Value of var using double pointer = %d\n", **ptr1); <text:tab/>return 0; </text:p>
      <text:p text:style-name="P15">} </text:p>
      <text:p text:style-name="P32"><text:soft-page-break/></text:p>
      <text:p text:style-name="P138" loext:marker-style-name="T3"><text:span text:style-name="T9">Output:</text:span></text:p>
      <text:p text:style-name="P236" loext:marker-style-name="T3"><text:span text:style-name="T25">Value of var = 789</text:span></text:p>
      <text:p text:style-name="P269" loext:marker-style-name="T3"><text:span text:style-name="T25">Value of var using single pointer = 789 Value of var using double pointer = 789</text:span></text:p>
      <text:h text:style-name="P61" text:outline-level="2" loext:marker-style-name="T3"><text:span text:style-name="T3">Call by reference function</text:span></text:h>
      <text:p text:style-name="P137" loext:marker-style-name="T3"><text:span text:style-name="T9">The call by reference method of passing arguments to a function copies the address of an argument into the formal parameter. Inside the function, the address is used to access the actual argument used in the call. It means the changes made to the parameter affect the passed argument.</text:span></text:p>
      <text:p text:style-name="P138" loext:marker-style-name="T3"><text:span text:style-name="T9">To pass a value by reference, argument pointers are passed to the functions just like any other value. So accordingly you need to declare the function parameters as pointer types as in the following function swap(), which exchanges the values of the two integer variables pointed to, by their arguments.</text:span></text:p>
      <text:p text:style-name="P15">/* Function definition to swap the values */</text:p>
      <text:p text:style-name="P15">int swap(int *x, int *y)</text:p>
      <text:p text:style-name="P15">{</text:p>
      <text:p text:style-name="P15"><text:tab/>int temp;</text:p>
      <text:p text:style-name="P15"><text:tab/>temp = *x; <text:s text:c="3"/>/* save the value at address x */</text:p>
      <text:p text:style-name="P15"><text:tab/>*x = *y; <text:s text:c="5"/>/* put y into x */</text:p>
      <text:p text:style-name="P15"><text:tab/>*y = temp; <text:s text:c="3"/>/* put temp into y */</text:p>
      <text:p text:style-name="P15"><text:tab/>return 0;</text:p>
      <text:p text:style-name="P15">}</text:p>
      <text:p text:style-name="P143" loext:marker-style-name="T3"><text:span text:style-name="T9">Let us now call the function swap() by passing values by reference as in the following example −</text:span></text:p>
      <text:p text:style-name="P15">#include &lt;stdio.h&gt;</text:p>
      <text:p text:style-name="P15">/* Function declaration */</text:p>
      <text:p text:style-name="P15">void swap(int *x, int *y);</text:p>
      <text:p text:style-name="P32"/>
      <text:p text:style-name="P15">int main ()</text:p>
      <text:p text:style-name="P15"><text:soft-page-break/>{</text:p>
      <text:p text:style-name="P15"><text:tab/>/* Local variable definition */</text:p>
      <text:p text:style-name="P15"><text:tab/>int a = 100;</text:p>
      <text:p text:style-name="P15"><text:tab/>int b = 200;</text:p>
      <text:p text:style-name="P15"><text:tab/>printf("Before swap, value of a : %d\n", a );</text:p>
      <text:p text:style-name="P15"><text:tab/>printf("Before swap, value of b : %d\n", b );</text:p>
      <text:p text:style-name="P15"><text:tab/>/* Calling a function to swap the values. * &amp;a indicates pointer to a ie. address of variable a and * &amp;b indicates pointer to b ie. address of variable b. */</text:p>
      <text:p text:style-name="P15"><text:tab/>swap(&amp;a, &amp;b);</text:p>
      <text:p text:style-name="P15"><text:tab/>printf("After swap, value of a : %d\n", a );</text:p>
      <text:p text:style-name="P15"><text:tab/>printf("After swap, value of b : %d\n", b );</text:p>
      <text:p text:style-name="P15"><text:tab/>return 0;</text:p>
      <text:p text:style-name="P15">}</text:p>
      <text:p text:style-name="P138" loext:marker-style-name="T3"><text:span text:style-name="T9">Let us put the above code in a single C file, compile and execute it, to produce the following result −</text:span></text:p>
      <text:p text:style-name="P236" loext:marker-style-name="T3"><text:span text:style-name="T25">Before swap, value of a :100</text:span></text:p>
      <text:p text:style-name="P270" loext:marker-style-name="T3"><text:span text:style-name="T25">Before swap, value of b :200 After swap, value of a :200</text:span></text:p>
      <text:p text:style-name="P258" loext:marker-style-name="T3"><text:span text:style-name="T25">After swap, value of b :100</text:span></text:p>
      <text:p text:style-name="P141" loext:marker-style-name="T3"><text:span text:style-name="T9">It shows that the change has reflected outside the function as well, unlike call by value where the changes do not reflect outside the function.</text:span></text:p>
      <text:list text:continue-numbering="true" text:style-name="WWNum9">
        <text:list-item>
          <text:h text:style-name="P91" text:outline-level="1" loext:marker-style-name="T3"><text:bookmark-start text:name="__RefHeading___Toc2182_1327778131"/><text:span text:style-name="T3"><text:s text:c="3"/></text:span><text:bookmark-start text:name="_Toc195978870"/><text:span text:style-name="T3">Call by value function</text:span><text:bookmark-end text:name="__RefHeading___Toc2182_1327778131"/><text:bookmark-end text:name="_Toc195978870"/></text:h>
        </text:list-item>
      </text:list>
      <text:p text:style-name="P138" loext:marker-style-name="T3"><text:span text:style-name="T9">The call by value method of passing arguments to a function copies the actual value of an argument into the formal parameter of the function. In this case, changes made to the parameter inside the function have no effect on the argument.</text:span></text:p>
      <text:p text:style-name="P146" loext:marker-style-name="T3"><text:soft-page-break/><text:span text:style-name="T9">By default, C programming uses call by value to pass arguments. In general, it means the code within a function cannot alter the arguments used to call the function. Consider the function swap() definition as follows.</text:span></text:p>
      <text:p text:style-name="P15">/* Function definition to swap the values */</text:p>
      <text:p text:style-name="P15">int swap(int x, int y)</text:p>
      <text:p text:style-name="P15">{</text:p>
      <text:p text:style-name="P15"><text:tab/>int temp;</text:p>
      <text:p text:style-name="P15"><text:tab/>temp = x; /* save the value of x */</text:p>
      <text:p text:style-name="P15"><text:tab/>x = y; <text:s text:c="3"/>/* put y into x */</text:p>
      <text:p text:style-name="P15"><text:tab/>y = temp; /* put temp into y */</text:p>
      <text:p text:style-name="P15"><text:tab/>return 0;</text:p>
      <text:p text:style-name="P15">}</text:p>
      <text:p text:style-name="P147" loext:marker-style-name="T3"><text:span text:style-name="T9">Now, let us call the function swap() by passing actual values as in the following example −</text:span></text:p>
      <text:p text:style-name="P15">#include &lt;stdio.h&gt;</text:p>
      <text:p text:style-name="P15">/* function declaration */</text:p>
      <text:p text:style-name="P15">void swap(int x, int y);</text:p>
      <text:p text:style-name="P15">int main ()</text:p>
      <text:p text:style-name="P15">{</text:p>
      <text:p text:style-name="P15">/* local variable definition */</text:p>
      <text:p text:style-name="P15"><text:tab/>int a = 100;</text:p>
      <text:p text:style-name="P15"><text:tab/>int b = 200;</text:p>
      <text:p text:style-name="P15"><text:tab/>printf("Before swap, value of a : %d\n", a );</text:p>
      <text:p text:style-name="P15"><text:tab/>printf("Before swap, value of b : %d\n", b );</text:p>
      <text:p text:style-name="P15"><text:tab/>/* calling a function to swap the values */</text:p>
      <text:p text:style-name="P15"><text:tab/>swap(a, b);</text:p>
      <text:p text:style-name="P15"><text:tab/>printf("After swap, value of a : %d\n", a );</text:p>
      <text:p text:style-name="P15"><text:soft-page-break/><text:tab/>printf("After swap, value of b : %d\n", b );</text:p>
      <text:p text:style-name="P15"><text:tab/>return 0;</text:p>
      <text:p text:style-name="P15">}</text:p>
      <text:p text:style-name="P138" loext:marker-style-name="T3"><text:span text:style-name="T9">Let us put the above code in a single C file, compile and execute it, it will produce the following result.</text:span></text:p>
      <text:p text:style-name="P236" loext:marker-style-name="T3"><text:span text:style-name="T25">Before swap, value of a :100</text:span></text:p>
      <text:p text:style-name="P270" loext:marker-style-name="T3"><text:span text:style-name="T25">Before swap, value of b :200 After swap, value of a :100</text:span></text:p>
      <text:p text:style-name="P242" loext:marker-style-name="T3"><text:span text:style-name="T25">After swap, value of b :200</text:span></text:p>
      <text:p text:style-name="P144" loext:marker-style-name="T3"><text:span text:style-name="T9">It shows that there are no changes in the values, though they had been changed inside the function.</text:span></text:p>
      <text:list text:continue-numbering="true" text:style-name="WWNum9">
        <text:list-item>
          <text:h text:style-name="P92" text:outline-level="1" loext:marker-style-name="T3"><text:bookmark-start text:name="__RefHeading___Toc2184_1327778131"/><text:span text:style-name="T3"><text:s text:c="3"/></text:span><text:bookmark-start text:name="_Toc195978871"/><text:span text:style-name="T3">volatile and const volatile keyword</text:span><text:bookmark-end text:name="__RefHeading___Toc2184_1327778131"/><text:bookmark-end text:name="_Toc195978871"/></text:h>
        </text:list-item>
      </text:list>
      <text:p text:style-name="P302" loext:marker-style-name="T3"><text:span text:style-name="T9">Used to avoid compiler optimizations for the specified variable. Normally used with interrupts and GPIO pins. Used to tell that the value of the variable can change at any time.</text:span></text:p>
      <text:p text:style-name="P302" loext:marker-style-name="T3"><text:span text:style-name="T25">volatile int x;</text:span></text:p>
      <text:p text:style-name="P148" loext:marker-style-name="T3"><text:span text:style-name="T25">const </text:span><text:span text:style-name="T9">means that the value isn’t modifiable by the program.</text:span></text:p>
      <text:p text:style-name="P149" loext:marker-style-name="T3"><text:span text:style-name="T9">And volatile means that the value is subject to sudden change (possibly from outside the program).</text:span></text:p>
      <text:p text:style-name="P303" loext:marker-style-name="T3"><text:span text:style-name="T9">In fact, the C Standard gives an example of a valid declaration which is both</text:span><text:span text:style-name="T25"> const </text:span><text:span text:style-name="T9">and </text:span><text:span text:style-name="T25">volatile</text:span><text:span text:style-name="T9">. The example is:</text:span></text:p>
      <text:p text:style-name="P243" loext:marker-style-name="T3"><text:span text:style-name="T25">const volatile int real_time_clock;</text:span></text:p>
      <text:p text:style-name="P304" loext:marker-style-name="T3"><text:span text:style-name="T9">where,</text:span><text:span text:style-name="T25"> real_time_clock </text:span><text:span text:style-name="T9">may be modifiable by hardware, but cannot be assigned to, incremented, or decremented.</text:span></text:p>
      <text:list text:continue-numbering="true" text:style-name="WWNum9">
        <text:list-item>
          <text:h text:style-name="P93" text:outline-level="1" loext:marker-style-name="T3"><text:bookmark-start text:name="__RefHeading___Toc2186_1327778131"/><text:span text:style-name="T3"><text:s text:c="3"/>s</text:span><text:bookmark-start text:name="_Toc195978872"/><text:span text:style-name="T3">tatic extern is invalid</text:span><text:bookmark-end text:name="__RefHeading___Toc2186_1327778131"/><text:bookmark-end text:name="_Toc195978872"/></text:h>
        </text:list-item>
      </text:list>
      <text:p text:style-name="P306" loext:marker-style-name="T3"><text:span text:style-name="T25">static</text:span><text:span text:style-name="T9"> and </text:span><text:span text:style-name="T25">extern</text:span><text:span text:style-name="T9"> keywords cannot be used together, while declaring a variable as below: </text:span><text:span text:style-name="T25">static extern int num;</text:span></text:p>
      <text:p text:style-name="P305" loext:marker-style-name="T3"><text:span text:style-name="T9">Because, </text:span><text:span text:style-name="T25">static</text:span><text:span text:style-name="T9"> restricts the variable to the file in which it is declared and </text:span><text:span text:style-name="T25">extern</text:span><text:span text:style-name="T9"> is used to access the variable from another file to this file. Both of these are contradictory and creates a conflict.</text:span></text:p>
      <text:list text:continue-numbering="true" text:style-name="WWNum9">
        <text:list-item>
          <text:h text:style-name="P94" text:outline-level="1" loext:marker-style-name="T3"><text:bookmark-start text:name="__RefHeading___Toc2188_1327778131"/><text:soft-page-break/><text:span text:style-name="T3"><text:s text:c="3"/>i</text:span><text:bookmark-start text:name="_Toc195978873"/><text:span text:style-name="T3">nline Function</text:span><text:bookmark-end text:name="__RefHeading___Toc2188_1327778131"/><text:bookmark-end text:name="_Toc195978873"/></text:h>
        </text:list-item>
      </text:list>
      <text:p text:style-name="P150" loext:marker-style-name="T3"><text:span text:style-name="T9">Inline Function are those function whose definitions are small and be substituted at the place where its function call is happened. Function substitution is totally compiler choice.</text:span></text:p>
      <text:p text:style-name="P15">#include &lt;stdio.h&gt;</text:p>
      <text:p text:style-name="P15">// Inline function in C</text:p>
      <text:p text:style-name="P15">inline int foo()</text:p>
      <text:p text:style-name="P15">{</text:p>
      <text:p text:style-name="P15"><text:tab/>return 2;</text:p>
      <text:p text:style-name="P15">}</text:p>
      <text:p text:style-name="P32"/>
      <text:p text:style-name="P15">// Driver code</text:p>
      <text:p text:style-name="P15">int main()</text:p>
      <text:p text:style-name="P15">{</text:p>
      <text:p text:style-name="P15"><text:tab/>int ret; <text:s text:c="4"/>// inline function call</text:p>
      <text:p text:style-name="P15"><text:tab/>ret = foo();</text:p>
      <text:p text:style-name="P15"><text:tab/>printf("Output is: %d\n", ret);</text:p>
      <text:p text:style-name="P15"><text:tab/>return 0;</text:p>
      <text:p text:style-name="P15">}</text:p>
      <text:p text:style-name="P138" loext:marker-style-name="T3"><text:span text:style-name="T9">Output:</text:span></text:p>
      <text:p text:style-name="P236" loext:marker-style-name="T3"><text:span text:style-name="T25">In function `main':</text:span></text:p>
      <text:p text:style-name="P258" loext:marker-style-name="T3"><text:span text:style-name="T25">undefined reference to `foo'</text:span></text:p>
      <text:p text:style-name="P142" loext:marker-style-name="T3"><text:span text:style-name="T9">Why this error happened?</text:span></text:p>
      <text:p text:style-name="P138" loext:marker-style-name="T3"><text:span text:style-name="T9">This is one of the side effects of GCC the way it handles inline function, when compiled, GCC performs inline substitution as the part of optimisation. So, there is no function call present (foo) inside main.</text:span><text:span text:style-name="T3"> </text:span><text:span text:style-name="T9">Normally GCC’s file scope is “not extern linkage”. That means inline function is never ever provided to the linker which is causing linker error, mentioned above.</text:span></text:p>
      <text:p text:style-name="P138" loext:marker-style-name="T3"><text:span text:style-name="T9">How to remove this error?</text:span></text:p>
      <text:p text:style-name="P137" loext:marker-style-name="T3"><text:soft-page-break/><text:span text:style-name="T9">To resolve this problem use “static” before inline. Using static keyword forces the compiler to consider this inline function in the linker, and hence the program compiles and runs successfully.</text:span></text:p>
      <text:p text:style-name="P138" loext:marker-style-name="T3"><text:span text:style-name="T9">Example:</text:span></text:p>
      <text:p text:style-name="P15">#include &lt;stdio.h&gt;// Inline function in C</text:p>
      <text:p text:style-name="P15">static inline int foo()</text:p>
      <text:p text:style-name="P15">{</text:p>
      <text:p text:style-name="P15"><text:tab/>return 2;</text:p>
      <text:p text:style-name="P15">}</text:p>
      <text:p text:style-name="P32"/>
      <text:p text:style-name="P15">// Driver code<text:line-break/>int main()</text:p>
      <text:p text:style-name="P15">{</text:p>
      <text:p text:style-name="P15"><text:tab/>int ret; // inline function call</text:p>
      <text:p text:style-name="P15"><text:tab/>ret = foo();</text:p>
      <text:p text:style-name="P15"><text:tab/>printf("Output is: %d\n", ret);</text:p>
      <text:p text:style-name="P15"><text:tab/>return 0;</text:p>
      <text:p text:style-name="P15">}</text:p>
      <text:p text:style-name="P138" loext:marker-style-name="T3"><text:span text:style-name="T9">Output:</text:span></text:p>
      <text:p text:style-name="P260" loext:marker-style-name="T3"><text:span text:style-name="T25">Output is: 2</text:span></text:p>
      <text:list text:continue-numbering="true" text:style-name="WWNum9">
        <text:list-item>
          <text:h text:style-name="P95" text:outline-level="1" loext:marker-style-name="T3"><text:bookmark-start text:name="__RefHeading___Toc2190_1327778131"/><text:span text:style-name="T3"><text:s text:c="3"/></text:span><text:bookmark-start text:name="_Toc195978874"/><text:span text:style-name="T3">Storage class</text:span><text:bookmark-end text:name="__RefHeading___Toc2190_1327778131"/><text:bookmark-end text:name="_Toc195978874"/></text:h>
        </text:list-item>
      </text:list>
      <text:p text:style-name="P50">A storage class defines the scope (visibility) and life-time of variables and/or functions within a C Program. They precede the type that they modify. We have four different storage classes in a C program</text:p>
      <text:p text:style-name="P53">auto</text:p>
      <text:p text:style-name="P307" loext:marker-style-name="T3"><text:span text:style-name="T21">static</text:span></text:p>
      <text:p text:style-name="P307" loext:marker-style-name="T3"><text:span text:style-name="T21">register</text:span></text:p>
      <text:p text:style-name="P197" loext:marker-style-name="T3"><text:soft-page-break/><text:span text:style-name="T21">extern</text:span></text:p>
      <text:h text:style-name="P65" text:outline-level="2" loext:marker-style-name="T3"><text:span text:style-name="T3">1)<text:tab/>auto</text:span></text:h>
      <text:p text:style-name="P147" loext:marker-style-name="T3"><text:span text:style-name="T9">The auto storage class is the default storage class for all local variables.</text:span></text:p>
      <text:p text:style-name="P15">{</text:p>
      <text:p text:style-name="P15"><text:tab/>int mount;</text:p>
      <text:p text:style-name="P15"><text:tab/>auto int month;</text:p>
      <text:p text:style-name="P15">}</text:p>
      <text:p text:style-name="P145" loext:marker-style-name="T3"><text:span text:style-name="T9">The example above defines two variables with in the same storage class. 'auto' can only be used within functions, i.e., local variables.</text:span></text:p>
      <text:h text:style-name="P66" text:outline-level="2" loext:marker-style-name="T3"><text:span text:style-name="T3">2)<text:tab/> register</text:span></text:h>
      <text:p text:style-name="P150" loext:marker-style-name="T3"><text:span text:style-name="T9">The register storage class is used to define local variables that should be stored in a register instead of RAM. This means that the variable has a maximum size equal to the register size (usually one word) and can't have the unary '&amp;' operator applied to it (as it does not have a memory location).</text:span></text:p>
      <text:p text:style-name="P15">{</text:p>
      <text:p text:style-name="P15"><text:tab/>register int miles;</text:p>
      <text:p text:style-name="P15">}</text:p>
      <text:p text:style-name="P145" loext:marker-style-name="T3"><text:span text:style-name="T9">The register should only be used for variables that require quick access such as counters. It should also be noted that defining 'register' does not mean that the variable will be stored in a register. It means that it MIGHT be stored in a register depending on hardware and implementation restrictions.</text:span></text:p>
      <text:h text:style-name="P67" text:outline-level="2" loext:marker-style-name="T3"><text:span text:style-name="T3">3)<text:tab/>static</text:span></text:h>
      <text:p text:style-name="P137" loext:marker-style-name="T3"><text:span text:style-name="T9">The static storage class instructs the compiler to keep a local variable in existence during the life-time of the program instead of creating and destroying it each time it comes into and goes out of scope. Therefore, making local variables static allows them to maintain their values between function calls.</text:span></text:p>
      <text:p text:style-name="P137" loext:marker-style-name="T3"><text:span text:style-name="T9">The static modifier may also be applied to global variables. When this is done, it causes that variable's scope to be restricted to the file in which it is declared.</text:span></text:p>
      <text:p text:style-name="P138" loext:marker-style-name="T3"><text:span text:style-name="T9">Example:</text:span></text:p>
      <text:p text:style-name="P15"><text:soft-page-break/>#include &lt;stdio.h&gt;</text:p>
      <text:p text:style-name="P15">static int count = 5;</text:p>
      <text:p text:style-name="P15">/* <text:span text:style-name="T46">G</text:span>lobal <text:span text:style-name="T46">static </text:span>variable only accessible inside this file. It cannot be accessed with extern keyword from another file. */</text:p>
      <text:p text:style-name="P17">void func(void);</text:p>
      <text:p text:style-name="P17"/>
      <text:p text:style-name="P15">int main()</text:p>
      <text:p text:style-name="P15">{</text:p>
      <text:p text:style-name="P15"><text:tab/>while(count--)</text:p>
      <text:p text:style-name="P15"><text:tab/>{</text:p>
      <text:p text:style-name="P15"><text:tab/><text:tab/>func();</text:p>
      <text:p text:style-name="P15"><text:tab/>}</text:p>
      <text:p text:style-name="P15"><text:tab/>return 0;</text:p>
      <text:p text:style-name="P15">}</text:p>
      <text:p text:style-name="P32"/>
      <text:p text:style-name="P15">/* function definition */</text:p>
      <text:p text:style-name="P15">void func(void)</text:p>
      <text:p text:style-name="P15">{</text:p>
      <text:p text:style-name="P15"><text:tab/>static int i = 5; /* Local static variable. It gets initialized only once <text:span text:style-name="T46">and retains its </text:span><text:span text:style-name="T47">updated </text:span><text:span text:style-name="T46">value over successive this function calls. </text:span><text:span text:style-name="T47">It is invisible to outside this function. </text:span><text:span text:style-name="T48">It is stored in initialized .data segment.</text:span> */</text:p>
      <text:p text:style-name="P15"><text:tab/>i++;</text:p>
      <text:p text:style-name="P15"><text:tab/>printf("i is %d and count is %d\n", i, count);</text:p>
      <text:p text:style-name="P15">}</text:p>
      <text:p text:style-name="P308" loext:marker-style-name="T3"><text:span text:style-name="T9">When the above code is compiled and executed, it produces the following result </text:span><text:span text:style-name="T25">i is 6 and count is 4</text:span></text:p>
      <text:p text:style-name="P308" loext:marker-style-name="T3"><text:soft-page-break/><text:span text:style-name="T25">i is 7 and count is 3</text:span></text:p>
      <text:p text:style-name="P308" loext:marker-style-name="T3"><text:span text:style-name="T25">i is 8 and count is 2</text:span></text:p>
      <text:p text:style-name="P308" loext:marker-style-name="T3"><text:span text:style-name="T25">i is 9 and count is 1</text:span></text:p>
      <text:p text:style-name="P308" loext:marker-style-name="T3"><text:span text:style-name="T25">i is 10 and count is 0</text:span></text:p>
      <text:h text:style-name="P68" text:outline-level="2" loext:marker-style-name="T3"><text:span text:style-name="T3">4)<text:tab/>extern</text:span></text:h>
      <text:p text:style-name="P137" loext:marker-style-name="T3"><text:span text:style-name="T9">The extern storage class is used to give a reference of a global variable that is visible to ALL the program files. When you use 'extern', the variable cannot be initialized however, it points the variable name at a storage location that has been previously defined.</text:span></text:p>
      <text:p text:style-name="P137" loext:marker-style-name="T3"><text:span text:style-name="T9">When you have multiple files and you define a global variable or function, which will also be used in other files, then extern will be used in another file to provide the reference of defined variable or function. Just for understanding, extern is used to declare a global variable or function in another file.</text:span></text:p>
      <text:p text:style-name="P145" loext:marker-style-name="T3"><text:span text:style-name="T9">The extern modifier is most commonly used when there are two or more files sharing the same global variables or functions as explained below.</text:span></text:p>
      <text:p text:style-name="P138" loext:marker-style-name="T3"><text:span text:style-name="T9">First File: main.c</text:span></text:p>
      <text:p text:style-name="P15">#include &lt;stdio.h&gt;</text:p>
      <text:p text:style-name="P15">int count;</text:p>
      <text:p text:style-name="P15">extern void write_extern();</text:p>
      <text:p text:style-name="P15">int main()</text:p>
      <text:p text:style-name="P15">{</text:p>
      <text:p text:style-name="P15"><text:tab/>count = 5;</text:p>
      <text:p text:style-name="P15"><text:tab/>write_extern();</text:p>
      <text:p text:style-name="P15">}</text:p>
      <text:p text:style-name="P138" loext:marker-style-name="T3"><text:span text:style-name="T9">Second File: support.c</text:span></text:p>
      <text:p text:style-name="P15">#include &lt;stdio.h&gt;</text:p>
      <text:p text:style-name="P15">extern int count;</text:p>
      <text:p text:style-name="P15">void write_extern(void)</text:p>
      <text:p text:style-name="P15">{</text:p>
      <text:p text:style-name="P15"><text:tab/>printf("count is %d\n", count);</text:p>
      <text:p text:style-name="P15"><text:soft-page-break/>}</text:p>
      <text:p text:style-name="P138" loext:marker-style-name="T3"><text:span text:style-name="T9">Here, extern is being used to declare count in the second file, where as it has its definition in the first file, main.c. Now, compile these two files as follows −</text:span></text:p>
      <text:p text:style-name="P242" loext:marker-style-name="T3"><text:span text:style-name="T25">$ gcc main.c support.c</text:span></text:p>
      <text:p text:style-name="P138" loext:marker-style-name="T3"><text:span text:style-name="T9">It will produce the executable program a.out. When this program is executed, it produces the following result.</text:span></text:p>
      <text:p text:style-name="P259" loext:marker-style-name="T3"><text:span text:style-name="T25">count is 5</text:span></text:p>
      <text:list text:continue-numbering="true" text:style-name="WWNum9">
        <text:list-item>
          <text:h text:style-name="P96" text:outline-level="1" loext:marker-style-name="T3"><text:bookmark-start text:name="__RefHeading___Toc2192_1327778131"/><text:span text:style-name="T3"><text:s text:c="3"/></text:span><text:bookmark-start text:name="_Toc195978875"/><text:span text:style-name="T3">Structure declaration and definition</text:span><text:bookmark-end text:name="__RefHeading___Toc2192_1327778131"/><text:bookmark-end text:name="_Toc195978875"/></text:h>
        </text:list-item>
      </text:list>
      <text:p text:style-name="P15">struct student</text:p>
      <text:p text:style-name="P15">{</text:p>
      <text:p text:style-name="P15"><text:tab/>int id;</text:p>
      <text:p text:style-name="P15"><text:tab/>char name[20];</text:p>
      <text:p text:style-name="P15">};</text:p>
      <text:p text:style-name="P32"/>
      <text:p text:style-name="P15">int main()</text:p>
      <text:p text:style-name="P15">{</text:p>
      <text:p text:style-name="P15"><text:tab/>struct student record;</text:p>
      <text:p text:style-name="P15"><text:tab/>record.id = 12;</text:p>
      <text:p text:style-name="P15"><text:tab/>strcpy(record.name, "Raju");</text:p>
      <text:p text:style-name="P15"><text:tab/>return(0);</text:p>
      <text:p text:style-name="P15">}</text:p>
      <text:p text:style-name="P276" loext:marker-style-name="T3"><text:span text:style-name="T9">OR</text:span></text:p>
      <text:p text:style-name="P276" loext:marker-style-name="T3"><text:span text:style-name="T25">struct student</text:span></text:p>
      <text:p text:style-name="P276" loext:marker-style-name="T3"><text:span text:style-name="T25">{</text:span></text:p>
      <text:p text:style-name="P276" loext:marker-style-name="T3"><text:span text:style-name="T25"><text:tab/>int id;</text:span></text:p>
      <text:p text:style-name="P276" loext:marker-style-name="T3"><text:span text:style-name="T25"><text:tab/>char name[20];</text:span></text:p>
      <text:p text:style-name="P15"><text:soft-page-break/>}record;</text:p>
      <text:p text:style-name="P32"/>
      <text:p text:style-name="P15">int main()</text:p>
      <text:p text:style-name="P15">{</text:p>
      <text:p text:style-name="P15"><text:tab/>record.id = 12;</text:p>
      <text:p text:style-name="P15"><text:tab/>strcpy(record.name, "Raju");</text:p>
      <text:p text:style-name="P15"><text:tab/>return(0);</text:p>
      <text:p text:style-name="P15">}</text:p>
      <text:list text:continue-numbering="true" text:style-name="WWNum9">
        <text:list-item>
          <text:h text:style-name="P85" text:outline-level="1" loext:marker-style-name="T3"><text:bookmark-start text:name="__RefHeading___Toc2194_1327778131"/><text:span text:style-name="T3"><text:s text:c="3"/></text:span><text:bookmark-start text:name="_Toc195978876"/><text:span text:style-name="T3">typedef and struct</text:span><text:bookmark-end text:name="__RefHeading___Toc2194_1327778131"/><text:bookmark-end text:name="_Toc195978876"/></text:h>
        </text:list-item>
      </text:list>
      <text:p text:style-name="P15">typedef struct</text:p>
      <text:p text:style-name="P15">{</text:p>
      <text:p text:style-name="P15"><text:tab/>int x, y;</text:p>
      <text:p text:style-name="P15">} Point;</text:p>
      <text:p text:style-name="P15">Point point_new(int x, int y)</text:p>
      <text:p text:style-name="P15">{</text:p>
      <text:p text:style-name="P15"><text:tab/>Point a;</text:p>
      <text:p text:style-name="P15"><text:tab/>a.x = x;</text:p>
      <text:p text:style-name="P15"><text:tab/>a.y = y;</text:p>
      <text:p text:style-name="P15"><text:tab/>return a;</text:p>
      <text:p text:style-name="P15">}</text:p>
      <text:list xml:id="list185529736290345" text:continue-numbering="true" text:style-name="WWNum9">
        <text:list-item>
          <text:h text:style-name="P97" text:outline-level="1" loext:marker-style-name="T3"><text:bookmark-start text:name="__RefHeading___Toc2196_1327778131"/><text:span text:style-name="T3"><text:s text:c="3"/></text:span><text:bookmark-start text:name="_Toc195978877"/><text:span text:style-name="T3">Passing structure to function</text:span><text:bookmark-end text:name="__RefHeading___Toc2196_1327778131"/><text:bookmark-end text:name="_Toc195978877"/></text:h>
        </text:list-item>
      </text:list>
      <text:p text:style-name="P142" loext:marker-style-name="T3"><text:span text:style-name="T9">It can be done in below 3 ways.</text:span></text:p>
      <text:list text:style-name="WWNum2">
        <text:list-item>
          <text:p text:style-name="P182" loext:marker-style-name="T3"><text:span text:style-name="T9">Passing structure to a function by value</text:span></text:p>
        </text:list-item>
        <text:list-item>
          <text:p text:style-name="P183" loext:marker-style-name="T3"><text:span text:style-name="T9">Passing structure to a function by address (reference) 3)<text:tab/>Declare structure variable as global</text:span></text:p>
        </text:list-item>
      </text:list>
      <text:p text:style-name="P198" loext:marker-style-name="T3"><text:span text:style-name="T21">Example program – passing structure to function in C by value:</text:span></text:p>
      <text:p text:style-name="P146" loext:marker-style-name="T3"><text:soft-page-break/><text:span text:style-name="T9">In this program, the whole structure is passed to another function by value. It means the whole structure is passed to another function with all members and their values. So, this structure can be accessed from called function. This concept is very useful while writing very big programs in C.</text:span></text:p>
      <text:p text:style-name="P15">#include &lt;stdio.h&gt;</text:p>
      <text:p text:style-name="P15">#include &lt;string.h&gt;</text:p>
      <text:p text:style-name="P15">struct student</text:p>
      <text:p text:style-name="P15">{</text:p>
      <text:p text:style-name="P15"><text:tab/>int id;</text:p>
      <text:p text:style-name="P15"><text:tab/>char name[20];</text:p>
      <text:p text:style-name="P15"><text:tab/>float percentage;</text:p>
      <text:p text:style-name="P15">};</text:p>
      <text:p text:style-name="P32"/>
      <text:p text:style-name="P15">void func(struct student record);</text:p>
      <text:p text:style-name="P15">int main()</text:p>
      <text:p text:style-name="P15">{</text:p>
      <text:p text:style-name="P15"><text:tab/>struct student record;</text:p>
      <text:p text:style-name="P15"><text:tab/>record.id = 1;</text:p>
      <text:p text:style-name="P15"><text:tab/>strcpy(record.name, "Raju");</text:p>
      <text:p text:style-name="P15"><text:tab/>record.percentage = 86.5;</text:p>
      <text:p text:style-name="P15"><text:tab/>func(record);</text:p>
      <text:p text:style-name="P15"><text:tab/>return 0;</text:p>
      <text:p text:style-name="P15">}</text:p>
      <text:p text:style-name="P15">void func(struct student record)</text:p>
      <text:p text:style-name="P15">{</text:p>
      <text:p text:style-name="P15"><text:tab/>printf(" Id is: %d \n", record.id);</text:p>
      <text:p text:style-name="P15"><text:tab/>printf(" Name is: %s \n", record.name);</text:p>
      <text:p text:style-name="P15"><text:tab/>printf(" Percentage is: %f \n", record.percentage);</text:p>
      <text:p text:style-name="P15"><text:soft-page-break/>}</text:p>
      <text:p text:style-name="P199" loext:marker-style-name="T3"><text:span text:style-name="T21">Output:</text:span></text:p>
      <text:p text:style-name="P236" loext:marker-style-name="T3"><text:span text:style-name="T25">Id is: 1</text:span></text:p>
      <text:p text:style-name="P236" loext:marker-style-name="T3"><text:span text:style-name="T25">Name is: Raju</text:span></text:p>
      <text:p text:style-name="P237" loext:marker-style-name="T3"><text:span text:style-name="T25">Percentage is: 86.500000</text:span></text:p>
      <text:p text:style-name="P38"/>
      <text:p text:style-name="P198" loext:marker-style-name="T3"><text:span text:style-name="T21">Example program – Passing structure to function in C by address:</text:span></text:p>
      <text:p text:style-name="P146" loext:marker-style-name="T3"><text:span text:style-name="T9">In this program, the whole structure is passed to another function by address. It means only the address of the structure is passed to another function. The whole structure is not passed to another function with all members and their values. So, this structure can be accessed from called function by its address.</text:span></text:p>
      <text:p text:style-name="P15">#include &lt;stdio.h&gt;</text:p>
      <text:p text:style-name="P15">#include &lt;string.h&gt;</text:p>
      <text:p text:style-name="P15">struct student</text:p>
      <text:p text:style-name="P15">{</text:p>
      <text:p text:style-name="P15"><text:s text:c="4"/>int id;</text:p>
      <text:p text:style-name="P15"><text:s text:c="4"/>char name[20];</text:p>
      <text:p text:style-name="P15"><text:s text:c="4"/>float percentage;</text:p>
      <text:p text:style-name="P15">};</text:p>
      <text:p text:style-name="P15">void func(struct student *record);</text:p>
      <text:p text:style-name="P15">int main()</text:p>
      <text:p text:style-name="P15">{</text:p>
      <text:p text:style-name="P15"><text:s text:c="4"/>struct student record;</text:p>
      <text:p text:style-name="P15"><text:s text:c="4"/>record.id = 1;</text:p>
      <text:p text:style-name="P15"><text:s text:c="4"/>strcpy(record.name, "Raju");</text:p>
      <text:p text:style-name="P15"><text:s text:c="4"/>record.percentage = 86.5;</text:p>
      <text:p text:style-name="P15"><text:s text:c="4"/>func(&amp;record);</text:p>
      <text:p text:style-name="P15"><text:s text:c="4"/>return 0;</text:p>
      <text:p text:style-name="P15"><text:soft-page-break/>}</text:p>
      <text:p text:style-name="P15">void func(struct student *record)</text:p>
      <text:p text:style-name="P15">{</text:p>
      <text:p text:style-name="P15"><text:s text:c="4"/>printf(" Id is: %d \n", record-&gt;id);</text:p>
      <text:p text:style-name="P15"><text:s text:c="4"/>printf(" Name is: %s \n", record-&gt;name);</text:p>
      <text:p text:style-name="P15"><text:s text:c="4"/>printf(" Percentage is: %f \n", record-&gt;percentage);</text:p>
      <text:p text:style-name="P15">}</text:p>
      <text:p text:style-name="P199" loext:marker-style-name="T3"><text:span text:style-name="T21">Output:</text:span></text:p>
      <text:p text:style-name="P236" loext:marker-style-name="T3"><text:span text:style-name="T25">Id is: 1</text:span></text:p>
      <text:p text:style-name="P236" loext:marker-style-name="T3"><text:span text:style-name="T25">Name is: Raju</text:span></text:p>
      <text:p text:style-name="P242" loext:marker-style-name="T3"><text:span text:style-name="T25">Percentage is: 86.500000</text:span></text:p>
      <text:p text:style-name="P200" loext:marker-style-name="T3"><text:span text:style-name="T21">Example program to declare a structure variable as global in C:</text:span></text:p>
      <text:p text:style-name="P312" loext:marker-style-name="T3"><text:span text:style-name="T22">Structure variables also can be declared as global variables as we declare other variables in C. So, when a structure variable is declared as global, then it is visible to all the functions in a program. In this scenario, we don’t need to pass the structure to any function separately.</text:span></text:p>
      <text:p text:style-name="P277" loext:marker-style-name="T3"><text:span text:style-name="T25">#include &lt;stdio.h&gt;</text:span></text:p>
      <text:p text:style-name="P277" loext:marker-style-name="T3"><text:span text:style-name="T25">#include &lt;string.h&gt;</text:span></text:p>
      <text:p text:style-name="P277" loext:marker-style-name="T3"><text:span text:style-name="T25">struct student</text:span></text:p>
      <text:p text:style-name="P277" loext:marker-style-name="T3"><text:span text:style-name="T25">{</text:span></text:p>
      <text:p text:style-name="P277" loext:marker-style-name="T3"><text:span text:style-name="T25"><text:s text:c="4"/>int id;</text:span></text:p>
      <text:p text:style-name="P277" loext:marker-style-name="T3"><text:span text:style-name="T25"><text:s text:c="4"/>char name[20];</text:span></text:p>
      <text:p text:style-name="P277" loext:marker-style-name="T3"><text:span text:style-name="T25"><text:s text:c="4"/>float percentage;</text:span></text:p>
      <text:p text:style-name="P277" loext:marker-style-name="T3"><text:span text:style-name="T25">};</text:span></text:p>
      <text:p text:style-name="P277" loext:marker-style-name="T3"><text:span text:style-name="T25">struct student record; // Global declaration of structure</text:span></text:p>
      <text:p text:style-name="P277" loext:marker-style-name="T3"><text:span text:style-name="T25">void structure_demo();</text:span></text:p>
      <text:p text:style-name="P277" loext:marker-style-name="T3"><text:span text:style-name="T25">int main()</text:span></text:p>
      <text:p text:style-name="P277" loext:marker-style-name="T3"><text:span text:style-name="T25">{</text:span></text:p>
      <text:p text:style-name="P277" loext:marker-style-name="T3"><text:soft-page-break/><text:span text:style-name="T25"><text:s text:c="4"/>record.id = 1;</text:span></text:p>
      <text:p text:style-name="P277" loext:marker-style-name="T3"><text:span text:style-name="T25"><text:s text:c="4"/>strcpy(record.name, "Raju");</text:span></text:p>
      <text:p text:style-name="P277" loext:marker-style-name="T3"><text:span text:style-name="T25"><text:s text:c="4"/>record.percentage = 86.5;</text:span></text:p>
      <text:p text:style-name="P277" loext:marker-style-name="T3"><text:span text:style-name="T25"><text:s text:c="4"/>structure_demo();</text:span></text:p>
      <text:p text:style-name="P277" loext:marker-style-name="T3"><text:span text:style-name="T25"><text:s text:c="4"/>return 0;</text:span></text:p>
      <text:p text:style-name="P277" loext:marker-style-name="T3"><text:span text:style-name="T25">}</text:span></text:p>
      <text:p text:style-name="P277" loext:marker-style-name="T3"><text:span text:style-name="T25">void structure_demo()</text:span></text:p>
      <text:p text:style-name="P277" loext:marker-style-name="T3"><text:span text:style-name="T25">{</text:span></text:p>
      <text:p text:style-name="P277" loext:marker-style-name="T3"><text:span text:style-name="T25"><text:s text:c="4"/>printf(" Id is: %d \n", record.id);</text:span></text:p>
      <text:p text:style-name="P277" loext:marker-style-name="T3"><text:span text:style-name="T25"><text:s text:c="4"/>printf(" Name is: %s \n", record.name);</text:span></text:p>
      <text:p text:style-name="P277" loext:marker-style-name="T3"><text:span text:style-name="T25"><text:s text:c="4"/>printf(" Percentage is: %f \n", record.percentage);</text:span></text:p>
      <text:p text:style-name="P277" loext:marker-style-name="T3"><text:span text:style-name="T25">}</text:span></text:p>
      <text:p text:style-name="P54">Output:</text:p>
      <text:p text:style-name="P236" loext:marker-style-name="T3"><text:span text:style-name="T25">Id is: 1</text:span></text:p>
      <text:p text:style-name="P236" loext:marker-style-name="T3"><text:span text:style-name="T25">Name is: Raju</text:span></text:p>
      <text:p text:style-name="P260" loext:marker-style-name="T3"><text:span text:style-name="T25">Percentage is: 86.500000</text:span></text:p>
      <text:list text:continue-list="list185529736290345" text:style-name="WWNum9">
        <text:list-item>
          <text:h text:style-name="P98" text:outline-level="1" loext:marker-style-name="T3"><text:bookmark-start text:name="__RefHeading___Toc2198_1327778131"/><text:span text:style-name="T3"><text:s text:c="3"/></text:span><text:bookmark-start text:name="_Toc195978878"/><text:span text:style-name="T3">Static Function</text:span><text:bookmark-end text:name="__RefHeading___Toc2198_1327778131"/><text:bookmark-end text:name="_Toc195978878"/></text:h>
        </text:list-item>
      </text:list>
      <text:p text:style-name="P138" loext:marker-style-name="T3"><text:span text:style-name="T9">In C, functions are global by default. The “static” keyword before a function name makes it static. For example, below function fun() is static.</text:span></text:p>
      <text:p text:style-name="P277" loext:marker-style-name="T3"><text:span text:style-name="T25">static int fun(void)</text:span></text:p>
      <text:p text:style-name="P277" loext:marker-style-name="T3"><text:span text:style-name="T25">{</text:span></text:p>
      <text:p text:style-name="P277" loext:marker-style-name="T3"><text:span text:style-name="T25"><text:s text:c="4"/>printf("I am a static function ");</text:span></text:p>
      <text:p text:style-name="P277" loext:marker-style-name="T3"><text:span text:style-name="T25">}</text:span></text:p>
      <text:p text:style-name="P137" loext:marker-style-name="T3"><text:span text:style-name="T9">Unlike global functions in C, access to static functions is restricted to the file where they are declared. Therefore, when we want to restrict access to functions, we make them static. Another reason for making functions static can be reuse of the same function name in other files.</text:span></text:p>
      <text:p text:style-name="P138" loext:marker-style-name="T3"><text:span text:style-name="T9">For example, if we store following program in one file file1.c</text:span></text:p>
      <text:p text:style-name="P271" loext:marker-style-name="T3"><text:soft-page-break/><text:span text:style-name="T25">/* Inside file1.c */</text:span></text:p>
      <text:p text:style-name="P271" loext:marker-style-name="T3"><text:span text:style-name="T25">static void fun1(void)</text:span></text:p>
      <text:p text:style-name="P271" loext:marker-style-name="T3"><text:span text:style-name="T25">{</text:span></text:p>
      <text:p text:style-name="P271" loext:marker-style-name="T3"><text:span text:style-name="T25"><text:s text:c="4"/>puts("fun1 called");</text:span></text:p>
      <text:p text:style-name="P271" loext:marker-style-name="T3"><text:span text:style-name="T25">}</text:span></text:p>
      <text:p text:style-name="P138" loext:marker-style-name="T3"><text:span text:style-name="T9">And store following program in another file file2.c</text:span></text:p>
      <text:p text:style-name="P272" loext:marker-style-name="T3"><text:span text:style-name="T25">/* Inside file2.c <text:s/>*/</text:span></text:p>
      <text:p text:style-name="P272" loext:marker-style-name="T3"><text:span text:style-name="T25">int main(void)</text:span></text:p>
      <text:p text:style-name="P272" loext:marker-style-name="T3"><text:span text:style-name="T25">{</text:span></text:p>
      <text:p text:style-name="P272" loext:marker-style-name="T3"><text:span text:style-name="T25"><text:s text:c="4"/>fun1();</text:span></text:p>
      <text:p text:style-name="P272" loext:marker-style-name="T3"><text:span text:style-name="T25"><text:s text:c="4"/>getchar();</text:span></text:p>
      <text:p text:style-name="P272" loext:marker-style-name="T3"><text:span text:style-name="T25"><text:s text:c="4"/>return 0;</text:span></text:p>
      <text:p text:style-name="P272" loext:marker-style-name="T3"><text:span text:style-name="T25">}</text:span></text:p>
      <text:p text:style-name="P141" loext:marker-style-name="T3"><text:span text:style-name="T9">Now, if we compile the above code with command “gcc file2.c file1.c”, we get the error “undefined reference to “fun1””. This is because fun1() is declared static in file1.c and cannot be used in file2.c.</text:span></text:p>
      <text:list text:continue-numbering="true" text:style-name="WWNum9">
        <text:list-item>
          <text:h text:style-name="P99" text:outline-level="1" loext:marker-style-name="T3"><text:bookmark-start text:name="__RefHeading___Toc2200_1327778131"/><text:span text:style-name="T3"><text:s text:c="3"/></text:span><text:bookmark-start text:name="_Toc195978879"/><text:span text:style-name="T3">Type casting</text:span><text:bookmark-end text:name="__RefHeading___Toc2200_1327778131"/><text:bookmark-end text:name="_Toc195978879"/></text:h>
        </text:list-item>
      </text:list>
      <text:p text:style-name="P150" loext:marker-style-name="T3"><text:span text:style-name="T9">Type casting is a way to convert a variable from one data type to another data type. For example, if you want to store a 'long' value into a simple integer then you can type cast 'long' to 'int'. You can convert the values from one type to another explicitly using the cast operator as follows −</text:span></text:p>
      <text:p text:style-name="P258" loext:marker-style-name="T3"><text:span text:style-name="T25">(type_name) expression</text:span></text:p>
      <text:p text:style-name="P137" loext:marker-style-name="T3"><text:span text:style-name="T9">Consider the following example where the cast operator causes the division of one integer variable by another to be performed as a floating-point operation −</text:span></text:p>
      <text:p text:style-name="P138" loext:marker-style-name="T3"><text:span text:style-name="T9">Example:</text:span></text:p>
      <text:p text:style-name="P27">#include &lt;stdio.h&gt;</text:p>
      <text:p text:style-name="P27">int main(void)</text:p>
      <text:p text:style-name="P27"><text:soft-page-break/>{</text:p>
      <text:p text:style-name="P27"><text:s text:c="4"/>int sum = 17, count = 5;</text:p>
      <text:p text:style-name="P27"><text:s text:c="4"/>double mean;</text:p>
      <text:p text:style-name="P27"><text:s text:c="4"/>mean = (double)sum / count;</text:p>
      <text:p text:style-name="P27"><text:s text:c="4"/>printf("Value of mean : %f\n", mean);</text:p>
      <text:p text:style-name="P27"><text:s text:c="4"/>return (0);</text:p>
      <text:p text:style-name="P27">}</text:p>
      <text:p text:style-name="P138" loext:marker-style-name="T3"><text:span text:style-name="T9">When the above code is compiled and executed, it produces the following result −</text:span></text:p>
      <text:p text:style-name="P258" loext:marker-style-name="T3"><text:span text:style-name="T25">Value of mean : 3.400000</text:span></text:p>
      <text:p text:style-name="P137" loext:marker-style-name="T3"><text:span text:style-name="T9">It should be noted here that the cast operator has precedence over division, so the value of sum is first converted to type double and finally it gets divided by count yielding a double value.</text:span></text:p>
      <text:p text:style-name="P151" loext:marker-style-name="T3"><text:span text:style-name="T9">Type conversions can be implicit which is performed by the compiler automatically, or it can be specified explicitly through the use of the cast operator. It is considered good programming practice to use the cast operator whenever type conversions are necessary.</text:span></text:p>
      <text:list text:continue-numbering="true" text:style-name="WWNum9">
        <text:list-item>
          <text:h text:style-name="P100" text:outline-level="1" loext:marker-style-name="T3"><text:bookmark-start text:name="__RefHeading___Toc2202_1327778131"/><text:span text:style-name="T3"><text:s text:c="3"/></text:span><text:bookmark-start text:name="_Toc195978880"/><text:span text:style-name="T3">Integer Promotion</text:span><text:bookmark-end text:name="__RefHeading___Toc2202_1327778131"/><text:bookmark-end text:name="_Toc195978880"/></text:h>
        </text:list-item>
      </text:list>
      <text:p text:style-name="P313" loext:marker-style-name="T3"><draw:frame draw:style-name="fr3" draw:name="Picture 55233" text:anchor-type="char" svg:x="12.696cm" svg:y="1.125cm" svg:width="2.997cm" svg:height="6.689cm" draw:z-index="4"><draw:image xlink:href="Pictures/1000000100000162000003165ECD5D74.png" xlink:type="simple" xlink:show="embed" xlink:actuate="onLoad" draw:mime-type="image/png"/></draw:frame><text:span text:style-name="T9">Integer promotion is the process by which values of integer type "smaller" than int or unsigned int are converted either to int or unsigned int. Consider an example of adding a character with an integer − Example:</text:span></text:p>
      <text:p text:style-name="P261" loext:marker-style-name="T3"><text:span text:style-name="T25">#include &lt;stdio.h&gt;</text:span></text:p>
      <text:p text:style-name="P261" loext:marker-style-name="T3"><text:span text:style-name="T25">int main()</text:span></text:p>
      <text:p text:style-name="P261" loext:marker-style-name="T3"><text:span text:style-name="T25">{</text:span></text:p>
      <text:p text:style-name="P261" loext:marker-style-name="T3"><text:span text:style-name="T25"><text:s text:c="4"/>int i = 17;</text:span></text:p>
      <text:p text:style-name="P261" loext:marker-style-name="T3"><text:span text:style-name="T25"><text:s text:c="4"/>char c = 'c'; /* ascii value is 99 */</text:span></text:p>
      <text:p text:style-name="P261" loext:marker-style-name="T3"><text:span text:style-name="T25"><text:s text:c="4"/>int sum;</text:span></text:p>
      <text:p text:style-name="P261" loext:marker-style-name="T3"><text:span text:style-name="T25"><text:s text:c="4"/>sum = i + c;</text:span></text:p>
      <text:p text:style-name="P261" loext:marker-style-name="T3"><text:span text:style-name="T25"><text:s text:c="4"/>printf("Value of sum : %d\n", sum);</text:span></text:p>
      <text:p text:style-name="P261" loext:marker-style-name="T3"><text:span text:style-name="T25">}</text:span></text:p>
      <text:p text:style-name="P184" loext:marker-style-name="T3"><text:soft-page-break/><text:span text:style-name="T9">When the above code is compiled and executed, it produces the following result.</text:span></text:p>
      <text:p text:style-name="P237" loext:marker-style-name="T3"><text:span text:style-name="T25">Value of sum : 116</text:span></text:p>
      <text:p text:style-name="P137" loext:marker-style-name="T3"><text:span text:style-name="T9">Here, the value of sum is 116 because the compiler is doing integer promotion and converting the value of 'c' to ASCII before performing the actual addition operation.</text:span></text:p>
      <text:h text:style-name="P61" text:outline-level="2" loext:marker-style-name="T3"><text:span text:style-name="T3">Usual Arithmetic Conversion</text:span></text:h>
      <text:p text:style-name="P137" loext:marker-style-name="T3"><text:span text:style-name="T9">The usual arithmetic conversions are implicitly performed to cast their values to a common type. The compiler first performs integer promotion; if the operands still have different types, then they are converted to the type that appears highest in the following hierarchy –</text:span></text:p>
      <text:p text:style-name="P137" loext:marker-style-name="T3"><text:span text:style-name="T9">The usual arithmetic conversions are not performed for the assignment operators, nor for the logical operators &amp;&amp; and ||. Let us take the following example to understand the concept −</text:span></text:p>
      <text:p text:style-name="P138" loext:marker-style-name="T3"><text:span text:style-name="T9">Example:</text:span></text:p>
      <text:p text:style-name="P277" loext:marker-style-name="T3"><text:span text:style-name="T25">#include &lt;stdio.h&gt;</text:span></text:p>
      <text:p text:style-name="P277" loext:marker-style-name="T3"><text:span text:style-name="T25">void main()</text:span></text:p>
      <text:p text:style-name="P277" loext:marker-style-name="T3"><text:span text:style-name="T25">{</text:span></text:p>
      <text:p text:style-name="P277" loext:marker-style-name="T3"><text:span text:style-name="T25"><text:s text:c="4"/>int i = 17;</text:span></text:p>
      <text:p text:style-name="P277" loext:marker-style-name="T3"><text:span text:style-name="T25"><text:s text:c="4"/>char c = 'c'; /* ascii value is 99 */</text:span></text:p>
      <text:p text:style-name="P277" loext:marker-style-name="T3"><text:span text:style-name="T25"><text:s text:c="4"/>float sum;</text:span></text:p>
      <text:p text:style-name="P277" loext:marker-style-name="T3"><text:span text:style-name="T25"><text:s text:c="4"/>sum = i + c;</text:span></text:p>
      <text:p text:style-name="P277" loext:marker-style-name="T3"><text:span text:style-name="T25"><text:s text:c="4"/>printf("Value of sum : %f\n", sum);</text:span></text:p>
      <text:p text:style-name="P277" loext:marker-style-name="T3"><text:span text:style-name="T25">}</text:span></text:p>
      <text:p text:style-name="P138" loext:marker-style-name="T3"><text:span text:style-name="T9">When the above code is compiled and executed, it produces the following result −</text:span></text:p>
      <text:p text:style-name="P258" loext:marker-style-name="T3"><text:span text:style-name="T25">Value of sum : 116.000000</text:span></text:p>
      <text:p text:style-name="P141" loext:marker-style-name="T3"><text:span text:style-name="T9">Here, it is simple to understand that first c gets converted to integer, but as the final value is double, usual arithmetic conversion applies and the compiler converts i and c into 'float' and adds them yielding a 'float' result.</text:span></text:p>
      <text:list text:continue-numbering="true" text:style-name="WWNum9">
        <text:list-item>
          <text:h text:style-name="P101" text:outline-level="1" loext:marker-style-name="T3"><text:bookmark-start text:name="__RefHeading___Toc2204_1327778131"/><text:span text:style-name="T3"><text:s text:c="3"/></text:span><text:bookmark-start text:name="_Toc195978881"/><text:span text:style-name="T3">Dynamic Memory Allocation</text:span><text:bookmark-end text:name="__RefHeading___Toc2204_1327778131"/><text:bookmark-end text:name="_Toc195978881"/></text:h>
        </text:list-item>
      </text:list>
      <text:p text:style-name="P138" loext:marker-style-name="T3"><text:span text:style-name="T9">As you know, you have to declare the size of an array before you use it. Hence, the array you declared may be insufficient or more than required to hold data. To solve this issue, you can allocate memory dynamically.</text:span></text:p>
      <text:p text:style-name="P137" loext:marker-style-name="T3"><text:soft-page-break/><text:span text:style-name="T9">Dynamic memory management refers to manual memory management. This allows you to obtain more memory when required and release it when not necessary.</text:span></text:p>
      <text:p text:style-name="P152" loext:marker-style-name="T3"><text:span text:style-name="T9">Although C inherently does not have any technique to allocate memory dynamically, there are 4 library functions defined under &lt;stdlib.h&gt; for dynamic memory allocation.</text:span></text:p>
      <table:table table:name="Table1" table:style-name="Table1">
        <table:table-column table:style-name="Table1.A"/>
        <table:table-column table:style-name="Table1.B"/>
        <table:table-row table:style-name="Table1.1">
          <table:table-cell table:style-name="Table1.A1" office:value-type="string">
            <text:p text:style-name="P288" loext:marker-style-name="T44"><text:span text:style-name="T23">Function</text:span></text:p>
          </table:table-cell>
          <table:table-cell table:style-name="Table1.A1" office:value-type="string">
            <text:p text:style-name="P288" loext:marker-style-name="T44"><text:span text:style-name="T23">Use of Function</text:span></text:p>
          </table:table-cell>
        </table:table-row>
        <table:table-row table:style-name="Table1.2">
          <table:table-cell table:style-name="Table1.A2" office:value-type="string">
            <text:p text:style-name="P288" loext:marker-style-name="T45"><text:span text:style-name="T24">malloc()</text:span></text:p>
          </table:table-cell>
          <table:table-cell table:style-name="Table1.A2" office:value-type="string">
            <text:p text:style-name="P288" loext:marker-style-name="T45"><text:span text:style-name="T24">Allocates requested size of bytes and returns a pointer first byte of allocated space</text:span></text:p>
          </table:table-cell>
        </table:table-row>
        <table:table-row table:style-name="Table1.3">
          <table:table-cell table:style-name="Table1.A1" office:value-type="string">
            <text:p text:style-name="P288" loext:marker-style-name="T45"><text:span text:style-name="T24">calloc()</text:span></text:p>
          </table:table-cell>
          <table:table-cell table:style-name="Table1.A2" office:value-type="string">
            <text:p text:style-name="P288" loext:marker-style-name="T45"><text:span text:style-name="T24">Allocates space for an array elements, initializes to zero and then returns a pointer to memory</text:span></text:p>
          </table:table-cell>
        </table:table-row>
        <table:table-row table:style-name="Table1.2">
          <table:table-cell table:style-name="Table1.A2" office:value-type="string">
            <text:p text:style-name="P288" loext:marker-style-name="T45"><text:span text:style-name="T24">free()</text:span></text:p>
          </table:table-cell>
          <table:table-cell table:style-name="Table1.A2" office:value-type="string">
            <text:p text:style-name="P288" loext:marker-style-name="T45"><text:span text:style-name="T24">Deallocate the previously allocated space</text:span></text:p>
          </table:table-cell>
        </table:table-row>
        <table:table-row table:style-name="Table1.1">
          <table:table-cell table:style-name="Table1.A5" office:value-type="string">
            <text:p text:style-name="P288" loext:marker-style-name="T45"><text:span text:style-name="T24">realloc()</text:span></text:p>
          </table:table-cell>
          <table:table-cell table:style-name="Table1.A5" office:value-type="string">
            <text:p text:style-name="P288" loext:marker-style-name="T45"><text:span text:style-name="T24">Change the size of previously allocated space</text:span></text:p>
          </table:table-cell>
        </table:table-row>
      </table:table>
      <text:h text:style-name="P69" text:outline-level="2" loext:marker-style-name="T3"/>
      <text:h text:style-name="P61" text:outline-level="2" loext:marker-style-name="T3"><text:span text:style-name="T3">Note</text:span></text:h>
      <text:p text:style-name="P138" loext:marker-style-name="T3"><text:span text:style-name="T9">Dynamic Memory Allocation cannot be initialised as global.</text:span></text:p>
      <text:p text:style-name="P14">#include &lt;stdio.h&gt;</text:p>
      <text:p text:style-name="P14">#include &lt;stdlib.h&gt;</text:p>
      <text:p text:style-name="P14">int num;</text:p>
      <text:p text:style-name="P14">int *p = &amp;num; <text:s text:c="24"/>// No Error.</text:p>
      <text:p text:style-name="P14">int *ptr = (int *)malloc(sizeof(int)); // Causes Error. This is because malloc() is a function.</text:p>
      <text:p text:style-name="P14">int main(void)</text:p>
      <text:p text:style-name="P14">{</text:p>
      <text:p text:style-name="P14"><text:s text:c="4"/>int *pointer = (int *)malloc(sizeof(int)); // No Error.</text:p>
      <text:p text:style-name="P14"><text:s text:c="4"/>return (0);</text:p>
      <text:p text:style-name="P14">}</text:p>
      <text:h text:style-name="P61" text:outline-level="2" loext:marker-style-name="T3"><text:span text:style-name="T3">malloc()</text:span></text:h>
      <text:p text:style-name="P142" loext:marker-style-name="T3"><text:span text:style-name="T9">The name malloc stands for "memory allocation".</text:span></text:p>
      <text:p text:style-name="P138" loext:marker-style-name="T3"><text:span text:style-name="T9">The function malloc() reserves a block of memory of specified size and return a pointer of type void which can be casted into pointer of any form.</text:span></text:p>
      <text:p text:style-name="P138" loext:marker-style-name="T3"><text:span text:style-name="T9">Syntax of malloc()</text:span></text:p>
      <text:p text:style-name="P258" loext:marker-style-name="T3"><text:span text:style-name="T25">&lt;pointer type&gt; *ptr = (cast-type*) malloc(byte-size);</text:span></text:p>
      <text:p text:style-name="P146" loext:marker-style-name="T3"><text:soft-page-break/><text:span text:style-name="T9">Here, ptr is pointer of cast-type. The malloc() function returns a pointer to an area of memory with size of byte size. If the space is insufficient, allocation fails and returns NULL pointer.</text:span></text:p>
      <text:p text:style-name="P258" loext:marker-style-name="T3"><text:span text:style-name="T25">int *ptr = (int*) malloc(100 * sizeof(int));</text:span></text:p>
      <text:p text:style-name="P145" loext:marker-style-name="T3"><text:span text:style-name="T9">This statement will allocate either 200 or 400 according to size of int 2 or 4 bytes respectively and the pointer points to the address of first byte of memory.</text:span></text:p>
      <text:h text:style-name="P61" text:outline-level="2" loext:marker-style-name="T3"><text:span text:style-name="T3">calloc()</text:span></text:h>
      <text:p text:style-name="P142" loext:marker-style-name="T3"><text:span text:style-name="T9">The name calloc stands for "contiguous allocation".</text:span></text:p>
      <text:p text:style-name="P137" loext:marker-style-name="T3"><text:span text:style-name="T9">The only difference between malloc() and calloc() is that, malloc() allocates single block of memory whereas calloc() allocates multiple blocks of memory each of same size and sets all bytes to zero.</text:span></text:p>
      <text:p text:style-name="P147" loext:marker-style-name="T3"><text:span text:style-name="T9">Syntax of calloc()</text:span></text:p>
      <text:p text:style-name="P258" loext:marker-style-name="T3"><text:span text:style-name="T25">&lt;pointer type&gt; *ptr = (cast-type*)calloc(n, element-size);</text:span></text:p>
      <text:p text:style-name="P147" loext:marker-style-name="T3"><text:span text:style-name="T9">This statement will allocate contiguous space in memory for an array of n elements. For example:</text:span></text:p>
      <text:p text:style-name="P258" loext:marker-style-name="T3"><text:span text:style-name="T25">float *ptr = (float*) calloc(25, sizeof(float));</text:span></text:p>
      <text:p text:style-name="P145" loext:marker-style-name="T3"><text:span text:style-name="T9">This statement allocates contiguous space in memory for an array of 25 elements each of size of float, i.e, 4 bytes.</text:span></text:p>
      <text:h text:style-name="P61" text:outline-level="2" loext:marker-style-name="T3"><text:span text:style-name="T3">free()</text:span></text:h>
      <text:p text:style-name="P137" loext:marker-style-name="T3"><text:span text:style-name="T9">Dynamically allocated memory created with either calloc() or malloc() doesn't get freed on its own. You must explicitly use free() to release the space.</text:span></text:p>
      <text:p text:style-name="P138" loext:marker-style-name="T3"><text:span text:style-name="T9">syntax of free()</text:span></text:p>
      <text:p text:style-name="P258" loext:marker-style-name="T3"><text:span text:style-name="T25">free(ptr);</text:span></text:p>
      <text:p text:style-name="P142" loext:marker-style-name="T3"><text:span text:style-name="T9">This statement frees the space allocated in the memory pointed by ptr.</text:span></text:p>
      <text:p text:style-name="P153" loext:marker-style-name="T3"><text:span text:style-name="T9">Example #1: Using C malloc() and free()</text:span></text:p>
      <text:p text:style-name="P150" loext:marker-style-name="T3"><text:soft-page-break/><text:span text:style-name="T9">Write a C program to find sum of n elements entered by user. To perform this program, allocate memory dynamically using malloc() function.</text:span></text:p>
      <text:p text:style-name="P277" loext:marker-style-name="T3"><text:span text:style-name="T25">#include &lt;stdio.h&gt;</text:span></text:p>
      <text:p text:style-name="P277" loext:marker-style-name="T3"><text:span text:style-name="T25">#include &lt;stdlib.h&gt;</text:span></text:p>
      <text:p text:style-name="P277" loext:marker-style-name="T3"><text:span text:style-name="T25">int main()</text:span></text:p>
      <text:p text:style-name="P277" loext:marker-style-name="T3"><text:span text:style-name="T25">{</text:span></text:p>
      <text:p text:style-name="P277" loext:marker-style-name="T3"><text:span text:style-name="T25"><text:s text:c="4"/>int num, i, *ptr, sum = 0;</text:span></text:p>
      <text:p text:style-name="P277" loext:marker-style-name="T3"><text:span text:style-name="T25"><text:s text:c="4"/>printf("Enter number of elements: ");</text:span></text:p>
      <text:p text:style-name="P277" loext:marker-style-name="T3"><text:span text:style-name="T25"><text:s text:c="4"/>scanf("%d", &amp;num);</text:span></text:p>
      <text:p text:style-name="P277" loext:marker-style-name="T3"><text:span text:style-name="T25"><text:s text:c="4"/>ptr = (int *)malloc(num * sizeof(int)); // memory allocated using malloc</text:span></text:p>
      <text:p text:style-name="P277" loext:marker-style-name="T3"><text:span text:style-name="T25"><text:s text:c="4"/>if (ptr == NULL)</text:span></text:p>
      <text:p text:style-name="P277" loext:marker-style-name="T3"><text:span text:style-name="T25"><text:s text:c="4"/>{</text:span></text:p>
      <text:p text:style-name="P277" loext:marker-style-name="T3"><text:span text:style-name="T25"><text:s text:c="8"/>printf("Error! memory not allocated.");</text:span></text:p>
      <text:p text:style-name="P277" loext:marker-style-name="T3"><text:span text:style-name="T25"><text:s text:c="8"/>exit(0);</text:span></text:p>
      <text:p text:style-name="P277" loext:marker-style-name="T3"><text:span text:style-name="T25"><text:s text:c="4"/>}</text:span></text:p>
      <text:p text:style-name="P277" loext:marker-style-name="T3"><text:span text:style-name="T25"><text:s text:c="4"/>printf("Enter elements of array: ");</text:span></text:p>
      <text:p text:style-name="P277" loext:marker-style-name="T3"><text:span text:style-name="T25"><text:s text:c="4"/>for (i = 0; i &lt; num; ++i)</text:span></text:p>
      <text:p text:style-name="P277" loext:marker-style-name="T3"><text:span text:style-name="T25"><text:s text:c="4"/>{</text:span></text:p>
      <text:p text:style-name="P277" loext:marker-style-name="T3"><text:span text:style-name="T25"><text:s text:c="8"/>scanf("%d", ptr + i);</text:span></text:p>
      <text:p text:style-name="P277" loext:marker-style-name="T3"><text:span text:style-name="T25"><text:s text:c="8"/>sum += *(ptr + i);</text:span></text:p>
      <text:p text:style-name="P277" loext:marker-style-name="T3"><text:span text:style-name="T25"><text:s text:c="4"/>}</text:span></text:p>
      <text:p text:style-name="P277" loext:marker-style-name="T3"><text:span text:style-name="T25"><text:s text:c="4"/>printf("Sum = %d", sum);</text:span></text:p>
      <text:p text:style-name="P277" loext:marker-style-name="T3"><text:span text:style-name="T25"><text:s text:c="4"/>free(ptr);</text:span></text:p>
      <text:p text:style-name="P277" loext:marker-style-name="T3"><text:span text:style-name="T25"><text:s text:c="4"/>return 0;</text:span></text:p>
      <text:p text:style-name="P277" loext:marker-style-name="T3"><text:span text:style-name="T25">}</text:span></text:p>
      <text:p text:style-name="P132" loext:marker-style-name="T3"><text:soft-page-break/></text:p>
      <text:p text:style-name="P153" loext:marker-style-name="T3"><text:span text:style-name="T9">Example #2: Using calloc() and free()</text:span></text:p>
      <text:p text:style-name="P150" loext:marker-style-name="T3"><text:span text:style-name="T9">Write a C program to find sum of n elements entered by user. To perform this program, allocate memory dynamically using calloc() function.</text:span></text:p>
      <text:p text:style-name="P277" loext:marker-style-name="T3"><text:span text:style-name="T25">#include &lt;stdio.h&gt;</text:span></text:p>
      <text:p text:style-name="P277" loext:marker-style-name="T3"><text:span text:style-name="T25">#include &lt;stdlib.h&gt;</text:span></text:p>
      <text:p text:style-name="P277" loext:marker-style-name="T3"><text:span text:style-name="T25">int main()</text:span></text:p>
      <text:p text:style-name="P277" loext:marker-style-name="T3"><text:span text:style-name="T25">{</text:span></text:p>
      <text:p text:style-name="P277" loext:marker-style-name="T3"><text:span text:style-name="T25"><text:s text:c="4"/>int num, i, *ptr, sum = 0;</text:span></text:p>
      <text:p text:style-name="P277" loext:marker-style-name="T3"><text:span text:style-name="T25"><text:s text:c="4"/>printf("Enter number of elements: ");</text:span></text:p>
      <text:p text:style-name="P277" loext:marker-style-name="T3"><text:span text:style-name="T25"><text:s text:c="4"/>scanf("%d", &amp;num);</text:span></text:p>
      <text:p text:style-name="P277" loext:marker-style-name="T3"><text:span text:style-name="T25"><text:s text:c="4"/>ptr = (int *)calloc(num, sizeof(int));</text:span></text:p>
      <text:p text:style-name="P277" loext:marker-style-name="T3"><text:span text:style-name="T25"><text:s text:c="4"/>if (ptr == NULL)</text:span></text:p>
      <text:p text:style-name="P277" loext:marker-style-name="T3"><text:span text:style-name="T25"><text:s text:c="4"/>{</text:span></text:p>
      <text:p text:style-name="P277" loext:marker-style-name="T3"><text:span text:style-name="T25"><text:s text:c="8"/>printf("Error! memory not allocated.");</text:span></text:p>
      <text:p text:style-name="P277" loext:marker-style-name="T3"><text:span text:style-name="T25"><text:s text:c="8"/>exit(0);</text:span></text:p>
      <text:p text:style-name="P277" loext:marker-style-name="T3"><text:span text:style-name="T25"><text:s text:c="4"/>}</text:span></text:p>
      <text:p text:style-name="P277" loext:marker-style-name="T3"><text:span text:style-name="T25"><text:s text:c="4"/>printf("Enter elements of array: ");</text:span></text:p>
      <text:p text:style-name="P277" loext:marker-style-name="T3"><text:span text:style-name="T25"><text:s text:c="4"/>for (i = 0; i &lt; num; ++i)</text:span></text:p>
      <text:p text:style-name="P277" loext:marker-style-name="T3"><text:span text:style-name="T25"><text:s text:c="4"/>{</text:span></text:p>
      <text:p text:style-name="P277" loext:marker-style-name="T3"><text:span text:style-name="T25"><text:s text:c="8"/>scanf("%d", ptr + i);</text:span></text:p>
      <text:p text:style-name="P277" loext:marker-style-name="T3"><text:span text:style-name="T25"><text:s text:c="8"/>sum += *(ptr + i);</text:span></text:p>
      <text:p text:style-name="P277" loext:marker-style-name="T3"><text:span text:style-name="T25"><text:s text:c="4"/>}</text:span></text:p>
      <text:p text:style-name="P277" loext:marker-style-name="T3"><text:span text:style-name="T25"><text:s text:c="4"/>printf("Sum = %d", sum);</text:span></text:p>
      <text:p text:style-name="P277" loext:marker-style-name="T3"><text:span text:style-name="T25"><text:s text:c="4"/>free(ptr);</text:span></text:p>
      <text:p text:style-name="P277" loext:marker-style-name="T3"><text:soft-page-break/><text:span text:style-name="T25"><text:s text:c="4"/>return 0;</text:span></text:p>
      <text:p text:style-name="P277" loext:marker-style-name="T3"><text:span text:style-name="T25">}</text:span></text:p>
      <text:h text:style-name="P61" text:outline-level="2" loext:marker-style-name="T3"><text:span text:style-name="T3">realloc()</text:span></text:h>
      <text:p text:style-name="P137" loext:marker-style-name="T3"><text:span text:style-name="T9">If the previously allocated memory is insufficient or more than required, you can change the previously allocated memory size using realloc().</text:span></text:p>
      <text:p text:style-name="P147" loext:marker-style-name="T3"><text:span text:style-name="T9">Syntax of realloc()</text:span></text:p>
      <text:p text:style-name="P257" loext:marker-style-name="T3"><text:span text:style-name="T25">&lt;pointer&gt; = realloc(&lt;pointer&gt;, &lt;new size&gt;);</text:span></text:p>
      <text:p text:style-name="P153" loext:marker-style-name="T3"><text:span text:style-name="T9">Here, ptr is reallocated with size of new-size.</text:span></text:p>
      <text:p text:style-name="P143" loext:marker-style-name="T3"><text:span text:style-name="T9">Example #3: Using realloc()</text:span></text:p>
      <text:p text:style-name="P277" loext:marker-style-name="T3"><text:span text:style-name="T25">#include &lt;stdio.h&gt;</text:span></text:p>
      <text:p text:style-name="P277" loext:marker-style-name="T3"><text:span text:style-name="T25">#include &lt;stdlib.h&gt;</text:span></text:p>
      <text:p text:style-name="P277" loext:marker-style-name="T3"><text:span text:style-name="T25">int main()</text:span></text:p>
      <text:p text:style-name="P277" loext:marker-style-name="T3"><text:span text:style-name="T25">{</text:span></text:p>
      <text:p text:style-name="P277" loext:marker-style-name="T3"><text:span text:style-name="T25"><text:s text:c="4"/>int *ptr, i, n1, n2;</text:span></text:p>
      <text:p text:style-name="P277" loext:marker-style-name="T3"><text:span text:style-name="T25"><text:s text:c="4"/>printf("Enter size of array: ");</text:span></text:p>
      <text:p text:style-name="P277" loext:marker-style-name="T3"><text:span text:style-name="T25"><text:s text:c="4"/>scanf("%d", &amp;n1);</text:span></text:p>
      <text:p text:style-name="P277" loext:marker-style-name="T3"><text:span text:style-name="T25"><text:s text:c="4"/>ptr = (int *)malloc(n1 * sizeof(int));</text:span></text:p>
      <text:p text:style-name="P277" loext:marker-style-name="T3"><text:span text:style-name="T25"><text:s text:c="4"/>printf("Address of previously allocated memory: ");</text:span></text:p>
      <text:p text:style-name="P277" loext:marker-style-name="T3"><text:span text:style-name="T25"><text:s text:c="4"/>for (i = 0; i &lt; n1; ++i)</text:span></text:p>
      <text:p text:style-name="P277" loext:marker-style-name="T3"><text:span text:style-name="T25"><text:s text:c="4"/>{</text:span></text:p>
      <text:p text:style-name="P277" loext:marker-style-name="T3"><text:span text:style-name="T25"><text:s text:c="8"/>printf("%u\t", ptr + i);</text:span></text:p>
      <text:p text:style-name="P277" loext:marker-style-name="T3"><text:span text:style-name="T25"><text:s text:c="4"/>}</text:span></text:p>
      <text:p text:style-name="P277" loext:marker-style-name="T3"><text:span text:style-name="T25"><text:s text:c="4"/>printf("\nEnter new size of array: ");</text:span></text:p>
      <text:p text:style-name="P277" loext:marker-style-name="T3"><text:span text:style-name="T25"><text:s text:c="4"/>scanf("%d", &amp;n2);</text:span></text:p>
      <text:p text:style-name="P277" loext:marker-style-name="T3"><text:soft-page-break/><text:span text:style-name="T25"><text:s text:c="4"/>ptr = realloc(ptr, n2 * sizeof(int));</text:span></text:p>
      <text:p text:style-name="P277" loext:marker-style-name="T3"><text:span text:style-name="T25"><text:s text:c="4"/>for (i = 0; i &lt; n2; ++i)</text:span></text:p>
      <text:p text:style-name="P277" loext:marker-style-name="T3"><text:span text:style-name="T25"><text:s text:c="4"/>{</text:span></text:p>
      <text:p text:style-name="P277" loext:marker-style-name="T3"><text:span text:style-name="T25"><text:s text:c="8"/>printf("%u\t", ptr + i);</text:span></text:p>
      <text:p text:style-name="P277" loext:marker-style-name="T3"><text:span text:style-name="T25"><text:s text:c="4"/>}</text:span></text:p>
      <text:p text:style-name="P277" loext:marker-style-name="T3"><text:span text:style-name="T25"><text:s text:c="4"/>return 0;</text:span></text:p>
      <text:p text:style-name="P277" loext:marker-style-name="T3"><text:span text:style-name="T25">}</text:span></text:p>
      <text:p text:style-name="P138" loext:marker-style-name="T3"><text:span text:style-name="T9">Output:</text:span></text:p>
      <text:p text:style-name="P14">Enter size of array: 2</text:p>
      <text:p text:style-name="P14">Addresses of previously allocated memory:26855472 26855476</text:p>
      <text:p text:style-name="P14">Enter new size of array: 4</text:p>
      <text:p text:style-name="P14">Addresses of newly allocated memory:26855472 26855476 26855480</text:p>
      <text:p text:style-name="P14">26855484</text:p>
      <text:list text:continue-numbering="true" text:style-name="WWNum9">
        <text:list-item>
          <text:h text:style-name="P102" text:outline-level="1" loext:marker-style-name="T3"><text:bookmark-start text:name="__RefHeading___Toc2206_1327778131"/><text:span text:style-name="T3"><text:s text:c="3"/></text:span><text:bookmark-start text:name="_Toc195978882"/><text:span text:style-name="T3">Union</text:span><text:bookmark-end text:name="__RefHeading___Toc2206_1327778131"/><text:bookmark-end text:name="_Toc195978882"/></text:h>
        </text:list-item>
      </text:list>
      <text:p text:style-name="P154" loext:marker-style-name="T3"><text:span text:style-name="T9">A union is a special data type available in C that allows to store different data types in the same memory location. You can define a union with many members, but only one member can contain a value at any given time. Unions provide an efficient way of using the same memory location for multiple-purpose.</text:span></text:p>
      <text:h text:style-name="P62" text:outline-level="2" loext:marker-style-name="T3"><text:span text:style-name="T3">Defining a Union</text:span></text:h>
      <text:p text:style-name="P155" loext:marker-style-name="T3"><text:span text:style-name="T9">To define a union, you must use the union statement in the same way as you did while defining a structure. The union statement defines a new data type with more than one member for your program. The format of the union statement is as follows −</text:span></text:p>
      <text:p text:style-name="P273" loext:marker-style-name="T3"><text:span text:style-name="T25">union &lt;union name&gt; { member definition; member definition; ... member definition;</text:span></text:p>
      <text:p text:style-name="P244" loext:marker-style-name="T3"><text:span text:style-name="T25">} &lt;one or more union variables separated by comma&gt;; <text:s/></text:span></text:p>
      <text:p text:style-name="P316" loext:marker-style-name="T3"><text:span text:style-name="T9">The union tag is optional and each member definition is a normal variable definition, such as int i; or float f; or any other valid variable definition. At the end of the union's definition, before the final </text:span><text:soft-page-break/><text:span text:style-name="T9">semicolon, you can specify one or more union variables but it is optional. Here is the way you would define a union type named Data having three members i, f, and str</text:span></text:p>
      <text:p text:style-name="P316" loext:marker-style-name="T3"><text:span text:style-name="T25">union Data</text:span></text:p>
      <text:p text:style-name="P316" loext:marker-style-name="T3"><text:span text:style-name="T25">{</text:span></text:p>
      <text:p text:style-name="P316" loext:marker-style-name="T3"><text:span text:style-name="T25"><text:tab/><text:tab/><text:tab/>int i;</text:span></text:p>
      <text:p text:style-name="P316" loext:marker-style-name="T3"><text:span text:style-name="T25"><text:tab/><text:tab/><text:tab/>float f;</text:span></text:p>
      <text:p text:style-name="P316" loext:marker-style-name="T3"><text:span text:style-name="T25"><text:tab/><text:tab/><text:tab/>char str[20];</text:span></text:p>
      <text:p text:style-name="P244" loext:marker-style-name="T3"><text:span text:style-name="T25">} data; <text:s/></text:span></text:p>
      <text:p text:style-name="P154" loext:marker-style-name="T3"><text:span text:style-name="T9">Now, a variable of Data type can store an integer, a floating-point number, or a string of characters. It means a single variable, i.e., same memory location, can be used to store multiple types of data. You can use any built-in or user defined data types inside a union based on your requirement.</text:span></text:p>
      <text:p text:style-name="P154" loext:marker-style-name="T3"><text:span text:style-name="T9">The memory occupied by a union will be large enough to hold the largest member of the union. For example, in the above example, Data type will occupy 20 bytes of memory space because this is the maximum space which can be occupied by a character string. The following example displays the total memory size occupied by the above union −</text:span></text:p>
      <text:p text:style-name="P138" loext:marker-style-name="T3"><text:span text:style-name="T9">Example:</text:span></text:p>
      <text:p text:style-name="P277" loext:marker-style-name="T3"><text:span text:style-name="T25">#include &lt;stdio.h&gt;</text:span></text:p>
      <text:p text:style-name="P277" loext:marker-style-name="T3"><text:span text:style-name="T25">#include &lt;string.h&gt;</text:span></text:p>
      <text:p text:style-name="P277" loext:marker-style-name="T3"><text:span text:style-name="T25">union Data</text:span></text:p>
      <text:p text:style-name="P277" loext:marker-style-name="T3"><text:span text:style-name="T25">{</text:span></text:p>
      <text:p text:style-name="P277" loext:marker-style-name="T3"><text:span text:style-name="T25"><text:s text:c="4"/>int i;</text:span></text:p>
      <text:p text:style-name="P277" loext:marker-style-name="T3"><text:span text:style-name="T25"><text:s text:c="4"/>float f;</text:span></text:p>
      <text:p text:style-name="P277" loext:marker-style-name="T3"><text:span text:style-name="T25"><text:s text:c="4"/>char str[20];</text:span></text:p>
      <text:p text:style-name="P277" loext:marker-style-name="T3"><text:span text:style-name="T25">};</text:span></text:p>
      <text:p text:style-name="P277" loext:marker-style-name="T3"><text:span text:style-name="T25">int main()</text:span></text:p>
      <text:p text:style-name="P277" loext:marker-style-name="T3"><text:span text:style-name="T25">{</text:span></text:p>
      <text:p text:style-name="P277" loext:marker-style-name="T3"><text:span text:style-name="T25"><text:s text:c="4"/>union Data data;</text:span></text:p>
      <text:p text:style-name="P277" loext:marker-style-name="T3"><text:span text:style-name="T25"><text:s text:c="4"/>printf("Memory size occupied by data : %d\n", sizeof(data));</text:span></text:p>
      <text:p text:style-name="P277" loext:marker-style-name="T3"><text:span text:style-name="T25"><text:s text:c="4"/>return 0;</text:span></text:p>
      <text:p text:style-name="P277" loext:marker-style-name="T3"><text:soft-page-break/><text:span text:style-name="T25">}</text:span></text:p>
      <text:p text:style-name="P156" loext:marker-style-name="T3"><text:span text:style-name="T9">When the above code is compiled and executed, it produces the following result −</text:span></text:p>
      <text:p text:style-name="P242" loext:marker-style-name="T3"><text:span text:style-name="T25">Memory size occupied by data : 20</text:span></text:p>
      <text:h text:style-name="P63" text:outline-level="2" loext:marker-style-name="T3"><text:span text:style-name="T3">Accessing Union Members</text:span></text:h>
      <text:p text:style-name="P154" loext:marker-style-name="T3"><text:span text:style-name="T9">To access any member of a union, we use the member access operator (.). The member access operator is coded as a period between the union variable name and the union member that we wish to access. You would use the keyword union to define variables of union type. The following example shows how to use unions in a program −</text:span></text:p>
      <text:p text:style-name="P138" loext:marker-style-name="T3"><text:span text:style-name="T9">Example:</text:span></text:p>
      <text:p text:style-name="P277" loext:marker-style-name="T3"><text:span text:style-name="T25">#include &lt;stdio.h&gt;</text:span></text:p>
      <text:p text:style-name="P277" loext:marker-style-name="T3"><text:span text:style-name="T25">#include &lt;string.h&gt;</text:span></text:p>
      <text:p text:style-name="P277" loext:marker-style-name="T3"><text:span text:style-name="T25">union Data</text:span></text:p>
      <text:p text:style-name="P277" loext:marker-style-name="T3"><text:span text:style-name="T25">{</text:span></text:p>
      <text:p text:style-name="P277" loext:marker-style-name="T3"><text:span text:style-name="T25"><text:s text:c="4"/>int i;</text:span></text:p>
      <text:p text:style-name="P277" loext:marker-style-name="T3"><text:span text:style-name="T25"><text:s text:c="4"/>float f;</text:span></text:p>
      <text:p text:style-name="P277" loext:marker-style-name="T3"><text:span text:style-name="T25"><text:s text:c="4"/>char str[20];</text:span></text:p>
      <text:p text:style-name="P277" loext:marker-style-name="T3"><text:span text:style-name="T25">};</text:span></text:p>
      <text:p text:style-name="P277" loext:marker-style-name="T3"><text:span text:style-name="T25">int main()</text:span></text:p>
      <text:p text:style-name="P277" loext:marker-style-name="T3"><text:span text:style-name="T25">{</text:span></text:p>
      <text:p text:style-name="P277" loext:marker-style-name="T3"><text:span text:style-name="T25"><text:s text:c="4"/>union Data data;</text:span></text:p>
      <text:p text:style-name="P277" loext:marker-style-name="T3"><text:span text:style-name="T25"><text:s text:c="4"/>data.i = 10;</text:span></text:p>
      <text:p text:style-name="P277" loext:marker-style-name="T3"><text:span text:style-name="T25"><text:s text:c="4"/>data.f = 220.5;</text:span></text:p>
      <text:p text:style-name="P277" loext:marker-style-name="T3"><text:span text:style-name="T25"><text:s text:c="4"/>strcpy(data.str, "C Programming");</text:span></text:p>
      <text:p text:style-name="P277" loext:marker-style-name="T3"><text:span text:style-name="T25"><text:s text:c="4"/>printf("data.i : %d\n", data.i);</text:span></text:p>
      <text:p text:style-name="P277" loext:marker-style-name="T3"><text:span text:style-name="T25"><text:s text:c="4"/>printf("data.f : %f\n", data.f);</text:span></text:p>
      <text:p text:style-name="P277" loext:marker-style-name="T3"><text:span text:style-name="T25"><text:s text:c="4"/>printf("data.str : %s\n", data.str);</text:span></text:p>
      <text:p text:style-name="P277" loext:marker-style-name="T3"><text:span text:style-name="T25"><text:s text:c="4"/>return 0;</text:span></text:p>
      <text:p text:style-name="P277" loext:marker-style-name="T3"><text:span text:style-name="T25">}</text:span></text:p>
      <text:p text:style-name="P310" loext:marker-style-name="T3"><text:soft-page-break/><text:span text:style-name="T9">When the above code is compiled and executed, it produces the following result − </text:span><text:span text:style-name="T25">data.i : 1917853763</text:span></text:p>
      <text:p text:style-name="P274" loext:marker-style-name="T3"><text:span text:style-name="T25">data.f : 4122360580327794860452759994368.000000 data.str : C Programming</text:span></text:p>
      <text:p text:style-name="P154" loext:marker-style-name="T3"><text:span text:style-name="T9">Here, we can see that the values of i and f members of union got corrupted because the final value assigned to the variable has occupied the memory location and this is the reason that the value of str member is getting printed very well.</text:span></text:p>
      <text:p text:style-name="P157" loext:marker-style-name="T3"><text:span text:style-name="T9">Now let's look into the same example once again where we will use one variable at a time which is the main purpose of having unions −</text:span></text:p>
      <text:p text:style-name="P138" loext:marker-style-name="T3"><text:span text:style-name="T9">Example:</text:span></text:p>
      <text:p text:style-name="P277" loext:marker-style-name="T3"><text:span text:style-name="T25">#include &lt;stdio.h&gt;</text:span></text:p>
      <text:p text:style-name="P277" loext:marker-style-name="T3"><text:span text:style-name="T25">#include &lt;string.h&gt;</text:span></text:p>
      <text:p text:style-name="P277" loext:marker-style-name="T3"><text:span text:style-name="T25">union Data</text:span></text:p>
      <text:p text:style-name="P277" loext:marker-style-name="T3"><text:span text:style-name="T25">{</text:span></text:p>
      <text:p text:style-name="P277" loext:marker-style-name="T3"><text:span text:style-name="T25"><text:s text:c="4"/>int i;</text:span></text:p>
      <text:p text:style-name="P277" loext:marker-style-name="T3"><text:span text:style-name="T25"><text:s text:c="4"/>float f;</text:span></text:p>
      <text:p text:style-name="P277" loext:marker-style-name="T3"><text:span text:style-name="T25"><text:s text:c="4"/>char str[20];</text:span></text:p>
      <text:p text:style-name="P277" loext:marker-style-name="T3"><text:span text:style-name="T25">};</text:span></text:p>
      <text:p text:style-name="P277" loext:marker-style-name="T3"><text:span text:style-name="T25">int main()</text:span></text:p>
      <text:p text:style-name="P277" loext:marker-style-name="T3"><text:span text:style-name="T25">{</text:span></text:p>
      <text:p text:style-name="P277" loext:marker-style-name="T3"><text:span text:style-name="T25"><text:s text:c="4"/>union Data data;</text:span></text:p>
      <text:p text:style-name="P277" loext:marker-style-name="T3"><text:span text:style-name="T25"><text:s text:c="4"/>data.i = 10;</text:span></text:p>
      <text:p text:style-name="P277" loext:marker-style-name="T3"><text:span text:style-name="T25"><text:s text:c="4"/>printf("data.i : %d\n", data.i);</text:span></text:p>
      <text:p text:style-name="P277" loext:marker-style-name="T3"><text:span text:style-name="T25"><text:s text:c="4"/>data.f = 220.5;</text:span></text:p>
      <text:p text:style-name="P277" loext:marker-style-name="T3"><text:span text:style-name="T25"><text:s text:c="4"/>printf("data.f : %f\n", data.f);</text:span></text:p>
      <text:p text:style-name="P277" loext:marker-style-name="T3"><text:span text:style-name="T25"><text:s text:c="4"/>strcpy(data.str, "C Programming");</text:span></text:p>
      <text:p text:style-name="P277" loext:marker-style-name="T3"><text:span text:style-name="T25"><text:s text:c="4"/>printf("data.str : %s\n", data.str);</text:span></text:p>
      <text:p text:style-name="P277" loext:marker-style-name="T3"><text:soft-page-break/><text:span text:style-name="T25"><text:s text:c="4"/>return 0;</text:span></text:p>
      <text:p text:style-name="P277" loext:marker-style-name="T3"><text:span text:style-name="T25">}</text:span></text:p>
      <text:p text:style-name="P309" loext:marker-style-name="T3"><text:span text:style-name="T9">When the above code is compiled and executed, it produces the following result − </text:span><text:span text:style-name="T8">data.i : 10</text:span></text:p>
      <text:p text:style-name="P309" loext:marker-style-name="T3"><text:span text:style-name="T8">data.f : 220.500000</text:span></text:p>
      <text:p text:style-name="P309" loext:marker-style-name="T3"><text:span text:style-name="T8">data.str : C Programming</text:span></text:p>
      <text:p text:style-name="P158" loext:marker-style-name="T3"><text:span text:style-name="T9">Here, all the members are getting printed very well because one member is being used at a time.</text:span></text:p>
      <text:list text:continue-numbering="true" text:style-name="WWNum9">
        <text:list-item>
          <text:h text:style-name="P103" text:outline-level="1" loext:marker-style-name="T3"><text:bookmark-start text:name="__RefHeading___Toc2208_1327778131"/><text:span text:style-name="T3"><text:s text:c="3"/></text:span><text:bookmark-start text:name="_Toc195978883"/><text:span text:style-name="T3">Linked List</text:span><text:bookmark-end text:name="__RefHeading___Toc2208_1327778131"/><text:bookmark-end text:name="_Toc195978883"/></text:h>
        </text:list-item>
      </text:list>
      <text:p text:style-name="P45">Example: </text:p>
      <text:p text:style-name="P317" loext:marker-style-name="T3"><text:span text:style-name="T25">#include &lt;stdio.h&gt;</text:span></text:p>
      <text:p text:style-name="P317" loext:marker-style-name="T3"><text:span text:style-name="T25">#include &lt;string.h&gt;</text:span></text:p>
      <text:p text:style-name="P317" loext:marker-style-name="T3"><text:span text:style-name="T25">#include &lt;stdlib.h&gt;</text:span></text:p>
      <text:p text:style-name="P317" loext:marker-style-name="T3"><text:span text:style-name="T25">struct node</text:span></text:p>
      <text:p text:style-name="P317" loext:marker-style-name="T3"><text:span text:style-name="T25">{</text:span></text:p>
      <text:p text:style-name="P317" loext:marker-style-name="T3"><text:span text:style-name="T25"><text:s text:c="4"/>int data;</text:span></text:p>
      <text:p text:style-name="P317" loext:marker-style-name="T3"><text:span text:style-name="T25"><text:s text:c="4"/>struct node *next;</text:span></text:p>
      <text:p text:style-name="P317" loext:marker-style-name="T3"><text:span text:style-name="T25">};</text:span></text:p>
      <text:p text:style-name="P317" loext:marker-style-name="T3"><text:span text:style-name="T25">struct node *head = NULL;</text:span></text:p>
      <text:p text:style-name="P317" loext:marker-style-name="T3"><text:span text:style-name="T25">// display the list</text:span></text:p>
      <text:p text:style-name="P317" loext:marker-style-name="T3"><text:span text:style-name="T25">void printList()</text:span></text:p>
      <text:p text:style-name="P317" loext:marker-style-name="T3"><text:span text:style-name="T25">{</text:span></text:p>
      <text:p text:style-name="P317" loext:marker-style-name="T3"><text:span text:style-name="T25"><text:s text:c="4"/>struct node *p = head;</text:span></text:p>
      <text:p text:style-name="P317" loext:marker-style-name="T3"><text:span text:style-name="T25"><text:s text:c="4"/>printf("\n[");</text:span></text:p>
      <text:p text:style-name="P317" loext:marker-style-name="T3"><text:span text:style-name="T25"><text:s text:c="4"/>// start from the beginning</text:span></text:p>
      <text:p text:style-name="P317" loext:marker-style-name="T3"><text:span text:style-name="T25"><text:s text:c="4"/>while (p != NULL)</text:span></text:p>
      <text:p text:style-name="P317" loext:marker-style-name="T3"><text:soft-page-break/><text:span text:style-name="T25"><text:s text:c="4"/>{</text:span></text:p>
      <text:p text:style-name="P317" loext:marker-style-name="T3"><text:span text:style-name="T25"><text:s text:c="8"/>printf(" %d ", p-&gt;data);</text:span></text:p>
      <text:p text:style-name="P317" loext:marker-style-name="T3"><text:span text:style-name="T25"><text:s text:c="8"/>p = p-&gt;next;</text:span></text:p>
      <text:p text:style-name="P317" loext:marker-style-name="T3"><text:span text:style-name="T25"><text:s text:c="4"/>}</text:span></text:p>
      <text:p text:style-name="P317" loext:marker-style-name="T3"><text:span text:style-name="T25"><text:s text:c="4"/>printf("]");</text:span></text:p>
      <text:p text:style-name="P317" loext:marker-style-name="T3"><text:span text:style-name="T25">}</text:span></text:p>
      <text:p text:style-name="P317" loext:marker-style-name="T3"><text:span text:style-name="T25">// insertion at the beginning</text:span></text:p>
      <text:p text:style-name="P317" loext:marker-style-name="T3"><text:span text:style-name="T25">void insertatbegin(int data)</text:span></text:p>
      <text:p text:style-name="P317" loext:marker-style-name="T3"><text:span text:style-name="T25">{ // create a link</text:span></text:p>
      <text:p text:style-name="P317" loext:marker-style-name="T3"><text:span text:style-name="T25"><text:s text:c="4"/>struct node *lk = (struct node *)malloc(sizeof(struct node));</text:span></text:p>
      <text:p text:style-name="P317" loext:marker-style-name="T3"><text:span text:style-name="T25"><text:s text:c="4"/>lk-&gt;data = data;</text:span></text:p>
      <text:p text:style-name="P317" loext:marker-style-name="T3"><text:span text:style-name="T25"><text:s text:c="4"/>// point it to old first node</text:span></text:p>
      <text:p text:style-name="P317" loext:marker-style-name="T3"><text:span text:style-name="T25"><text:s text:c="4"/>lk-&gt;next = head;</text:span></text:p>
      <text:p text:style-name="P317" loext:marker-style-name="T3"><text:span text:style-name="T25"><text:s text:c="4"/>// point first to new first node</text:span></text:p>
      <text:p text:style-name="P317" loext:marker-style-name="T3"><text:span text:style-name="T25"><text:s text:c="4"/>head = lk;</text:span></text:p>
      <text:p text:style-name="P317" loext:marker-style-name="T3"><text:span text:style-name="T25">}</text:span></text:p>
      <text:p text:style-name="P317" loext:marker-style-name="T3"><text:span text:style-name="T25">void insertatend(int data)</text:span></text:p>
      <text:p text:style-name="P317" loext:marker-style-name="T3"><text:span text:style-name="T25">{ // create a link</text:span></text:p>
      <text:p text:style-name="P317" loext:marker-style-name="T3"><text:span text:style-name="T25"><text:s text:c="4"/>struct node *lk = (struct node *)malloc(sizeof(struct node));</text:span></text:p>
      <text:p text:style-name="P317" loext:marker-style-name="T3"><text:span text:style-name="T25"><text:s text:c="4"/>lk-&gt;data = data;</text:span></text:p>
      <text:p text:style-name="P317" loext:marker-style-name="T3"><text:span text:style-name="T25"><text:s text:c="4"/>lk-&gt;next = NULL;</text:span></text:p>
      <text:p text:style-name="P317" loext:marker-style-name="T3"><text:span text:style-name="T25"><text:s text:c="4"/>struct node *linkedlist = head;</text:span></text:p>
      <text:p text:style-name="P317" loext:marker-style-name="T3"><text:span text:style-name="T25"><text:s text:c="4"/>// point it to old first node</text:span></text:p>
      <text:p text:style-name="P317" loext:marker-style-name="T3"><text:span text:style-name="T25"><text:s text:c="4"/>while (linkedlist-&gt;next != NULL)</text:span></text:p>
      <text:p text:style-name="P317" loext:marker-style-name="T3"><text:span text:style-name="T25"><text:s text:c="4"/>{</text:span></text:p>
      <text:p text:style-name="P317" loext:marker-style-name="T3"><text:span text:style-name="T25"><text:s text:c="8"/>linkedlist = linkedlist-&gt;next;</text:span></text:p>
      <text:p text:style-name="P317" loext:marker-style-name="T3"><text:span text:style-name="T25"><text:s text:c="4"/>} // point first to new first node</text:span></text:p>
      <text:p text:style-name="P317" loext:marker-style-name="T3"><text:span text:style-name="T25"><text:s text:c="4"/>linkedlist-&gt;next = lk;</text:span></text:p>
      <text:p text:style-name="P317" loext:marker-style-name="T3"><text:soft-page-break/><text:span text:style-name="T25">}</text:span></text:p>
      <text:p text:style-name="P317" loext:marker-style-name="T3"><text:span text:style-name="T25">void insertafternode(struct node *list, int data)</text:span></text:p>
      <text:p text:style-name="P317" loext:marker-style-name="T3"><text:span text:style-name="T25">{</text:span></text:p>
      <text:p text:style-name="P317" loext:marker-style-name="T3"><text:span text:style-name="T25"><text:s text:c="4"/>struct node *lk = (struct node *)malloc(sizeof(struct node));</text:span></text:p>
      <text:p text:style-name="P317" loext:marker-style-name="T3"><text:span text:style-name="T25"><text:s text:c="4"/>lk-&gt;data = data;</text:span></text:p>
      <text:p text:style-name="P317" loext:marker-style-name="T3"><text:span text:style-name="T25"><text:s text:c="4"/>lk-&gt;next = list-&gt;next;</text:span></text:p>
      <text:p text:style-name="P317" loext:marker-style-name="T3"><text:span text:style-name="T25"><text:s text:c="4"/>list-&gt;next = lk;</text:span></text:p>
      <text:p text:style-name="P317" loext:marker-style-name="T3"><text:span text:style-name="T25">}</text:span></text:p>
      <text:p text:style-name="P317" loext:marker-style-name="T3"><text:span text:style-name="T25">void deleteatbegin()</text:span></text:p>
      <text:p text:style-name="P317" loext:marker-style-name="T3"><text:span text:style-name="T25">{</text:span></text:p>
      <text:p text:style-name="P317" loext:marker-style-name="T3"><text:span text:style-name="T25"><text:s text:c="4"/>head = head-&gt;next;</text:span></text:p>
      <text:p text:style-name="P317" loext:marker-style-name="T3"><text:span text:style-name="T25">}</text:span></text:p>
      <text:p text:style-name="P317" loext:marker-style-name="T3"><text:span text:style-name="T25">void deleteatend()</text:span></text:p>
      <text:p text:style-name="P317" loext:marker-style-name="T3"><text:span text:style-name="T25">{</text:span></text:p>
      <text:p text:style-name="P317" loext:marker-style-name="T3"><text:span text:style-name="T25"><text:s text:c="4"/>struct node *linkedlist = head;</text:span></text:p>
      <text:p text:style-name="P317" loext:marker-style-name="T3"><text:span text:style-name="T25"><text:s text:c="4"/>while (linkedlist-&gt;next-&gt;next != NULL)</text:span></text:p>
      <text:p text:style-name="P317" loext:marker-style-name="T3"><text:span text:style-name="T25"><text:s text:c="4"/>{</text:span></text:p>
      <text:p text:style-name="P317" loext:marker-style-name="T3"><text:span text:style-name="T25"><text:s text:c="8"/>linkedlist = linkedlist-&gt;next;</text:span></text:p>
      <text:p text:style-name="P317" loext:marker-style-name="T3"><text:span text:style-name="T25"><text:s text:c="4"/>}</text:span></text:p>
      <text:p text:style-name="P317" loext:marker-style-name="T3"><text:span text:style-name="T25"><text:s text:c="4"/>linkedlist-&gt;next = NULL;</text:span></text:p>
      <text:p text:style-name="P317" loext:marker-style-name="T3"><text:span text:style-name="T25">}</text:span></text:p>
      <text:p text:style-name="P317" loext:marker-style-name="T3"><text:span text:style-name="T25">void deletenode(int key)</text:span></text:p>
      <text:p text:style-name="P317" loext:marker-style-name="T3"><text:span text:style-name="T25">{</text:span></text:p>
      <text:p text:style-name="P317" loext:marker-style-name="T3"><text:span text:style-name="T25"><text:s text:c="4"/>struct node *temp = head, *prev = NULL;</text:span></text:p>
      <text:p text:style-name="P317" loext:marker-style-name="T3"><text:span text:style-name="T25"><text:s text:c="4"/>if (temp != NULL &amp;&amp; temp-&gt;data == key)</text:span></text:p>
      <text:p text:style-name="P317" loext:marker-style-name="T3"><text:span text:style-name="T25"><text:s text:c="4"/>{</text:span></text:p>
      <text:p text:style-name="P317" loext:marker-style-name="T3"><text:span text:style-name="T25"><text:s text:c="8"/>head = temp-&gt;next;</text:span></text:p>
      <text:p text:style-name="P317" loext:marker-style-name="T3"><text:span text:style-name="T25"><text:s text:c="8"/>return;</text:span></text:p>
      <text:p text:style-name="P317" loext:marker-style-name="T3"><text:soft-page-break/><text:span text:style-name="T25"><text:s text:c="4"/>}</text:span></text:p>
      <text:p text:style-name="P317" loext:marker-style-name="T3"><text:span text:style-name="T25"><text:s text:c="4"/>// Find the key to be deleted</text:span></text:p>
      <text:p text:style-name="P317" loext:marker-style-name="T3"><text:span text:style-name="T25"><text:s text:c="4"/>while (temp != NULL &amp;&amp; temp-&gt;data != key)</text:span></text:p>
      <text:p text:style-name="P317" loext:marker-style-name="T3"><text:span text:style-name="T25"><text:s text:c="4"/>{</text:span></text:p>
      <text:p text:style-name="P317" loext:marker-style-name="T3"><text:span text:style-name="T25"><text:s text:c="8"/>prev = temp;</text:span></text:p>
      <text:p text:style-name="P317" loext:marker-style-name="T3"><text:span text:style-name="T25"><text:s text:c="8"/>temp = temp-&gt;next;</text:span></text:p>
      <text:p text:style-name="P317" loext:marker-style-name="T3"><text:span text:style-name="T25"><text:s text:c="4"/>}</text:span></text:p>
      <text:p text:style-name="P317" loext:marker-style-name="T3"><text:span text:style-name="T25"><text:s text:c="4"/>// If the key is not present</text:span></text:p>
      <text:p text:style-name="P317" loext:marker-style-name="T3"><text:span text:style-name="T25"><text:s text:c="4"/>if (temp == NULL)</text:span></text:p>
      <text:p text:style-name="P317" loext:marker-style-name="T3"><text:span text:style-name="T25"><text:s text:c="4"/>{</text:span></text:p>
      <text:p text:style-name="P317" loext:marker-style-name="T3"><text:span text:style-name="T25"><text:s text:c="8"/>return;</text:span></text:p>
      <text:p text:style-name="P317" loext:marker-style-name="T3"><text:span text:style-name="T25"><text:s text:c="4"/>}</text:span></text:p>
      <text:p text:style-name="P317" loext:marker-style-name="T3"><text:span text:style-name="T25"><text:s text:c="4"/>// Remove the node</text:span></text:p>
      <text:p text:style-name="P317" loext:marker-style-name="T3"><text:span text:style-name="T25"><text:s text:c="4"/>prev-&gt;next = temp-&gt;next;</text:span></text:p>
      <text:p text:style-name="P317" loext:marker-style-name="T3"><text:span text:style-name="T25">}</text:span></text:p>
      <text:p text:style-name="P317" loext:marker-style-name="T3"><text:span text:style-name="T25">int searchlist(int key)</text:span></text:p>
      <text:p text:style-name="P317" loext:marker-style-name="T3"><text:span text:style-name="T25">{</text:span></text:p>
      <text:p text:style-name="P317" loext:marker-style-name="T3"><text:span text:style-name="T25"><text:s text:c="4"/>struct node *temp = head;</text:span></text:p>
      <text:p text:style-name="P317" loext:marker-style-name="T3"><text:span text:style-name="T25"><text:s text:c="4"/>while (temp != NULL)</text:span></text:p>
      <text:p text:style-name="P317" loext:marker-style-name="T3"><text:span text:style-name="T25"><text:s text:c="4"/>{</text:span></text:p>
      <text:p text:style-name="P317" loext:marker-style-name="T3"><text:span text:style-name="T25"><text:s text:c="8"/>if (temp-&gt;data == key)</text:span></text:p>
      <text:p text:style-name="P317" loext:marker-style-name="T3"><text:span text:style-name="T25"><text:s text:c="8"/>{</text:span></text:p>
      <text:p text:style-name="P317" loext:marker-style-name="T3"><text:span text:style-name="T25"><text:s text:c="12"/>return 1;</text:span></text:p>
      <text:p text:style-name="P317" loext:marker-style-name="T3"><text:span text:style-name="T25"><text:s text:c="8"/>}</text:span></text:p>
      <text:p text:style-name="P317" loext:marker-style-name="T3"><text:span text:style-name="T25"><text:s text:c="8"/>temp = temp-&gt;next;</text:span></text:p>
      <text:p text:style-name="P317" loext:marker-style-name="T3"><text:span text:style-name="T25"><text:s text:c="4"/>}</text:span></text:p>
      <text:p text:style-name="P317" loext:marker-style-name="T3"><text:span text:style-name="T25"><text:s text:c="4"/>return 0;</text:span></text:p>
      <text:p text:style-name="P317" loext:marker-style-name="T3"><text:span text:style-name="T25">}</text:span></text:p>
      <text:p text:style-name="P317" loext:marker-style-name="T3"><text:soft-page-break/><text:span text:style-name="T25">void main()</text:span></text:p>
      <text:p text:style-name="P317" loext:marker-style-name="T3"><text:span text:style-name="T25">{</text:span></text:p>
      <text:p text:style-name="P317" loext:marker-style-name="T3"><text:span text:style-name="T25"><text:s text:c="4"/>int k = 0;</text:span></text:p>
      <text:p text:style-name="P317" loext:marker-style-name="T3"><text:span text:style-name="T25"><text:s text:c="4"/>insertatbegin(12);</text:span></text:p>
      <text:p text:style-name="P317" loext:marker-style-name="T3"><text:span text:style-name="T25"><text:s text:c="4"/>insertatbegin(22);</text:span></text:p>
      <text:p text:style-name="P317" loext:marker-style-name="T3"><text:span text:style-name="T25"><text:s text:c="4"/>insertatend(30);</text:span></text:p>
      <text:p text:style-name="P317" loext:marker-style-name="T3"><text:span text:style-name="T25"><text:s text:c="4"/>insertatend(44);</text:span></text:p>
      <text:p text:style-name="P317" loext:marker-style-name="T3"><text:span text:style-name="T25"><text:s text:c="4"/>insertatbegin(50);</text:span></text:p>
      <text:p text:style-name="P317" loext:marker-style-name="T3"><text:span text:style-name="T25"><text:s text:c="4"/>insertafternode(head-&gt;next-&gt;next, 33);</text:span></text:p>
      <text:p text:style-name="P317" loext:marker-style-name="T3"><text:span text:style-name="T25"><text:s text:c="4"/>printf("Linked List: ");</text:span></text:p>
      <text:p text:style-name="P317" loext:marker-style-name="T3"><text:span text:style-name="T25"><text:s text:c="4"/>// print list</text:span></text:p>
      <text:p text:style-name="P317" loext:marker-style-name="T3"><text:span text:style-name="T25"><text:s text:c="4"/>printList();</text:span></text:p>
      <text:p text:style-name="P317" loext:marker-style-name="T3"><text:span text:style-name="T25"><text:s text:c="4"/>deleteatbegin();</text:span></text:p>
      <text:p text:style-name="P317" loext:marker-style-name="T3"><text:span text:style-name="T25"><text:s text:c="4"/>deleteatend();</text:span></text:p>
      <text:p text:style-name="P317" loext:marker-style-name="T3"><text:span text:style-name="T25"><text:s text:c="4"/>deletenode(12);</text:span></text:p>
      <text:p text:style-name="P317" loext:marker-style-name="T3"><text:span text:style-name="T25"><text:s text:c="4"/>printf("\nLinked List after deletion: ");</text:span></text:p>
      <text:p text:style-name="P317" loext:marker-style-name="T3"><text:span text:style-name="T25"><text:s text:c="4"/>// print list</text:span></text:p>
      <text:p text:style-name="P317" loext:marker-style-name="T3"><text:span text:style-name="T25"><text:s text:c="4"/>printList();</text:span></text:p>
      <text:p text:style-name="P317" loext:marker-style-name="T3"><text:span text:style-name="T25"><text:s text:c="4"/>insertatbegin(4);</text:span></text:p>
      <text:p text:style-name="P317" loext:marker-style-name="T3"><text:span text:style-name="T25"><text:s text:c="4"/>insertatbegin(16);</text:span></text:p>
      <text:p text:style-name="P317" loext:marker-style-name="T3"><text:span text:style-name="T25"><text:s text:c="4"/>printf("\nUpdated Linked List: ");</text:span></text:p>
      <text:p text:style-name="P317" loext:marker-style-name="T3"><text:span text:style-name="T25"><text:s text:c="4"/>printList();</text:span></text:p>
      <text:p text:style-name="P317" loext:marker-style-name="T3"><text:span text:style-name="T25"><text:s text:c="4"/>k = searchlist(16);</text:span></text:p>
      <text:p text:style-name="P317" loext:marker-style-name="T3"><text:span text:style-name="T25"><text:s text:c="4"/>if (k == 1)</text:span></text:p>
      <text:p text:style-name="P317" loext:marker-style-name="T3"><text:span text:style-name="T25"><text:s text:c="4"/>{</text:span></text:p>
      <text:p text:style-name="P317" loext:marker-style-name="T3"><text:span text:style-name="T25"><text:s text:c="8"/>printf("\nElement is found");</text:span></text:p>
      <text:p text:style-name="P317" loext:marker-style-name="T3"><text:span text:style-name="T25"><text:s text:c="4"/>}</text:span></text:p>
      <text:p text:style-name="P317" loext:marker-style-name="T3"><text:span text:style-name="T25"><text:s text:c="4"/>else</text:span></text:p>
      <text:p text:style-name="P317" loext:marker-style-name="T3"><text:soft-page-break/><text:span text:style-name="T25"><text:s text:c="4"/>{</text:span></text:p>
      <text:p text:style-name="P317" loext:marker-style-name="T3"><text:span text:style-name="T25"><text:s text:c="8"/>printf("\nElement is not present in the list");</text:span></text:p>
      <text:p text:style-name="P317" loext:marker-style-name="T3"><text:span text:style-name="T25"><text:s text:c="4"/>}</text:span></text:p>
      <text:p text:style-name="P317" loext:marker-style-name="T3"><text:span text:style-name="T25">}</text:span></text:p>
      <text:p text:style-name="P142" loext:marker-style-name="T3"><text:span text:style-name="T9">If we compile and run the above program, it will produce the following result −</text:span></text:p>
      <text:p text:style-name="P199" loext:marker-style-name="T3"><text:span text:style-name="T21">Output:</text:span></text:p>
      <text:p text:style-name="P236" loext:marker-style-name="T3"><text:span text:style-name="T25">Linked List: </text:span></text:p>
      <text:p text:style-name="P311" loext:marker-style-name="T3"><text:span text:style-name="T25">[ 50 <text:s/>22 <text:s/>12 <text:s/>33 <text:s/>30 <text:s/>44 ] Linked List after deletion: [ 22 <text:s/>33 <text:s/>30 ] Updated Linked List: </text:span></text:p>
      <text:p text:style-name="P236" loext:marker-style-name="T3"><text:span text:style-name="T25">[ 16 <text:s/>4 <text:s/>22 <text:s/>33 <text:s/>30 ]</text:span></text:p>
      <text:p text:style-name="P245" loext:marker-style-name="T3"><text:span text:style-name="T25">Element is found</text:span></text:p>
      <text:list text:continue-numbering="true" text:style-name="WWNum9">
        <text:list-item>
          <text:h text:style-name="P104" text:outline-level="1" loext:marker-style-name="T3"><text:bookmark-start text:name="__RefHeading___Toc2210_1327778131"/><text:span text:style-name="T3"><text:s text:c="3"/></text:span><text:bookmark-start text:name="_Toc195978884"/><text:span text:style-name="T3">Splitting a string using strtok()</text:span><text:bookmark-end text:name="__RefHeading___Toc2210_1327778131"/><text:bookmark-end text:name="_Toc195978884"/></text:h>
        </text:list-item>
      </text:list>
      <text:p text:style-name="P159" loext:marker-style-name="T3"><text:span text:style-name="T9">Use string.h header file for getting access to strtok().</text:span></text:p>
      <text:p text:style-name="P250" loext:marker-style-name="T3"><text:span text:style-name="T37"><text:s text:c="2"/></text:span></text:p>
      <text:p text:style-name="P19">#include &lt;stdio.h&gt;</text:p>
      <text:p text:style-name="P19">#include &lt;string.h&gt;</text:p>
      <text:p text:style-name="P19">int main()</text:p>
      <text:p text:style-name="P19">{</text:p>
      <text:p text:style-name="P19"><text:s text:c="4"/>char *token;</text:p>
      <text:p text:style-name="P19"><text:s text:c="4"/>char s[] = "This is a string";</text:p>
      <text:p text:style-name="P19"><text:s text:c="4"/>char copy[strlen(s) + 1]; // +1 for the null terminator</text:p>
      <text:p text:style-name="P19"><text:s text:c="4"/>strcpy(copy, s); <text:s text:c="9"/>// copy the string</text:p>
      <text:p text:style-name="P19"><text:s text:c="4"/>for(token = strtok(copy, " "); token != NULL; token = strtok(NULL, " "))</text:p>
      <text:p text:style-name="P19"><text:s text:c="4"/>{</text:p>
      <text:p text:style-name="P19"><text:s text:c="8"/>printf("%s\n", token); // added newline for clarity</text:p>
      <text:p text:style-name="P19"><text:s text:c="4"/>}</text:p>
      <text:p text:style-name="P19"><text:soft-page-break/><text:s text:c="4"/>return 0;</text:p>
      <text:p text:style-name="P19">}</text:p>
      <text:p text:style-name="P39"/>
      <text:list text:continue-numbering="true" text:style-name="WWNum9">
        <text:list-item>
          <text:h text:style-name="P105" text:outline-level="1" loext:marker-style-name="T3"><text:bookmark-start text:name="__RefHeading___Toc2212_1327778131"/><text:span text:style-name="T3"><text:s text:c="3"/></text:span><text:bookmark-start text:name="_Toc195978885"/><text:span text:style-name="T3">Pointer to Structure</text:span><text:bookmark-end text:name="__RefHeading___Toc2212_1327778131"/><text:bookmark-end text:name="_Toc195978885"/></text:h>
        </text:list-item>
      </text:list>
      <text:p text:style-name="P19">struct dog</text:p>
      <text:p text:style-name="P19">{</text:p>
      <text:p text:style-name="P19"><text:s text:c="4"/>char name[10];</text:p>
      <text:p text:style-name="P19"><text:s text:c="4"/>char breed[10];</text:p>
      <text:p text:style-name="P19"><text:s text:c="4"/>int age;</text:p>
      <text:p text:style-name="P19"><text:s text:c="4"/>char color[10];</text:p>
      <text:p text:style-name="P19">};</text:p>
      <text:p text:style-name="P19">/* declaring a pointer to a structure of type struct dog */</text:p>
      <text:p text:style-name="P19">struct dog spike; </text:p>
      <text:p text:style-name="P19">struct dog *ptr_dog;</text:p>
      <text:p text:style-name="P19">ptr_dog = &amp;spike;</text:p>
      <text:p text:style-name="P19">(*ptr_dog).name <text:s/>// refers to the name of dog </text:p>
      <text:p text:style-name="P19">(*ptr_dog).breed <text:s/>//refers to the breed of dog</text:p>
      <text:p text:style-name="P19">ptr_dog→name <text:s/>//refers to the name of dog</text:p>
      <text:p text:style-name="P19">ptr_dog→breed <text:s/>//refers to the breed of dog</text:p>
      <text:p text:style-name="P39"/>
      <text:list text:continue-numbering="true" text:style-name="WWNum9">
        <text:list-item>
          <text:h text:style-name="P106" text:outline-level="1" loext:marker-style-name="T3"><text:bookmark-start text:name="__RefHeading___Toc2214_1327778131"/><text:span text:style-name="T3"><text:s text:c="3"/></text:span><text:bookmark-start text:name="_Toc195978886"/><text:span text:style-name="T3">Easy way to find the number of elements in an array</text:span><text:bookmark-end text:name="__RefHeading___Toc2214_1327778131"/><text:bookmark-end text:name="_Toc195978886"/></text:h>
        </text:list-item>
      </text:list>
      <text:p text:style-name="P19">int arr[] = {10, 5, 15, 12, 90, 80};</text:p>
      <text:p text:style-name="P19">int n = sizeof(arr)/sizeof(arr[0]);</text:p>
      <text:list xml:id="list185528275296812" text:continue-numbering="true" text:style-name="WWNum9">
        <text:list-item>
          <text:h text:style-name="P107" text:outline-level="1" loext:marker-style-name="T3"><text:bookmark-start text:name="__RefHeading___Toc2216_1327778131"/><text:span text:style-name="T3"><text:s text:c="3"/></text:span><text:bookmark-start text:name="_Toc195978887"/><text:span text:style-name="T3">Function Pointers</text:span><text:bookmark-end text:name="__RefHeading___Toc2216_1327778131"/><text:bookmark-end text:name="_Toc195978887"/></text:h>
        </text:list-item>
      </text:list>
      <text:p text:style-name="P138" loext:marker-style-name="T3"><text:span text:style-name="T9">In C, like normal data pointers (int *, char *, etc), we can have pointers to functions. Following is a simple example that shows declaration and function call using function pointer.</text:span></text:p>
      <text:p text:style-name="P19">#include &lt;stdio.h&gt;</text:p>
      <text:p text:style-name="P19">// A normal function with an int parameter and void return type</text:p>
      <text:p text:style-name="P19">void fun(int a)</text:p>
      <text:p text:style-name="P19">{</text:p>
      <text:p text:style-name="P251" loext:marker-style-name="T3"><text:soft-page-break/><text:span text:style-name="T25"><text:s text:c="4"/>printf("Value of a is %d\n", a);</text:span></text:p>
      <text:p text:style-name="P19">}</text:p>
      <text:p text:style-name="P19">int main()</text:p>
      <text:p text:style-name="P19">{</text:p>
      <text:p text:style-name="P19"><text:s text:c="4"/>// fun_ptr is a pointer to function fun()</text:p>
      <text:p text:style-name="P19"><text:s text:c="4"/>void (*fun_ptr)(int) = &amp;fun;</text:p>
      <text:p text:style-name="P19"><text:s text:c="4"/></text:p>
      <text:p text:style-name="P19"><text:s text:c="4"/>/* The above line is equivalent of following two</text:p>
      <text:p text:style-name="P19"><text:s text:c="4"/>void (*fun_ptr)(int);</text:p>
      <text:p text:style-name="P19"><text:s text:c="4"/>fun_ptr = &amp;fun;</text:p>
      <text:p text:style-name="P19"><text:s text:c="4"/>*/</text:p>
      <text:p text:style-name="P19"><text:s text:c="4"/></text:p>
      <text:p text:style-name="P19"><text:s text:c="4"/>// Invoking fun() using fun_ptr</text:p>
      <text:p text:style-name="P19"><text:s text:c="4"/>(*fun_ptr)(10);</text:p>
      <text:p text:style-name="P19"><text:s text:c="4"/></text:p>
      <text:p text:style-name="P19"><text:s text:c="4"/>/* The above line is equivalent of following</text:p>
      <text:p text:style-name="P19"><text:s text:c="4"/>fun_ptr(10);</text:p>
      <text:p text:style-name="P19"><text:s text:c="4"/>*/</text:p>
      <text:p text:style-name="P19"><text:s text:c="4"/>return 0;</text:p>
      <text:p text:style-name="P19">}</text:p>
      <text:p text:style-name="P199" loext:marker-style-name="T3"><text:span text:style-name="T21">Output:</text:span></text:p>
      <text:p text:style-name="P201" loext:marker-style-name="T3"><text:span text:style-name="T25">Value of a is 10</text:span></text:p>
      <text:p text:style-name="P142" loext:marker-style-name="T3"><text:span text:style-name="T9">Why do we need an extra bracket around function pointers like fun_ptr in above example?</text:span></text:p>
      <text:p text:style-name="P160" loext:marker-style-name="T3"><text:span text:style-name="T9">If we remove bracket, then the expression “void (*fun_ptr)(int)” becomes “void *fun_ptr(int)” which is declaration of a function that returns void pointer. See following post for details.</text:span></text:p>
      <text:p text:style-name="P198" loext:marker-style-name="T3"><text:span text:style-name="T21">Following are some interesting facts about function pointers.</text:span></text:p>
      <text:list text:style-name="WWNum3">
        <text:list-item>
          <text:p text:style-name="P185" loext:marker-style-name="T3"><text:span text:style-name="T9">Unlike normal pointers, a function pointer points to code, not data. Typically, a function pointer stores the start of executable code.</text:span></text:p>
        </text:list-item>
      </text:list>
      <text:p text:style-name="P202" loext:marker-style-name="T3"><text:soft-page-break/><text:span text:style-name="T25">#include &lt;stdio.h&gt;</text:span></text:p>
      <text:p text:style-name="P202" loext:marker-style-name="T3"><text:span text:style-name="T25">int main(void)</text:span></text:p>
      <text:p text:style-name="P202" loext:marker-style-name="T3"><text:span text:style-name="T25">{</text:span></text:p>
      <text:p text:style-name="P202" loext:marker-style-name="T3"><text:span text:style-name="T25"><text:s text:c="4"/>void (*lets_jump)(void) = (void *)0x1233;</text:span></text:p>
      <text:p text:style-name="P202" loext:marker-style-name="T3"><text:span text:style-name="T25"><text:s text:c="4"/>lets_jump();</text:span></text:p>
      <text:p text:style-name="P202" loext:marker-style-name="T3"><text:span text:style-name="T25"><text:s text:c="4"/>return (0);</text:span></text:p>
      <text:p text:style-name="P202" loext:marker-style-name="T3"><text:span text:style-name="T25">}</text:span></text:p>
      <text:p text:style-name="P199" loext:marker-style-name="T3"><text:span text:style-name="T21">Output:</text:span></text:p>
      <text:p text:style-name="P203" loext:marker-style-name="T3"><text:span text:style-name="T25">&lt;jumps to the memory location 0x1233 and executes the code present there&gt;</text:span></text:p>
      <text:list text:continue-numbering="true" text:style-name="WWNum3">
        <text:list-item>
          <text:p text:style-name="P186" loext:marker-style-name="T3"><text:span text:style-name="T9">Unlike normal pointers, we do not allocate de-allocate memory using function pointers.</text:span></text:p>
        </text:list-item>
        <text:list-item>
          <text:p text:style-name="P185" loext:marker-style-name="T3"><text:span text:style-name="T9">A function’s name can also be used to get functions’ address. For example, in the below program, we have removed address operator ‘&amp;’ in assignment. We have also changed function call by removing *, the program still works.</text:span></text:p>
        </text:list-item>
      </text:list>
      <text:p text:style-name="P22">#include &lt;stdio.h&gt;</text:p>
      <text:p text:style-name="P22">// A normal function with an int parameter and void return type</text:p>
      <text:p text:style-name="P22">void fun(int a)</text:p>
      <text:p text:style-name="P22">{</text:p>
      <text:p text:style-name="P22"><text:s text:c="4"/>printf("Value of a is %d\n", a);</text:p>
      <text:p text:style-name="P22">}</text:p>
      <text:p text:style-name="P22">int main()</text:p>
      <text:p text:style-name="P22">{</text:p>
      <text:p text:style-name="P22"><text:s text:c="4"/>void (*fun_ptr)(int) = fun; // &amp; removed</text:p>
      <text:p text:style-name="P22"><text:s text:c="4"/>fun_ptr(10); <text:s text:c="15"/>// * removed</text:p>
      <text:p text:style-name="P22"><text:s text:c="4"/>return 0;</text:p>
      <text:p text:style-name="P22">}</text:p>
      <text:p text:style-name="P199" loext:marker-style-name="T3"><text:span text:style-name="T21">Output:</text:span></text:p>
      <text:p text:style-name="P201" loext:marker-style-name="T3"><text:span text:style-name="T25">Value of a is 10</text:span></text:p>
      <text:list text:style-name="WWNum8">
        <text:list-item>
          <text:p text:style-name="P126" loext:marker-style-name="T3"><text:soft-page-break/><text:span text:style-name="T9">Like normal pointers, we can have an array of function pointers. Below example in point 5 shows syntax for array of pointers.</text:span></text:p>
        </text:list-item>
        <text:list-item>
          <text:p text:style-name="P127" loext:marker-style-name="T3"><text:span text:style-name="T9">Function pointer can be used in place of switch case. For example, in below program, user is asked for a choice between 0 and 2 to do different tasks.</text:span></text:p>
        </text:list-item>
      </text:list>
      <text:p text:style-name="P318" loext:marker-style-name="T3"><text:span text:style-name="T25">#include &lt;stdio.h&gt;</text:span></text:p>
      <text:p text:style-name="P318" loext:marker-style-name="T3"><text:span text:style-name="T25">void add(int a, int b)</text:span></text:p>
      <text:p text:style-name="P318" loext:marker-style-name="T3"><text:span text:style-name="T25">{</text:span></text:p>
      <text:p text:style-name="P318" loext:marker-style-name="T3"><text:span text:style-name="T25"><text:s text:c="4"/>printf("Addition is %d\n", a + b);</text:span></text:p>
      <text:p text:style-name="P318" loext:marker-style-name="T3"><text:span text:style-name="T25">}</text:span></text:p>
      <text:p text:style-name="P318" loext:marker-style-name="T3"><text:span text:style-name="T25">void subtract(int a, int b)</text:span></text:p>
      <text:p text:style-name="P318" loext:marker-style-name="T3"><text:span text:style-name="T25">{</text:span></text:p>
      <text:p text:style-name="P318" loext:marker-style-name="T3"><text:span text:style-name="T25"><text:s text:c="4"/>printf("Subtraction is %d\n", a - b);</text:span></text:p>
      <text:p text:style-name="P318" loext:marker-style-name="T3"><text:span text:style-name="T25">}</text:span></text:p>
      <text:p text:style-name="P318" loext:marker-style-name="T3"><text:span text:style-name="T25">void multiply(int a, int b)</text:span></text:p>
      <text:p text:style-name="P318" loext:marker-style-name="T3"><text:span text:style-name="T25">{</text:span></text:p>
      <text:p text:style-name="P318" loext:marker-style-name="T3"><text:span text:style-name="T25"><text:s text:c="4"/>printf("Multiplication is %d\n", a * b);</text:span></text:p>
      <text:p text:style-name="P318" loext:marker-style-name="T3"><text:span text:style-name="T25">}</text:span></text:p>
      <text:p text:style-name="P318" loext:marker-style-name="T3"><text:span text:style-name="T25">int main()</text:span></text:p>
      <text:p text:style-name="P318" loext:marker-style-name="T3"><text:span text:style-name="T25">{</text:span></text:p>
      <text:p text:style-name="P318" loext:marker-style-name="T3"><text:span text:style-name="T25"><text:s text:c="4"/>// fun_ptr_arr is an array of function pointers</text:span></text:p>
      <text:p text:style-name="P318" loext:marker-style-name="T3"><text:span text:style-name="T25"><text:s text:c="4"/>void (*fun_ptr_arr[])(int, int) = {add, subtract, multiply};</text:span></text:p>
      <text:p text:style-name="P318" loext:marker-style-name="T3"><text:span text:style-name="T25"><text:s text:c="4"/>unsigned int ch, a = 15, b = 10;</text:span></text:p>
      <text:p text:style-name="P318" loext:marker-style-name="T3"><text:span text:style-name="T25"><text:s text:c="4"/>printf("Enter Choice: 0 for add, 1 for subtract and 2 for multiply\n");</text:span></text:p>
      <text:p text:style-name="P318" loext:marker-style-name="T3"><text:span text:style-name="T25"><text:s text:c="4"/>scanf("%d", &amp;ch);</text:span></text:p>
      <text:p text:style-name="P318" loext:marker-style-name="T3"><text:span text:style-name="T25"><text:s text:c="4"/>if (ch &gt; 2)</text:span></text:p>
      <text:p text:style-name="P318" loext:marker-style-name="T3"><text:span text:style-name="T25"><text:s text:c="4"/>{</text:span></text:p>
      <text:p text:style-name="P318" loext:marker-style-name="T3"><text:span text:style-name="T25"><text:s text:c="8"/>return 0;</text:span></text:p>
      <text:p text:style-name="P318" loext:marker-style-name="T3"><text:span text:style-name="T25"><text:s text:c="4"/>} <text:s text:c="3"/></text:span></text:p>
      <text:p text:style-name="P318" loext:marker-style-name="T3"><text:soft-page-break/><text:span text:style-name="T25"><text:s text:c="4"/>(*fun_ptr_arr[ch])(a, b);</text:span></text:p>
      <text:p text:style-name="P318" loext:marker-style-name="T3"><text:span text:style-name="T25"><text:s text:c="4"/>return 0;</text:span></text:p>
      <text:p text:style-name="P318" loext:marker-style-name="T3"><text:span text:style-name="T25">}</text:span></text:p>
      <text:p text:style-name="P199" loext:marker-style-name="T3"><text:span text:style-name="T21">Output:</text:span></text:p>
      <text:p text:style-name="P202" loext:marker-style-name="T3"><text:span text:style-name="T25">Enter Choice: 0 for add, 1 for subtract and 2 for multiply</text:span></text:p>
      <text:p text:style-name="P202" loext:marker-style-name="T3"><text:span text:style-name="T25">2</text:span></text:p>
      <text:p text:style-name="P201" loext:marker-style-name="T3"><text:span text:style-name="T25">Multiplication is 150</text:span></text:p>
      <text:p text:style-name="P137" loext:marker-style-name="T3"><text:span text:style-name="T9">6) Like normal data pointers, a function pointer can be passed as an argument and can also be returned from a function.</text:span></text:p>
      <text:p text:style-name="P138" loext:marker-style-name="T3"><text:span text:style-name="T9">For example, consider the following C program where wrapper() receives a void fun() as parameter and calls the passed function.</text:span></text:p>
      <text:p text:style-name="P202" loext:marker-style-name="T3"><text:span text:style-name="T25">// A simple C program to show function pointers as parameter</text:span></text:p>
      <text:p text:style-name="P202" loext:marker-style-name="T3"><text:span text:style-name="T25">#include &lt;stdio.h&gt;</text:span></text:p>
      <text:p text:style-name="P202" loext:marker-style-name="T3"><text:span text:style-name="T25">// Two simple functions</text:span></text:p>
      <text:p text:style-name="P202" loext:marker-style-name="T3"><text:span text:style-name="T25">void fun1()</text:span></text:p>
      <text:p text:style-name="P202" loext:marker-style-name="T3"><text:span text:style-name="T25">{</text:span></text:p>
      <text:p text:style-name="P202" loext:marker-style-name="T3"><text:span text:style-name="T25"><text:s text:c="4"/>printf("Fun1\n");</text:span></text:p>
      <text:p text:style-name="P202" loext:marker-style-name="T3"><text:span text:style-name="T25">}</text:span></text:p>
      <text:p text:style-name="P202" loext:marker-style-name="T3"><text:span text:style-name="T25">void fun2()</text:span></text:p>
      <text:p text:style-name="P202" loext:marker-style-name="T3"><text:span text:style-name="T25">{</text:span></text:p>
      <text:p text:style-name="P202" loext:marker-style-name="T3"><text:span text:style-name="T25"><text:s text:c="4"/>printf("Fun2\n");</text:span></text:p>
      <text:p text:style-name="P202" loext:marker-style-name="T3"><text:span text:style-name="T25">}</text:span></text:p>
      <text:p text:style-name="P202" loext:marker-style-name="T3"><text:span text:style-name="T25">// A function that receives a simple function as parameter and calls the function</text:span></text:p>
      <text:p text:style-name="P202" loext:marker-style-name="T3"><text:span text:style-name="T25">void wrapper(void (*fun)())</text:span></text:p>
      <text:p text:style-name="P202" loext:marker-style-name="T3"><text:span text:style-name="T25">{</text:span></text:p>
      <text:p text:style-name="P202" loext:marker-style-name="T3"><text:span text:style-name="T25"><text:s text:c="4"/>fun();</text:span></text:p>
      <text:p text:style-name="P202" loext:marker-style-name="T3"><text:span text:style-name="T25">}</text:span></text:p>
      <text:p text:style-name="P202" loext:marker-style-name="T3"><text:span text:style-name="T25">int main()</text:span></text:p>
      <text:p text:style-name="P202" loext:marker-style-name="T3"><text:soft-page-break/><text:span text:style-name="T25">{</text:span></text:p>
      <text:p text:style-name="P202" loext:marker-style-name="T3"><text:span text:style-name="T25"><text:s text:c="4"/>wrapper(fun1);</text:span></text:p>
      <text:p text:style-name="P202" loext:marker-style-name="T3"><text:span text:style-name="T25"><text:s text:c="4"/>wrapper(fun2);</text:span></text:p>
      <text:p text:style-name="P202" loext:marker-style-name="T3"><text:span text:style-name="T25"><text:s text:c="4"/>return 0;</text:span></text:p>
      <text:p text:style-name="P202" loext:marker-style-name="T3"><text:span text:style-name="T25">}</text:span></text:p>
      <text:p text:style-name="P138" loext:marker-style-name="T3"><text:span text:style-name="T9">This point in particular is very useful in C. In C, we can use function pointers to avoid code redundancy. For example a simple qsort() function can be used to sort arrays in ascending order or descending or by any other order in case of array of structures. Not only this, with function pointers and void pointers, it is possible to use qsort for any data type.</text:span></text:p>
      <text:p text:style-name="P202" loext:marker-style-name="T3"><text:span text:style-name="T25">// An example for qsort and comparator</text:span></text:p>
      <text:p text:style-name="P202" loext:marker-style-name="T3"><text:span text:style-name="T25">#include &lt;stdio.h&gt;</text:span></text:p>
      <text:p text:style-name="P202" loext:marker-style-name="T3"><text:span text:style-name="T25">#include &lt;stdlib.h&gt;</text:span></text:p>
      <text:p text:style-name="P202" loext:marker-style-name="T3"><text:span text:style-name="T25">// A sample comparator function that is used for sorting an integer array in ascending order.</text:span></text:p>
      <text:p text:style-name="P202" loext:marker-style-name="T3"><text:span text:style-name="T25">// To sort any array for any other data type and/or criteria, all we need to do is write more compare functions.</text:span></text:p>
      <text:p text:style-name="P202" loext:marker-style-name="T3"><text:span text:style-name="T25">// And we can use the same qsort()</text:span></text:p>
      <text:p text:style-name="P202" loext:marker-style-name="T3"><text:span text:style-name="T25">int compare(const void *a, const void *b)</text:span></text:p>
      <text:p text:style-name="P202" loext:marker-style-name="T3"><text:span text:style-name="T25">{</text:span></text:p>
      <text:p text:style-name="P202" loext:marker-style-name="T3"><text:span text:style-name="T25"><text:s text:c="4"/>return (*(int *)a - *(int *)b);</text:span></text:p>
      <text:p text:style-name="P202" loext:marker-style-name="T3"><text:span text:style-name="T25">}</text:span></text:p>
      <text:p text:style-name="P202" loext:marker-style-name="T3"><text:span text:style-name="T25">int main()</text:span></text:p>
      <text:p text:style-name="P202" loext:marker-style-name="T3"><text:span text:style-name="T25">{</text:span></text:p>
      <text:p text:style-name="P202" loext:marker-style-name="T3"><text:span text:style-name="T25"><text:s text:c="4"/>int arr[] = {10, 5, 15, 12, 90, 80};</text:span></text:p>
      <text:p text:style-name="P202" loext:marker-style-name="T3"><text:span text:style-name="T25"><text:s text:c="4"/>int n = sizeof(arr) / sizeof(arr[0]), i;</text:span></text:p>
      <text:p text:style-name="P202" loext:marker-style-name="T3"><text:span text:style-name="T25"><text:s text:c="4"/>qsort(arr, n, sizeof(int), compare);</text:span></text:p>
      <text:p text:style-name="P202" loext:marker-style-name="T3"><text:span text:style-name="T25"><text:s text:c="4"/>for (i = 0; i &lt; n; i++)</text:span></text:p>
      <text:p text:style-name="P202" loext:marker-style-name="T3"><text:span text:style-name="T25"><text:s text:c="4"/>{</text:span></text:p>
      <text:p text:style-name="P202" loext:marker-style-name="T3"><text:span text:style-name="T25"><text:s text:c="8"/>printf("%d ", arr[i]);</text:span></text:p>
      <text:p text:style-name="P202" loext:marker-style-name="T3"><text:span text:style-name="T25"><text:s text:c="4"/>}</text:span></text:p>
      <text:p text:style-name="P202" loext:marker-style-name="T3"><text:span text:style-name="T25"><text:s text:c="4"/>return 0;</text:span></text:p>
      <text:p text:style-name="P202" loext:marker-style-name="T3"><text:soft-page-break/><text:span text:style-name="T25">}</text:span></text:p>
      <text:p text:style-name="P199" loext:marker-style-name="T3"><text:span text:style-name="T21">Output:</text:span></text:p>
      <text:p text:style-name="P201" loext:marker-style-name="T3"><text:span text:style-name="T25">5 10 12 15 80 90</text:span></text:p>
      <text:p text:style-name="P138" loext:marker-style-name="T3"><text:span text:style-name="T9">Similar to qsort(), we can write our own functions that can be used for any data type and can do different tasks without code redundancy. Below is an example search function that can be used for any data type. In fact, we can use this search function to find close elements (below a threshold) by writing a customized compare function.</text:span></text:p>
      <text:p text:style-name="P202" loext:marker-style-name="T3"><text:span text:style-name="T25">#include &lt;stdio.h&gt;</text:span></text:p>
      <text:p text:style-name="P202" loext:marker-style-name="T3"><text:span text:style-name="T25">#include &lt;stdbool.h&gt;</text:span></text:p>
      <text:p text:style-name="P202" loext:marker-style-name="T3"><text:span text:style-name="T25">// A compare function that is used for searching an integer array</text:span></text:p>
      <text:p text:style-name="P202" loext:marker-style-name="T3"><text:span text:style-name="T25">bool compare(const void *a, const void *b)</text:span></text:p>
      <text:p text:style-name="P202" loext:marker-style-name="T3"><text:span text:style-name="T25">{</text:span></text:p>
      <text:p text:style-name="P202" loext:marker-style-name="T3"><text:span text:style-name="T25"><text:s text:c="4"/>return (*(int *)a == *(int *)b);</text:span></text:p>
      <text:p text:style-name="P202" loext:marker-style-name="T3"><text:span text:style-name="T25">}</text:span></text:p>
      <text:p text:style-name="P202" loext:marker-style-name="T3"><text:span text:style-name="T25">// General purpose search() function that can be used</text:span></text:p>
      <text:p text:style-name="P202" loext:marker-style-name="T3"><text:span text:style-name="T25">// for searching an element *x in an array arr[] of</text:span></text:p>
      <text:p text:style-name="P202" loext:marker-style-name="T3"><text:span text:style-name="T25">// arr_size. Note that void pointers are used so that</text:span></text:p>
      <text:p text:style-name="P202" loext:marker-style-name="T3"><text:span text:style-name="T25">// the function can be called by passing a pointer of</text:span></text:p>
      <text:p text:style-name="P202" loext:marker-style-name="T3"><text:span text:style-name="T25">// any type. ele_size is size of an array element</text:span></text:p>
      <text:p text:style-name="P202" loext:marker-style-name="T3"><text:span text:style-name="T25">int search(void *arr, int arr_size, int ele_size, void *x, bool compare(const void *, const void *))</text:span></text:p>
      <text:p text:style-name="P202" loext:marker-style-name="T3"><text:span text:style-name="T25">{</text:span></text:p>
      <text:p text:style-name="P202" loext:marker-style-name="T3"><text:span text:style-name="T25"><text:s text:c="4"/>// Since char takes one byte, we can use char pointer for any type</text:span></text:p>
      <text:p text:style-name="P202" loext:marker-style-name="T3"><text:span text:style-name="T25"><text:s text:c="4"/>// To get pointer arithmetic correct, // we need to multiply index with size of an array element ele_size</text:span></text:p>
      <text:p text:style-name="P202" loext:marker-style-name="T3"><text:span text:style-name="T25"><text:s text:c="4"/>char *ptr = (char *)arr;</text:span></text:p>
      <text:p text:style-name="P202" loext:marker-style-name="T3"><text:span text:style-name="T25"><text:s text:c="4"/>int i;</text:span></text:p>
      <text:p text:style-name="P202" loext:marker-style-name="T3"><text:span text:style-name="T25"><text:s text:c="4"/>for (i = 0; i &lt; arr_size; i++)</text:span></text:p>
      <text:p text:style-name="P202" loext:marker-style-name="T3"><text:span text:style-name="T25"><text:s text:c="4"/>{</text:span></text:p>
      <text:p text:style-name="P202" loext:marker-style-name="T3"><text:soft-page-break/><text:span text:style-name="T25"><text:s text:c="8"/>if (compare(ptr + i * ele_size, x))</text:span></text:p>
      <text:p text:style-name="P202" loext:marker-style-name="T3"><text:span text:style-name="T25"><text:s text:c="8"/>{</text:span></text:p>
      <text:p text:style-name="P202" loext:marker-style-name="T3"><text:span text:style-name="T25"><text:s text:c="12"/>return i;</text:span></text:p>
      <text:p text:style-name="P202" loext:marker-style-name="T3"><text:span text:style-name="T25"><text:s text:c="8"/>}</text:span></text:p>
      <text:p text:style-name="P202" loext:marker-style-name="T3"><text:span text:style-name="T25"><text:s text:c="8"/>// If element not found</text:span></text:p>
      <text:p text:style-name="P202" loext:marker-style-name="T3"><text:span text:style-name="T25"><text:s text:c="8"/>return -1;</text:span></text:p>
      <text:p text:style-name="P202" loext:marker-style-name="T3"><text:span text:style-name="T25"><text:s text:c="4"/>}</text:span></text:p>
      <text:p text:style-name="P202" loext:marker-style-name="T3"><text:span text:style-name="T25">}</text:span></text:p>
      <text:p text:style-name="P202" loext:marker-style-name="T3"><text:span text:style-name="T25">int main()</text:span></text:p>
      <text:p text:style-name="P202" loext:marker-style-name="T3"><text:span text:style-name="T25">{</text:span></text:p>
      <text:p text:style-name="P202" loext:marker-style-name="T3"><text:span text:style-name="T25"><text:s text:c="4"/>int arr[] = {2, 5, 7, 90, 70};</text:span></text:p>
      <text:p text:style-name="P202" loext:marker-style-name="T3"><text:span text:style-name="T25"><text:s text:c="4"/>int n = sizeof(arr) / sizeof(arr[0]);</text:span></text:p>
      <text:p text:style-name="P202" loext:marker-style-name="T3"><text:span text:style-name="T25"><text:s text:c="4"/>int x = 7;</text:span></text:p>
      <text:p text:style-name="P202" loext:marker-style-name="T3"><text:span text:style-name="T25"><text:s text:c="4"/>printf("Returned index is %d ", search(arr, n, sizeof(int), &amp;x, compare));</text:span></text:p>
      <text:p text:style-name="P202" loext:marker-style-name="T3"><text:span text:style-name="T25"><text:s text:c="4"/>return 0;</text:span></text:p>
      <text:p text:style-name="P202" loext:marker-style-name="T3"><text:span text:style-name="T25">}</text:span></text:p>
      <text:p text:style-name="P199" loext:marker-style-name="T3"><text:span text:style-name="T21">Output:</text:span></text:p>
      <text:p text:style-name="P201" loext:marker-style-name="T3"><text:span text:style-name="T25">Returned index is 2</text:span></text:p>
      <text:p text:style-name="P142" loext:marker-style-name="T3"><text:span text:style-name="T9">The above search function can be used for any data type by writing a separate customized compare().</text:span></text:p>
      <text:p text:style-name="P252" loext:marker-style-name="T3"><text:span text:style-name="T9"><text:s/></text:span></text:p>
      <text:p text:style-name="P144" loext:marker-style-name="T3"><text:span text:style-name="T9">7) Many object-oriented features in C++ are implemented using function pointers in C.</text:span></text:p>
      <text:list text:continue-list="list185528275296812" text:style-name="WWNum9">
        <text:list-item>
          <text:h text:style-name="P108" text:outline-level="1" loext:marker-style-name="T3"><text:bookmark-start text:name="__RefHeading___Toc2218_1327778131"/><text:span text:style-name="T3"><text:s text:c="3"/></text:span><text:bookmark-start text:name="_Toc195978888"/><text:span text:style-name="T3">Call back function using function pointer – Example</text:span><text:bookmark-end text:name="__RefHeading___Toc2218_1327778131"/><text:bookmark-end text:name="_Toc195978888"/></text:h>
        </text:list-item>
      </text:list>
      <text:p text:style-name="P22">#include &lt;stdio.h&gt;</text:p>
      <text:p text:style-name="P22">int call_back_function(int a)</text:p>
      <text:p text:style-name="P22"><text:soft-page-break/>{</text:p>
      <text:p text:style-name="P22"><text:s text:c="4"/>printf("Hello: %d\n", a);</text:p>
      <text:p text:style-name="P22"><text:s text:c="4"/>return (0);</text:p>
      <text:p text:style-name="P22">}</text:p>
      <text:p text:style-name="P22">int foo(int (*ptr)(int), int num)</text:p>
      <text:p text:style-name="P22">{</text:p>
      <text:p text:style-name="P22"><text:s text:c="4"/>printf("Processing Complete - Calling Call Back Function\n");</text:p>
      <text:p text:style-name="P22"><text:s text:c="4"/>ptr(num);</text:p>
      <text:p text:style-name="P22"><text:s text:c="4"/>return (0);</text:p>
      <text:p text:style-name="P22">}</text:p>
      <text:p text:style-name="P22">int main(void)</text:p>
      <text:p text:style-name="P22">{</text:p>
      <text:p text:style-name="P22"><text:s text:c="4"/>int b = 789;</text:p>
      <text:p text:style-name="P22"><text:s text:c="4"/>int (*hello)(int);</text:p>
      <text:p text:style-name="P22"><text:s text:c="4"/>hello = call_back_function;</text:p>
      <text:p text:style-name="P22"><text:s text:c="4"/>foo(hello, b);</text:p>
      <text:p text:style-name="P22"><text:s text:c="4"/>return (0);</text:p>
      <text:p text:style-name="P22">}</text:p>
      <text:list text:continue-numbering="true" text:style-name="WWNum9">
        <text:list-item>
          <text:h text:style-name="P110" text:outline-level="1" loext:marker-style-name="T3"><text:bookmark-start text:name="__RefHeading___Toc2220_1327778131"/><text:span text:style-name="T3"><text:s text:c="3"/></text:span><text:bookmark-start text:name="_Toc195978889"/><text:span text:style-name="T3">Function pointer without a name in C</text:span><text:bookmark-end text:name="__RefHeading___Toc2220_1327778131"/><text:bookmark-end text:name="_Toc195978889"/></text:h>
        </text:list-item>
      </text:list>
      <text:p text:style-name="P138" loext:marker-style-name="T3"><text:span text:style-name="T9">A normal function pointer would look like this:</text:span></text:p>
      <text:p text:style-name="P202" loext:marker-style-name="T3"><text:span text:style-name="T25">void (*fun_ptr)(void);</text:span></text:p>
      <text:p text:style-name="P138" loext:marker-style-name="T3"><text:span text:style-name="T9">However, I have seen this syntax used to cast something to a void function pointer:</text:span></text:p>
      <text:p text:style-name="P202" loext:marker-style-name="T3"><text:span text:style-name="T25">(void (*)(void *))</text:span></text:p>
      <text:p text:style-name="P161" loext:marker-style-name="T3"><text:span text:style-name="T9">As you can see it has no name and only has (*) in place of a name. What does this mean? Is it only used for casting?</text:span></text:p>
      <text:p text:style-name="P159" loext:marker-style-name="T3"><text:span text:style-name="T9">The syntax </text:span><text:span text:style-name="T25">(void (*)(void *)) </text:span><text:span text:style-name="T9">is a cast.</text:span></text:p>
      <text:p text:style-name="P162" loext:marker-style-name="T3"><text:span text:style-name="T9">The destination type of the cast is a function pointer that takes a single parameter of type </text:span><text:span text:style-name="T25">void * </text:span><text:span text:style-name="T9">and returns </text:span><text:span text:style-name="T25">void</text:span><text:span text:style-name="T9">. An example of a function whose type matches this cast is:</text:span></text:p>
      <text:p text:style-name="P204" loext:marker-style-name="T3"><text:span text:style-name="T25">void abc(void *param);</text:span></text:p>
      <text:list text:continue-numbering="true" text:style-name="WWNum9">
        <text:list-item>
          <text:h text:style-name="P111" text:outline-level="1" loext:marker-style-name="T3"><text:bookmark-start text:name="__RefHeading___Toc2222_1327778131"/><text:soft-page-break/><text:span text:style-name="T3"><text:s text:c="3"/></text:span><text:bookmark-start text:name="_Toc195978890"/><text:span text:style-name="T3">C program to check Endianness</text:span><text:bookmark-end text:name="__RefHeading___Toc2222_1327778131"/><text:bookmark-end text:name="_Toc195978890"/></text:h>
        </text:list-item>
      </text:list>
      <text:p text:style-name="P46" loext:marker-style-name="T3">unsigned int x = 0x7654;</text:p>
      <text:p text:style-name="P46" loext:marker-style-name="T3">char *c = (char*) &amp;x;</text:p>
      <text:p text:style-name="P46" loext:marker-style-name="T3"/>
      <text:p text:style-name="P142" loext:marker-style-name="T3"><text:span text:style-name="T9">Big endian format:</text:span></text:p>
      <text:p text:style-name="P142" loext:marker-style-name="T3"><text:span text:style-name="T9">Byte address <text:s text:c="4"/>| <text:s/>0x01 <text:s text:c="2"/>| <text:s/>0x02 <text:s/>|</text:span></text:p>
      <text:p text:style-name="P342" loext:marker-style-name="T3"><text:span text:style-name="T9">Byte content <text:s/>| 0x76 | 0x54 | Little endian format:</text:span></text:p>
      <text:p text:style-name="P142" loext:marker-style-name="T3"><text:span text:style-name="T9">Byte address <text:s/>| 0x01 | 0x02 | </text:span></text:p>
      <text:p text:style-name="P142" loext:marker-style-name="T3"><text:span text:style-name="T9">Byte content <text:s/>| 0x54 | 0x76 |</text:span></text:p>
      <text:p text:style-name="P198" loext:marker-style-name="T3"><text:span text:style-name="T21">Quick way to remember:</text:span></text:p>
      <text:p text:style-name="P138" loext:marker-style-name="T3"><text:span text:style-name="T21">LLL</text:span><text:span text:style-name="T9"> – </text:span><text:span text:style-name="T21">L</text:span><text:span text:style-name="T9">east significant byte in </text:span><text:span text:style-name="T21">L</text:span><text:span text:style-name="T9">east address, it means </text:span><text:span text:style-name="T21">L</text:span><text:span text:style-name="T9">ittle endian.</text:span></text:p>
      <text:p text:style-name="P142" loext:marker-style-name="T3"><text:span text:style-name="T9">C program to find out if the underlying architecture is little endian or big endian. </text:span></text:p>
      <text:p text:style-name="P253" loext:marker-style-name="T3"><text:span text:style-name="T9"><text:s/></text:span></text:p>
      <text:p text:style-name="P22">#include &lt;stdio.h&gt;</text:p>
      <text:p text:style-name="P22">int main()</text:p>
      <text:p text:style-name="P22">{</text:p>
      <text:p text:style-name="P22"><text:s text:c="4"/>unsigned int x = 0x7654;</text:p>
      <text:p text:style-name="P22"><text:s text:c="4"/>char *c = (char *)&amp;x;</text:p>
      <text:p text:style-name="P22"><text:s text:c="4"/>printf("*c is: 0x%x\n", *c);</text:p>
      <text:p text:style-name="P22"><text:s text:c="4"/>if (*c == 0x54)</text:p>
      <text:p text:style-name="P22"><text:s text:c="4"/>{</text:p>
      <text:p text:style-name="P22"><text:s text:c="8"/>printf("Underlying architecture is little endian. \n");</text:p>
      <text:p text:style-name="P22"><text:s text:c="4"/>}</text:p>
      <text:p text:style-name="P22"><text:s text:c="4"/>else</text:p>
      <text:p text:style-name="P22"><text:s text:c="4"/>{</text:p>
      <text:p text:style-name="P22"><text:s text:c="8"/>printf("Underlying architecture is big endian. \n");</text:p>
      <text:p text:style-name="P22"><text:s text:c="4"/>}</text:p>
      <text:p text:style-name="P22"><text:s text:c="4"/>return (0);</text:p>
      <text:p text:style-name="P22"><text:soft-page-break/>}</text:p>
      <text:list text:continue-numbering="true" text:style-name="WWNum9">
        <text:list-item>
          <text:h text:style-name="P112" text:outline-level="1" loext:marker-style-name="T3"><text:bookmark-start text:name="__RefHeading___Toc2224_1327778131"/><text:span text:style-name="T3"><text:s text:c="3"/></text:span><text:bookmark-start text:name="_Toc195978891"/><text:span text:style-name="T3">Initializing multi-dimensional array pointer</text:span><text:bookmark-end text:name="__RefHeading___Toc2224_1327778131"/><text:bookmark-end text:name="_Toc195978891"/></text:h>
        </text:list-item>
      </text:list>
      <text:p text:style-name="P6">int a[3][4][5];</text:p>
      <text:p text:style-name="P6">int (*b)[3][4][5] = &amp;a;</text:p>
      <text:p text:style-name="P6">printf("%d", (*b)[1][2][3]);</text:p>
      <text:p text:style-name="P6">printf("%d", *(*(*(a + 1) + 2) + 3));</text:p>
      <text:p text:style-name="P6">printf("%d", *(*(*(b + 1) + 2) + 3));</text:p>
      <text:p text:style-name="P33"/>
      <text:list text:continue-numbering="true" text:style-name="WWNum9">
        <text:list-item>
          <text:h text:style-name="P113" text:outline-level="1" loext:marker-style-name="T3"><text:bookmark-start text:name="__RefHeading___Toc2228_1327778131"/><text:span text:style-name="T3"><text:s text:c="3"/></text:span><text:bookmark-start text:name="_Toc195978893"/><text:span text:style-name="T3">Bit-Shift and Bitwise operators</text:span><text:bookmark-end text:name="__RefHeading___Toc2228_1327778131"/><text:bookmark-end text:name="_Toc195978893"/></text:h>
        </text:list-item>
      </text:list>
      <text:p text:style-name="P138" loext:marker-style-name="T3"><text:span text:style-name="T9">Let, the initial value of </text:span><text:span text:style-name="T25">REGISTER</text:span><text:span text:style-name="T9"> be</text:span><text:span text:style-name="T25"> 0bXXXX XXXX </text:span><text:span text:style-name="T9">(0 otherwise 1, we really “Don’t Care”). The code given below:</text:span></text:p>
      <text:p text:style-name="P202" loext:marker-style-name="T3"><text:span text:style-name="T25">REGISTER = REGISTER &lt;&lt; 3;</text:span></text:p>
      <text:p text:style-name="P138" loext:marker-style-name="T3"><text:span text:style-name="T9">Otherwise,</text:span></text:p>
      <text:p text:style-name="P205" loext:marker-style-name="T3"><text:span text:style-name="T25">REGISTER &lt;&lt;= 3;</text:span></text:p>
      <text:p text:style-name="P163" loext:marker-style-name="T3"><text:span text:style-name="T9">Shifts contents in the </text:span><text:span text:style-name="T25">REGISTER</text:span><text:span text:style-name="T9"> to 3 places towards left. So, the final value of </text:span><text:span text:style-name="T25">REGISTER</text:span><text:span text:style-name="T9"> would be </text:span></text:p>
      <text:p text:style-name="P206" loext:marker-style-name="T3"><text:span text:style-name="T25">0bXXXX X000</text:span></text:p>
      <text:p text:style-name="P138" loext:marker-style-name="T3"><text:span text:style-name="T9">Similarly, let the initial value of </text:span><text:span text:style-name="T25">REGISTER</text:span><text:span text:style-name="T9"> be</text:span><text:span text:style-name="T25"> 0bXXXX XXXX </text:span><text:span text:style-name="T9">(0 otherwise 1, we really “Don’t Care”). The code given below:</text:span></text:p>
      <text:p text:style-name="P202" loext:marker-style-name="T3"><text:span text:style-name="T25">REGISTER = REGISTER &gt;&gt; 3;</text:span></text:p>
      <text:p text:style-name="P138" loext:marker-style-name="T3"><text:span text:style-name="T9">Otherwise,</text:span></text:p>
      <text:p text:style-name="P205" loext:marker-style-name="T3"><text:span text:style-name="T25">REGISTER &gt;&gt;= 3;</text:span></text:p>
      <text:p text:style-name="P164" loext:marker-style-name="T3"><text:span text:style-name="T9">Shifts contents in the </text:span><text:span text:style-name="T25">REGISTER</text:span><text:span text:style-name="T9"> to 3 places towards right. So, the final value of </text:span><text:span text:style-name="T25">REGISTER</text:span><text:span text:style-name="T9"> would be </text:span><text:span text:style-name="T25">0b000X XXXX</text:span></text:p>
      <text:p text:style-name="P138" loext:marker-style-name="T3"><text:span text:style-name="T9">Let, the initial value of </text:span><text:span text:style-name="T25">REGISTER</text:span><text:span text:style-name="T9"> be</text:span><text:span text:style-name="T25"> 0bXXXX XXXX </text:span><text:span text:style-name="T9">(0 otherwise 1, we really “Don’t Care”). If we want to change the 3</text:span><text:span text:style-name="T38">rd</text:span><text:span text:style-name="T9"> bit from right (i.e., bit 2, also called as 2</text:span><text:span text:style-name="T38">nd</text:span><text:span text:style-name="T9"> place, hereafter), we can do something like below.</text:span></text:p>
      <text:p text:style-name="P202" loext:marker-style-name="T3"><text:span text:style-name="T25">REGISTER = REGISTER | (1 &lt;&lt; 2);</text:span></text:p>
      <text:p text:style-name="P138" loext:marker-style-name="T3"><text:span text:style-name="T9">Otherwise,</text:span></text:p>
      <text:p text:style-name="P207" loext:marker-style-name="T3"><text:span text:style-name="T25">REGISTER |= (1 &lt;&lt; 2);</text:span></text:p>
      <text:p text:style-name="P138" loext:marker-style-name="T3"><text:span text:style-name="T9">This will change the </text:span><text:span text:style-name="T25">REGISTER</text:span><text:span text:style-name="T9"> value to</text:span><text:span text:style-name="T25"> 0bXXXX X1XX</text:span><text:span text:style-name="T9">. Here, </text:span><text:span text:style-name="T25">1&lt;&lt;2</text:span><text:span text:style-name="T9"> means, shift, binary digit 1 from right to 2</text:span><text:span text:style-name="T38">nd</text:span><text:span text:style-name="T9"> place. When 1 is OR-ed with 1 or 0 (Depicted by X, i.e. “Don’t Care”), the result is always 1. Similar is the case if we want to make the 2</text:span><text:span text:style-name="T38">nd</text:span><text:span text:style-name="T9"> place to 0. But, here, we use AND. Remember 0 when AND-ed with 1 or 0 always results in 0. Below is the code.</text:span></text:p>
      <text:p text:style-name="P202" loext:marker-style-name="T3"><text:span text:style-name="T25">REGISTER = REGISTER &amp; ~(1 &lt;&lt; 2);</text:span></text:p>
      <text:p text:style-name="P138" loext:marker-style-name="T3"><text:soft-page-break/><text:span text:style-name="T9">Otherwise,</text:span></text:p>
      <text:p text:style-name="P202" loext:marker-style-name="T3"><text:span text:style-name="T25">REGISTER &amp;= ~(1 &lt;&lt; 2);</text:span></text:p>
      <text:p text:style-name="P165" loext:marker-style-name="T3"><text:span text:style-name="T9">On several occasions, we might want to change few bits in a register but not affect the other bits in the same register. If we want to change 7 bits of this 8-bit register, we would need to write the above line of code 7 times (What if the register were 32 bit long and if we wanted to change</text:span><text:span text:style-name="T39"> </text:span><text:span text:style-name="T9">31 bits in it?), which is inefficient. There is a much easier way to this. Say for instance, if we want to change, 2</text:span><text:span text:style-name="T38">nd </text:span><text:span text:style-name="T9">place to 1, 5</text:span><text:span text:style-name="T38">th</text:span><text:span text:style-name="T9"> place to 0 and 6</text:span><text:span text:style-name="T38">th</text:span><text:span text:style-name="T9"> place to 1. We can write the below 2 lines of code for that.</text:span></text:p>
      <text:p text:style-name="P202" loext:marker-style-name="T3"><text:span text:style-name="T25">REGISTER &amp;= 0b1001 1011;</text:span></text:p>
      <text:p text:style-name="P207" loext:marker-style-name="T3"><text:span text:style-name="T25">REGISTER |= 0b0100 0100;</text:span></text:p>
      <text:p text:style-name="P166" loext:marker-style-name="T3"><text:span text:style-name="T9">Final, </text:span><text:span text:style-name="T25">REGISTER</text:span><text:span text:style-name="T9"> value will be </text:span><text:span text:style-name="T25">0bX10X X1XX</text:span><text:span text:style-name="T9">. Just, as we wanted.</text:span></text:p>
      <text:p text:style-name="P343" loext:marker-style-name="T3"><text:span text:style-name="T9">If we want to compliment a particular bit without affecting other bits of the register, we could do an XOR operation like below. This will, compliment the 2</text:span><text:span text:style-name="T38">nd</text:span><text:span text:style-name="T9"> bit. Remember, </text:span><text:span text:style-name="T25">X^1 = ~X</text:span><text:span text:style-name="T9">,</text:span><text:span text:style-name="T25"> </text:span><text:span text:style-name="T9">and,</text:span><text:span text:style-name="T25"> X^0 = X</text:span><text:span text:style-name="T9">.</text:span></text:p>
      <text:p text:style-name="P202" loext:marker-style-name="T3"><text:span text:style-name="T25">REGISTER = REGISTER ^ (1 &lt;&lt; 2);</text:span></text:p>
      <text:p text:style-name="P138" loext:marker-style-name="T3"><text:span text:style-name="T9">Otherwise,</text:span></text:p>
      <text:p text:style-name="P202" loext:marker-style-name="T3"><text:span text:style-name="T25">REGISTER ^= (1 &lt;&lt; 2);</text:span></text:p>
      <text:p text:style-name="P138" loext:marker-style-name="T3"><text:span text:style-name="T9">On several occasions, we might want to compliment few bits in a register but not affect the other bits in the same register. Say for instance, if we want to compliment, 2</text:span><text:span text:style-name="T38">nd</text:span><text:span text:style-name="T9"> place, 5</text:span><text:span text:style-name="T38">th</text:span><text:span text:style-name="T9"> place and 6</text:span><text:span text:style-name="T38">th</text:span><text:span text:style-name="T9"> place. We can write the below single line of code for that.</text:span></text:p>
      <text:p text:style-name="P204" loext:marker-style-name="T3"><text:span text:style-name="T25">REGISTER ^= 0b0110 0100</text:span></text:p>
      <text:list text:continue-numbering="true" text:style-name="WWNum9">
        <text:list-item>
          <text:h text:style-name="P114" text:outline-level="1" loext:marker-style-name="T3"><text:bookmark-start text:name="__RefHeading___Toc2230_1327778131"/><text:span text:style-name="T3"><text:s text:c="3"/></text:span><text:bookmark-start text:name="_Toc195978894"/><text:span text:style-name="T3">Pointer Arithmetic</text:span><text:bookmark-end text:name="__RefHeading___Toc2230_1327778131"/><text:bookmark-end text:name="_Toc195978894"/></text:h>
        </text:list-item>
      </text:list>
      <text:p text:style-name="P321" loext:marker-style-name="T3"><text:span text:style-name="T25">int* p = (int *) 0x1F4; <text:s/>//Decimal value is 500. int* q = (int *) 0x226; <text:s/>//Decimal value is 550.</text:span></text:p>
      <text:p text:style-name="P202" loext:marker-style-name="T3"><text:span text:style-name="T25">int i;</text:span></text:p>
      <text:p text:style-name="P314" loext:marker-style-name="T3"><text:span text:style-name="T25">i = q – p; <text:s/>//Gives the number of integer blocks between 500 and 550, which is, (550-500)/2, i.e. 25. Assuming size of int is 2 bytes. So, the value of i will be 25.</text:span></text:p>
      <text:p text:style-name="P314" loext:marker-style-name="T3"><text:span text:style-name="T25">p++; <text:s/>//Increments p by 2 bytes, assuming size of int is 2 bytes. p--; <text:s/>//Decrements p by 2 bytes, assuming size of int is 2 bytes.</text:span></text:p>
      <text:p text:style-name="P202" loext:marker-style-name="T3"><text:soft-page-break/><text:span text:style-name="T25">p = p + 3; <text:s/>//Increments p by 6 bytes, assuming size of int is 2 bytes.</text:span></text:p>
      <text:p text:style-name="P202" loext:marker-style-name="T3"><text:span text:style-name="T25">p = p – 3; <text:s/>//Decrements p by 6 bytes, assuming size of int is 2 bytes.</text:span></text:p>
      <text:p text:style-name="P138" loext:marker-style-name="T3"><text:span text:style-name="T9">Always read from right to left in these below scenarios as they are unary operators.</text:span></text:p>
      <text:p text:style-name="P202" loext:marker-style-name="T3"><text:span text:style-name="T25">++(*p) <text:s/>//Read data and increment data.</text:span></text:p>
      <text:p text:style-name="P202" loext:marker-style-name="T3"><text:span text:style-name="T25">++*p <text:s/>//Read data and increment data.</text:span></text:p>
      <text:p text:style-name="P22">*++p <text:s/>//Increment pointer and read data.</text:p>
      <text:p text:style-name="P22">*p++ <text:s/>//Read data and increment pointer. Here, although ++ has higher priority it is executed after * because it is postfix.</text:p>
      <text:p text:style-name="P22">(*p)++ <text:s/>//Read data and increment data.</text:p>
      <text:list text:continue-numbering="true" text:style-name="WWNum9">
        <text:list-item>
          <text:h text:style-name="P115" text:outline-level="1" loext:marker-style-name="T3"><text:bookmark-start text:name="__RefHeading___Toc2232_1327778131"/><text:span text:style-name="T3"><text:s text:c="3"/></text:span><text:bookmark-start text:name="_Toc195978895"/><text:span text:style-name="T3">enum</text:span><text:bookmark-end text:name="__RefHeading___Toc2232_1327778131"/><text:bookmark-end text:name="_Toc195978895"/></text:h>
        </text:list-item>
      </text:list>
      <text:p text:style-name="P138" loext:marker-style-name="T3"><text:span text:style-name="T9">Example 1</text:span></text:p>
      <text:p text:style-name="P22">#include &lt;stdio.h&gt;</text:p>
      <text:p text:style-name="P22">enum week</text:p>
      <text:p text:style-name="P22">{</text:p>
      <text:p text:style-name="P202" loext:marker-style-name="T3"><text:span text:style-name="T25"><text:s text:c="4"/>Mon, Tue, Wed, Thur, Fri, Sat, Sun</text:span></text:p>
      <text:p text:style-name="P22">};</text:p>
      <text:p text:style-name="P22">int main()</text:p>
      <text:p text:style-name="P22">{</text:p>
      <text:p text:style-name="P22"><text:s text:c="4"/>enum week day;</text:p>
      <text:p text:style-name="P22"><text:s text:c="4"/>day = Wed;</text:p>
      <text:p text:style-name="P22"><text:s text:c="4"/>printf("%d", day);</text:p>
      <text:p text:style-name="P22"><text:s text:c="4"/>return (0);</text:p>
      <text:p text:style-name="P22">}</text:p>
      <text:p text:style-name="P138" loext:marker-style-name="T3"><text:span text:style-name="T9">Output</text:span></text:p>
      <text:p text:style-name="P201" loext:marker-style-name="T3"><text:span text:style-name="T25">2</text:span></text:p>
      <text:p text:style-name="P138" loext:marker-style-name="T3"><text:span text:style-name="T9">Example 2</text:span></text:p>
      <text:p text:style-name="P22">#include &lt;stdio.h&gt;</text:p>
      <text:p text:style-name="P22"><text:soft-page-break/>enum year</text:p>
      <text:p text:style-name="P22">{</text:p>
      <text:p text:style-name="P22"><text:s text:c="4"/>Jan, Feb, Mar, Apr, May, Jun, Jul, Aug, Sep, Oct, Nov, Dec</text:p>
      <text:p text:style-name="P22">};</text:p>
      <text:p text:style-name="P22">int main()</text:p>
      <text:p text:style-name="P22">{</text:p>
      <text:p text:style-name="P22"><text:s text:c="4"/>int i;</text:p>
      <text:p text:style-name="P22"><text:s text:c="4"/>for (i = Jan; i &lt;= Dec; i++)</text:p>
      <text:p text:style-name="P22"><text:s text:c="4"/>{</text:p>
      <text:p text:style-name="P22"><text:s text:c="8"/>printf("%d ", i);</text:p>
      <text:p text:style-name="P22"><text:s text:c="4"/>}</text:p>
      <text:p text:style-name="P22"><text:s text:c="4"/>return 0;</text:p>
      <text:p text:style-name="P22">}</text:p>
      <text:p text:style-name="P138" loext:marker-style-name="T3"><text:span text:style-name="T9">Output</text:span></text:p>
      <text:p text:style-name="P201" loext:marker-style-name="T3"><text:span text:style-name="T25">0 1 2 3 4 5 6 7 8 9 10 11</text:span></text:p>
      <text:p text:style-name="P138" loext:marker-style-name="T3"><text:span text:style-name="T9">Example 3</text:span></text:p>
      <text:p text:style-name="P319" loext:marker-style-name="T3"><text:span text:style-name="T25">#include &lt;stdio.h&gt;</text:span></text:p>
      <text:p text:style-name="P319" loext:marker-style-name="T3"><text:span text:style-name="T25">enum day</text:span></text:p>
      <text:p text:style-name="P319" loext:marker-style-name="T3"><text:span text:style-name="T25">{</text:span></text:p>
      <text:p text:style-name="P319" loext:marker-style-name="T3"><text:span text:style-name="T25"><text:s text:c="4"/>sunday = 1,</text:span></text:p>
      <text:p text:style-name="P319" loext:marker-style-name="T3"><text:span text:style-name="T25"><text:s text:c="4"/>monday,</text:span></text:p>
      <text:p text:style-name="P319" loext:marker-style-name="T3"><text:span text:style-name="T25"><text:s text:c="4"/>tuesday = 5,</text:span></text:p>
      <text:p text:style-name="P319" loext:marker-style-name="T3"><text:span text:style-name="T25"><text:s text:c="4"/>wednesday,</text:span></text:p>
      <text:p text:style-name="P319" loext:marker-style-name="T3"><text:span text:style-name="T25"><text:s text:c="4"/>thursday = 10,</text:span></text:p>
      <text:p text:style-name="P319" loext:marker-style-name="T3"><text:span text:style-name="T25"><text:s text:c="4"/>friday,</text:span></text:p>
      <text:p text:style-name="P319" loext:marker-style-name="T3"><text:span text:style-name="T25"><text:s text:c="4"/>saturday</text:span></text:p>
      <text:p text:style-name="P319" loext:marker-style-name="T3"><text:soft-page-break/><text:span text:style-name="T25">};</text:span></text:p>
      <text:p text:style-name="P319" loext:marker-style-name="T3"><text:span text:style-name="T25">int main()</text:span></text:p>
      <text:p text:style-name="P319" loext:marker-style-name="T3"><text:span text:style-name="T25">{</text:span></text:p>
      <text:p text:style-name="P319" loext:marker-style-name="T3"><text:span text:style-name="T25"><text:s text:c="4"/>printf("%d %d %d %d %d %d %d", sunday, monday, tuesday, wednesday, thursday, friday, saturday);</text:span></text:p>
      <text:p text:style-name="P319" loext:marker-style-name="T3"><text:span text:style-name="T25"><text:s text:c="4"/>return 0;</text:span></text:p>
      <text:p text:style-name="P319" loext:marker-style-name="T3"><text:span text:style-name="T25">}</text:span></text:p>
      <text:p text:style-name="P138" loext:marker-style-name="T3"><text:span text:style-name="T9">Output</text:span></text:p>
      <text:p text:style-name="P201" loext:marker-style-name="T3"><text:span text:style-name="T25">1 2 5 6 10 11 12</text:span></text:p>
      <text:p text:style-name="P138" loext:marker-style-name="T3"><text:span text:style-name="T9">Example</text:span><text:span text:style-name="T21"> 4</text:span></text:p>
      <text:p text:style-name="P24">#include &lt;stdio.h&gt;</text:p>
      <text:p text:style-name="P24">enum state</text:p>
      <text:p text:style-name="P24">{</text:p>
      <text:p text:style-name="P24"><text:s text:c="4"/>working,</text:p>
      <text:p text:style-name="P24"><text:s text:c="4"/>failed</text:p>
      <text:p text:style-name="P24">};</text:p>
      <text:p text:style-name="P24">enum result</text:p>
      <text:p text:style-name="P24">{</text:p>
      <text:p text:style-name="P24"><text:s text:c="4"/>failed,</text:p>
      <text:p text:style-name="P24"><text:s text:c="4"/>passed</text:p>
      <text:p text:style-name="P24">};</text:p>
      <text:p text:style-name="P24">int main()</text:p>
      <text:p text:style-name="P24">{</text:p>
      <text:p text:style-name="P24"><text:s text:c="4"/>return 0;</text:p>
      <text:p text:style-name="P24">}</text:p>
      <text:p text:style-name="P138" loext:marker-style-name="T3"><text:soft-page-break/><text:span text:style-name="T9">Output</text:span></text:p>
      <text:p text:style-name="P323" loext:marker-style-name="T3"><text:span text:style-name="T25">main.c:4:14: error: redeclaration of enumerator 'failed' <text:s/>enum result {failed, passed}; <text:s text:c="14"/>^~~~~~ main.c:3:23: note: previous definition of 'failed' was here <text:s/>enum state <text:s/>{working, failed};</text:span></text:p>
      <text:p text:style-name="P214" loext:marker-style-name="T3"><text:span text:style-name="T21"><text:s text:c="23"/>^~~~~~</text:span></text:p>
      <text:list text:continue-numbering="true" text:style-name="WWNum9">
        <text:list-item>
          <text:h text:style-name="P116" text:outline-level="1" loext:marker-style-name="T3"><text:bookmark-start text:name="__RefHeading___Toc2234_1327778131"/><text:span text:style-name="T3"><text:s text:c="3"/></text:span><text:bookmark-start text:name="_Toc195978896"/><text:span text:style-name="T3">Bit Fields</text:span><text:bookmark-end text:name="__RefHeading___Toc2234_1327778131"/><text:bookmark-end text:name="_Toc195978896"/></text:h>
        </text:list-item>
      </text:list>
      <text:p text:style-name="P138" loext:marker-style-name="T3"><text:span text:style-name="T9">Suppose your C program contains a number of TRUE/FALSE variables grouped in a structure called status, as follows –</text:span></text:p>
      <text:p text:style-name="P320" loext:marker-style-name="T3"><text:span text:style-name="T25">struct</text:span></text:p>
      <text:p text:style-name="P320" loext:marker-style-name="T3"><text:span text:style-name="T25">{</text:span></text:p>
      <text:p text:style-name="P320" loext:marker-style-name="T3"><text:span text:style-name="T25"><text:tab/>unsigned int widthValidated;</text:span></text:p>
      <text:p text:style-name="P320" loext:marker-style-name="T3"><text:span text:style-name="T25"><text:tab/>unsigned int heightValidated;</text:span></text:p>
      <text:p text:style-name="P320" loext:marker-style-name="T3"><text:span text:style-name="T25">} status;</text:span></text:p>
      <text:p text:style-name="P137" loext:marker-style-name="T3"><text:span text:style-name="T9">This structure requires 8 bytes of memory space but in actual, we are going to store either 0 or 1 in each of the variables. The C programming language offers a better way to utilize the memory space in such situations.</text:span></text:p>
      <text:p text:style-name="P138" loext:marker-style-name="T3"><text:span text:style-name="T9">If you are using such variables inside a structure then you can define the width of a variable which tells the C compiler that you are going to use only those number of bytes. For example, the above structure can be re-written as follows –</text:span></text:p>
      <text:p text:style-name="P320" loext:marker-style-name="T3"><text:span text:style-name="T25">struct</text:span></text:p>
      <text:p text:style-name="P320" loext:marker-style-name="T3"><text:span text:style-name="T25">{</text:span></text:p>
      <text:p text:style-name="P320" loext:marker-style-name="T3"><text:span text:style-name="T25"><text:tab/>unsigned int widthValidated : 1;</text:span></text:p>
      <text:p text:style-name="P320" loext:marker-style-name="T3"><text:span text:style-name="T25"><text:tab/>unsigned int heightValidated : 1;</text:span></text:p>
      <text:p text:style-name="P320" loext:marker-style-name="T3"><text:span text:style-name="T25">}status;</text:span></text:p>
      <text:p text:style-name="P137" loext:marker-style-name="T3"><text:span text:style-name="T9">The above structure requires 4 bytes of memory space for status variable, but only 2 bits will be used to store the values.</text:span></text:p>
      <text:p text:style-name="P138" loext:marker-style-name="T3"><text:span text:style-name="T9">If you will use up to 32 variables each one with a width of 1 bit, then also the status structure will use 4 bytes. However as soon as you have 33 variables, it will allocate the next slot of the memory and it will start using 8 bytes. Let us check the following example to understand the concept –</text:span></text:p>
      <text:p text:style-name="P217" loext:marker-style-name="T3"><text:soft-page-break/><text:span text:style-name="T25">#include &lt;stdio.h&gt;</text:span></text:p>
      <text:p text:style-name="P217" loext:marker-style-name="T3"><text:span text:style-name="T25">#include &lt;string.h&gt; /* define simple structure */</text:span></text:p>
      <text:p text:style-name="P217" loext:marker-style-name="T3"><text:span text:style-name="T25">struct</text:span></text:p>
      <text:p text:style-name="P217" loext:marker-style-name="T3"><text:span text:style-name="T25">{</text:span></text:p>
      <text:p text:style-name="P217" loext:marker-style-name="T3"><text:span text:style-name="T25"><text:s text:c="4"/>unsigned int widthValidated;</text:span></text:p>
      <text:p text:style-name="P217" loext:marker-style-name="T3"><text:span text:style-name="T25"><text:s text:c="4"/>unsigned int heightValidated;</text:span></text:p>
      <text:p text:style-name="P217" loext:marker-style-name="T3"><text:span text:style-name="T25">} status1; /* define a structure with bit fields */</text:span></text:p>
      <text:p text:style-name="P217" loext:marker-style-name="T3"><text:span text:style-name="T25">struct</text:span></text:p>
      <text:p text:style-name="P217" loext:marker-style-name="T3"><text:span text:style-name="T25">{</text:span></text:p>
      <text:p text:style-name="P217" loext:marker-style-name="T3"><text:span text:style-name="T25"><text:s text:c="4"/>unsigned int widthValidated : 1;</text:span></text:p>
      <text:p text:style-name="P217" loext:marker-style-name="T3"><text:span text:style-name="T25"><text:s text:c="4"/>unsigned int heightValidated : 1;</text:span></text:p>
      <text:p text:style-name="P217" loext:marker-style-name="T3"><text:span text:style-name="T25">} status2;</text:span></text:p>
      <text:p text:style-name="P217" loext:marker-style-name="T3"><text:span text:style-name="T25">int main(void)</text:span></text:p>
      <text:p text:style-name="P217" loext:marker-style-name="T3"><text:span text:style-name="T25">{</text:span></text:p>
      <text:p text:style-name="P217" loext:marker-style-name="T3"><text:span text:style-name="T25"><text:s text:c="4"/>printf("Memory size occupied by status1 : %d\n", sizeof(status1));</text:span></text:p>
      <text:p text:style-name="P217" loext:marker-style-name="T3"><text:span text:style-name="T25"><text:s text:c="4"/>printf("Memory size occupied by status2 : %d\n", sizeof(status2));</text:span></text:p>
      <text:p text:style-name="P217" loext:marker-style-name="T3"><text:span text:style-name="T25"><text:s text:c="4"/>return 0;</text:span></text:p>
      <text:p text:style-name="P217" loext:marker-style-name="T3"><text:span text:style-name="T25">}</text:span></text:p>
      <text:p text:style-name="P138" loext:marker-style-name="T3"><text:span text:style-name="T9">When the above code is compiled and executed, it produces the following result –</text:span></text:p>
      <text:p text:style-name="P324" loext:marker-style-name="T3"><text:span text:style-name="T25">Memory size occupied by status1 : 8 Memory size occupied by status2 : 4</text:span></text:p>
      <text:h text:style-name="P61" text:outline-level="2" loext:marker-style-name="T3"><text:span text:style-name="T3">Bit Field Declaration</text:span></text:h>
      <text:p text:style-name="P138" loext:marker-style-name="T3"><text:span text:style-name="T9">The declaration of a bit-field has the following form inside a structure –</text:span></text:p>
      <text:p text:style-name="P325" loext:marker-style-name="T3"><text:span text:style-name="T25">struct</text:span></text:p>
      <text:p text:style-name="P318" loext:marker-style-name="T3"><text:span text:style-name="T25">{</text:span></text:p>
      <text:p text:style-name="P318" loext:marker-style-name="T3"><text:span text:style-name="T25"><text:tab/>&lt;data type&gt; &lt;member name&gt; : &lt;width&gt;;</text:span></text:p>
      <text:p text:style-name="P202" loext:marker-style-name="T3"><text:soft-page-break/><text:span text:style-name="T25">};</text:span></text:p>
      <text:p text:style-name="P138" loext:marker-style-name="T3"><text:span text:style-name="T9">Example</text:span></text:p>
      <text:p text:style-name="P23">#include &lt;stdio.h&gt;</text:p>
      <text:p text:style-name="P23">#include &lt;string.h&gt;</text:p>
      <text:p text:style-name="P23">struct</text:p>
      <text:p text:style-name="P23">{</text:p>
      <text:p text:style-name="P23"><text:s text:c="4"/>unsigned int age : 3;</text:p>
      <text:p text:style-name="P23">} Age;</text:p>
      <text:p text:style-name="P23">int main()</text:p>
      <text:p text:style-name="P23">{</text:p>
      <text:p text:style-name="P3" loext:marker-style-name="T3"><text:span text:style-name="T25"><text:s text:c="4"/>Age.age = 4;</text:span></text:p>
      <text:p text:style-name="P23"><text:s text:c="4"/>printf("Sizeof( Age ) : %d\n", sizeof(Age));</text:p>
      <text:p text:style-name="P23"><text:s text:c="4"/>printf("Age.age : %d\n", Age.age);</text:p>
      <text:p text:style-name="P23"><text:s text:c="4"/>Age.age = 7;</text:p>
      <text:p text:style-name="P23"><text:s text:c="4"/>printf("Age.age : %d\n", Age.age);</text:p>
      <text:p text:style-name="P23"><text:s text:c="4"/>Age.age = 8;</text:p>
      <text:p text:style-name="P23"><text:s text:c="4"/>printf("Age.age : %d\n", Age.age);</text:p>
      <text:p text:style-name="P23"><text:s text:c="4"/>return 0;</text:p>
      <text:p text:style-name="P23">}</text:p>
      <text:p text:style-name="P138" loext:marker-style-name="T3"><text:span text:style-name="T9">Output</text:span></text:p>
      <text:p text:style-name="P202" loext:marker-style-name="T3"><text:span text:style-name="T25">Sizeof( Age ) : 4</text:span></text:p>
      <text:p text:style-name="P202" loext:marker-style-name="T3"><text:span text:style-name="T25">Age.age : 4</text:span></text:p>
      <text:p text:style-name="P202" loext:marker-style-name="T3"><text:span text:style-name="T25">Age.age : 7</text:span></text:p>
      <text:p text:style-name="P208" loext:marker-style-name="T3"><text:span text:style-name="T25">Age.age : 0</text:span></text:p>
      <text:list text:continue-numbering="true" text:style-name="WWNum9">
        <text:list-item>
          <text:h text:style-name="P117" text:outline-level="1" loext:marker-style-name="T3"><text:bookmark-start text:name="__RefHeading___Toc2236_1327778131"/><text:span text:style-name="T3"><text:s text:c="3"/></text:span><text:bookmark-start text:name="_Toc195978897"/><text:span text:style-name="T3">Assigning Pointer address manually</text:span><text:bookmark-end text:name="__RefHeading___Toc2236_1327778131"/><text:bookmark-end text:name="_Toc195978897"/></text:h>
        </text:list-item>
      </text:list>
      <text:p text:style-name="P202" loext:marker-style-name="T3"><text:span text:style-name="T25">void * p = (void *)0x28FF44;</text:span></text:p>
      <text:p text:style-name="P138" loext:marker-style-name="T3"><text:span text:style-name="T9">Or if you want it as a char *</text:span></text:p>
      <text:p text:style-name="P209" loext:marker-style-name="T3"><text:soft-page-break/><text:span text:style-name="T25">char * p = (char *)0x28FF44;</text:span></text:p>
      <text:p text:style-name="P296" loext:marker-style-name="T3"><text:span text:style-name="T9">If you're pointing to something you really, really aren't meant to change, add a </text:span><text:span text:style-name="T25">const</text:span><text:span text:style-name="T9">.</text:span></text:p>
      <text:p text:style-name="P296" loext:marker-style-name="T3"><text:span text:style-name="T25">const void * p = (const void *)0x28FF44;</text:span></text:p>
      <text:p text:style-name="P296" loext:marker-style-name="T3"><text:span text:style-name="T25">const char * p = (const char *)0x28FF44;</text:span></text:p>
      <text:h text:style-name="P62" text:outline-level="2" loext:marker-style-name="T3"><text:span text:style-name="T3">Defining memory location of Memory Mapped Registers using Pointers</text:span></text:h>
      <text:p text:style-name="P202" loext:marker-style-name="T3"><text:span text:style-name="T25">#define REGISTER *((uint8_t*) 0x123456)</text:span></text:p>
      <text:p text:style-name="P167" loext:marker-style-name="T3"><text:span text:style-name="T9">Note: Accessing Non-Memory Mapped Registers, is possible only by using Assembly Language.</text:span></text:p>
      <text:list text:continue-numbering="true" text:style-name="WWNum9">
        <text:list-item>
          <text:h text:style-name="P118" text:outline-level="1" loext:marker-style-name="T3"><text:bookmark-start text:name="__RefHeading___Toc2238_1327778131"/><text:span text:style-name="T3"><text:s text:c="3"/></text:span><text:bookmark-start text:name="_Toc195978898"/><text:span text:style-name="T3">Format Specifiers</text:span><text:bookmark-end text:name="__RefHeading___Toc2238_1327778131"/><text:bookmark-end text:name="_Toc195978898"/></text:h>
        </text:list-item>
      </text:list>
      <text:p text:style-name="P218" loext:marker-style-name="T3"><text:span text:style-name="T25">%c<text:tab/>Character</text:span></text:p>
      <text:p text:style-name="P219" loext:marker-style-name="T3"><text:span text:style-name="T25">%d<text:tab/>Signed integer</text:span></text:p>
      <text:p text:style-name="P202" loext:marker-style-name="T3"><text:span text:style-name="T25">%e or %E Scientific notation of floats</text:span></text:p>
      <text:p text:style-name="P220" loext:marker-style-name="T3"><text:span text:style-name="T25">%f<text:tab/>Float values</text:span></text:p>
      <text:p text:style-name="P202" loext:marker-style-name="T3"><text:span text:style-name="T25">%.2f Float values by rounding to 2 decimal places</text:span></text:p>
      <text:p text:style-name="P202" loext:marker-style-name="T3"><text:span text:style-name="T25">%g or %G Similar as %e or %E</text:span></text:p>
      <text:p text:style-name="P202" loext:marker-style-name="T3"><text:span text:style-name="T25">%hi Signed integer (short)</text:span></text:p>
      <text:p text:style-name="P202" loext:marker-style-name="T3"><text:span text:style-name="T25">%hu Unsigned Integer (short)</text:span></text:p>
      <text:p text:style-name="P221" loext:marker-style-name="T3"><text:span text:style-name="T25">%i<text:tab/>Unsigned integer</text:span></text:p>
      <text:p text:style-name="P202" loext:marker-style-name="T3"><text:span text:style-name="T25">%l or %ld or %liLong</text:span></text:p>
      <text:p text:style-name="P202" loext:marker-style-name="T3"><text:span text:style-name="T25">%lf Double</text:span></text:p>
      <text:p text:style-name="P202" loext:marker-style-name="T3"><text:span text:style-name="T25">%Lf Long double</text:span></text:p>
      <text:p text:style-name="P202" loext:marker-style-name="T3"><text:span text:style-name="T25">%lu Unsigned int or unsigned long</text:span></text:p>
      <text:p text:style-name="P222" loext:marker-style-name="T3"><text:span text:style-name="T25">%lli or %lld<text:tab/>Long long</text:span></text:p>
      <text:p text:style-name="P202" loext:marker-style-name="T3"><text:span text:style-name="T25">%llu Unsigned long long</text:span></text:p>
      <text:p text:style-name="P223" loext:marker-style-name="T3"><text:span text:style-name="T25">%o<text:tab/>Octal representation</text:span></text:p>
      <text:p text:style-name="P224" loext:marker-style-name="T3"><text:span text:style-name="T25">%p<text:tab/>Pointer</text:span></text:p>
      <text:p text:style-name="P225" loext:marker-style-name="T3"><text:span text:style-name="T25">%s<text:tab/>String</text:span></text:p>
      <text:p text:style-name="P220" loext:marker-style-name="T3"><text:span text:style-name="T25">%u<text:tab/>Unsigned int</text:span></text:p>
      <text:p text:style-name="P202" loext:marker-style-name="T3"><text:span text:style-name="T25">%x or %X Hexadecimal representation</text:span></text:p>
      <text:p text:style-name="P219" loext:marker-style-name="T3"><text:soft-page-break/><text:span text:style-name="T25">%n<text:tab/>Prints nothing</text:span></text:p>
      <text:p text:style-name="P226" loext:marker-style-name="T3"><text:span text:style-name="T25">%%<text:tab/>Prints % character</text:span></text:p>
      <text:list text:continue-numbering="true" text:style-name="WWNum9">
        <text:list-item>
          <text:h text:style-name="P119" text:outline-level="1" loext:marker-style-name="T3"><text:bookmark-start text:name="__RefHeading___Toc2240_1327778131"/><text:span text:style-name="T3"><text:s text:c="3"/></text:span><text:bookmark-start text:name="_Toc195978899"/><text:span text:style-name="T3">Bootloader, Bootstrap Loader and Start-up Code</text:span><text:bookmark-end text:name="__RefHeading___Toc2240_1327778131"/><text:bookmark-end text:name="_Toc195978899"/></text:h>
        </text:list-item>
      </text:list>
      <text:p text:style-name="P137" loext:marker-style-name="T3"><text:span text:style-name="T9">A bootloader is responsible for moving, and in some cases decompressing, the operating system kernel from long term storage (i.e., flash or hard disk) into main memory (RAM) for execution by the CPU. A bootstrap loader is another term for bootloader.</text:span></text:p>
      <text:p text:style-name="P138" loext:marker-style-name="T3"><text:span text:style-name="T9">Start-up code, however, is slightly different. Start-up code refers to the handful of subroutines that run when the kernel is first handed control by the bootloader. These routines are written in machine code for the target architecture and configure parameters within target CPU that enable the execution of other programs as well as perform critical tasks such as setting up the stack, zeroing the BSS, and copying the data section of the kernel from long term storage to main memory. Once executed, the start-up code jumps to the entry point of the kernel, usually defined under the symbol name ‘main’ for higher level system initialization such as the instantiation of device drivers and system periphery. In other words,</text:span></text:p>
      <text:p text:style-name="P142" loext:marker-style-name="T3"><text:span text:style-name="T9">Bootloader:</text:span></text:p>
      <text:p text:style-name="P137" loext:marker-style-name="T3"><text:span text:style-name="T9">Is not part of your application software. It is a piece of code to load your application code into the controller/processor. It is used only when you want to load a new software (version) onto the controller.</text:span></text:p>
      <text:p text:style-name="P137" loext:marker-style-name="T3"><text:span text:style-name="T9">Example: a bootloader may communicate with the PC (using USB or UART) to load your application software from PC into the microcontroller's program memory. After that it can be executed.</text:span></text:p>
      <text:p text:style-name="P142" loext:marker-style-name="T3"><text:span text:style-name="T9">Start-up code:</text:span></text:p>
      <text:p text:style-name="P141" loext:marker-style-name="T3"><text:span text:style-name="T9">Is a part of your application software. It is automatically generated by the compiler and added (at the program start) to your application software. Usually you don't know, nor you have to take care about it. The start-up code performs standard functions like data memory erase, stack pointer setup, standard peripheral setup. This is performed each time immediately after reset/power-on and may take only some milliseconds. You won't recognize this. Then automatically your application software starts.</text:span></text:p>
      <text:list text:continue-numbering="true" text:style-name="WWNum9">
        <text:list-item>
          <text:h text:style-name="P120" text:outline-level="1" loext:marker-style-name="T3"><text:bookmark-start text:name="__RefHeading___Toc2242_1327778131"/><text:span text:style-name="T3"><text:s text:c="3"/></text:span><text:bookmark-start text:name="_Toc195978900"/><text:span text:style-name="T3">Header Include Guard</text:span><text:bookmark-end text:name="__RefHeading___Toc2242_1327778131"/><text:bookmark-end text:name="_Toc195978900"/></text:h>
        </text:list-item>
      </text:list>
      <text:p text:style-name="P315" loext:marker-style-name="T3"><text:span text:style-name="T9">Header Include Guard is used to disable multiple inclusion of header file into a C project. Typical syntax is as below, </text:span><text:span text:style-name="T21">my-header-file.h</text:span></text:p>
      <text:p text:style-name="P202" loext:marker-style-name="T3"><text:span text:style-name="T25">#ifndef MY_HEADER_FILE_H</text:span></text:p>
      <text:p text:style-name="P202" loext:marker-style-name="T3"><text:span text:style-name="T25">#define MY_HEADER_FILE_H</text:span></text:p>
      <text:p text:style-name="P202" loext:marker-style-name="T3"><text:soft-page-break/><text:span text:style-name="T25">// Code body for header file</text:span></text:p>
      <text:p text:style-name="P202" loext:marker-style-name="T3"><text:span text:style-name="T25">#endif</text:span></text:p>
      <text:p text:style-name="P142" loext:marker-style-name="T3"><text:span text:style-name="T9">An example to illustrate the issue of multiple file/header inclusion is given below.</text:span></text:p>
      <text:h text:style-name="P62" text:outline-level="2" loext:marker-style-name="T3"><text:span text:style-name="T3">header-1.h</text:span></text:h>
      <text:p text:style-name="P320" loext:marker-style-name="T3"><text:span text:style-name="T25">typedef struct</text:span></text:p>
      <text:p text:style-name="P320" loext:marker-style-name="T3"><text:span text:style-name="T25">{</text:span></text:p>
      <text:p text:style-name="P320" loext:marker-style-name="T3"><text:span text:style-name="T25">…</text:span></text:p>
      <text:p text:style-name="P320" loext:marker-style-name="T3"><text:span text:style-name="T25">}</text:span></text:p>
      <text:p text:style-name="P320" loext:marker-style-name="T3"><text:span text:style-name="T25">MyStruct;</text:span></text:p>
      <text:p text:style-name="P320" loext:marker-style-name="T3"><text:span text:style-name="T25">int myFunction(MyStruct *value);</text:span></text:p>
      <text:h text:style-name="P62" text:outline-level="2" loext:marker-style-name="T3"><text:span text:style-name="T3">header-2.h</text:span></text:h>
      <text:p text:style-name="P320" loext:marker-style-name="T3"><text:span text:style-name="T25">#include "header-1.h"</text:span></text:p>
      <text:p text:style-name="P320" loext:marker-style-name="T3"><text:span text:style-name="T25">int myFunction2(MyStruct *value);</text:span></text:p>
      <text:h text:style-name="P62" text:outline-level="2" loext:marker-style-name="T3"><text:span text:style-name="T3">main.c</text:span></text:h>
      <text:p text:style-name="P326" loext:marker-style-name="T3"><text:span text:style-name="T25">#include "header-1.h" #include "header-2.h" int main()</text:span></text:p>
      <text:p text:style-name="P326" loext:marker-style-name="T3"><text:span text:style-name="T25">{</text:span></text:p>
      <text:p text:style-name="P326" loext:marker-style-name="T3"><text:span text:style-name="T25"><text:tab/><text:tab/><text:tab/>// do something</text:span></text:p>
      <text:p text:style-name="P202" loext:marker-style-name="T3"><text:span text:style-name="T25">}</text:span></text:p>
      <text:p text:style-name="P137" loext:marker-style-name="T3"><text:span text:style-name="T9">This code has a serious problem: the detailed contents of MyStruct is defined twice, which is not allowed. This would result in a compilation error that can be difficult to track down, since one header file includes another. If you instead, did it with header guards:</text:span></text:p>
      <text:h text:style-name="P62" text:outline-level="2" loext:marker-style-name="T3"><text:span text:style-name="T3">header-1.h</text:span></text:h>
      <text:p text:style-name="P328" loext:marker-style-name="T3"><text:span text:style-name="T25">#ifndef HEADER_1_H</text:span></text:p>
      <text:p text:style-name="P328" loext:marker-style-name="T3"><text:span text:style-name="T25">#define HEADER_1_H</text:span></text:p>
      <text:p text:style-name="P328" loext:marker-style-name="T3"><text:span text:style-name="T25">typedef struct</text:span></text:p>
      <text:p text:style-name="P328" loext:marker-style-name="T3"><text:span text:style-name="T25">{</text:span></text:p>
      <text:p text:style-name="P328" loext:marker-style-name="T3"><text:soft-page-break/><text:span text:style-name="T25">…</text:span></text:p>
      <text:p text:style-name="P328" loext:marker-style-name="T3"><text:span text:style-name="T25">} MyStruct;</text:span></text:p>
      <text:p text:style-name="P328" loext:marker-style-name="T3"><text:span text:style-name="T25">int myFunction(MyStruct *value); #endif</text:span></text:p>
      <text:h text:style-name="P62" text:outline-level="2" loext:marker-style-name="T3"><text:span text:style-name="T3">header-2.h</text:span></text:h>
      <text:p text:style-name="P202" loext:marker-style-name="T3"><text:span text:style-name="T25">#ifndef HEADER_2_H</text:span></text:p>
      <text:p text:style-name="P330" loext:marker-style-name="T3"><text:span text:style-name="T25">#define HEADER_2_H</text:span></text:p>
      <text:p text:style-name="P330" loext:marker-style-name="T3"><text:span text:style-name="T25">#include "header-1.h"</text:span></text:p>
      <text:p text:style-name="P330" loext:marker-style-name="T3"><text:span text:style-name="T25">int myFunction2(MyStruct *value); #endif</text:span></text:p>
      <text:h text:style-name="P62" text:outline-level="2" loext:marker-style-name="T3"><text:span text:style-name="T3">main.c</text:span></text:h>
      <text:p text:style-name="P326" loext:marker-style-name="T3"><text:span text:style-name="T25">#include "header-1.h" #include "header-2.h" int main()</text:span></text:p>
      <text:p text:style-name="P326" loext:marker-style-name="T3"><text:span text:style-name="T25">{</text:span></text:p>
      <text:p text:style-name="P326" loext:marker-style-name="T3"><text:span text:style-name="T25"><text:tab/><text:tab/><text:tab/>// do something</text:span></text:p>
      <text:p text:style-name="P202" loext:marker-style-name="T3"><text:span text:style-name="T25">}</text:span></text:p>
      <text:p text:style-name="P138" loext:marker-style-name="T3"><text:span text:style-name="T9">This would then expand to:</text:span></text:p>
      <text:p text:style-name="P329" loext:marker-style-name="T3"><text:span text:style-name="T25">#ifndef HEADER_1_H</text:span></text:p>
      <text:p text:style-name="P329" loext:marker-style-name="T3"><text:span text:style-name="T25">#define HEADER_1_H</text:span></text:p>
      <text:p text:style-name="P329" loext:marker-style-name="T3"><text:span text:style-name="T25">typedef struct</text:span></text:p>
      <text:p text:style-name="P329" loext:marker-style-name="T3"><text:span text:style-name="T25">{</text:span></text:p>
      <text:p text:style-name="P329" loext:marker-style-name="T3"><text:span text:style-name="T25">…</text:span></text:p>
      <text:p text:style-name="P329" loext:marker-style-name="T3"><text:span text:style-name="T25">} MyStruct;</text:span></text:p>
      <text:p text:style-name="P329" loext:marker-style-name="T3"><text:span text:style-name="T25">int myFunction(MyStruct *value); #endif</text:span></text:p>
      <text:p text:style-name="P202" loext:marker-style-name="T3"><text:span text:style-name="T25">#ifndef HEADER_2_H</text:span></text:p>
      <text:p text:style-name="P331" loext:marker-style-name="T3"><text:soft-page-break/><text:span text:style-name="T25">#define HEADER_2_H</text:span></text:p>
      <text:p text:style-name="P331" loext:marker-style-name="T3"><text:span text:style-name="T25">#ifndef HEADER_1_H // Safe, since HEADER_1_H was #define-ed before. #define HEADER_1_H</text:span></text:p>
      <text:p text:style-name="P331" loext:marker-style-name="T3"><text:span text:style-name="T25">typedef struct</text:span></text:p>
      <text:p text:style-name="P331" loext:marker-style-name="T3"><text:span text:style-name="T25">{</text:span></text:p>
      <text:p text:style-name="P331" loext:marker-style-name="T3"><text:span text:style-name="T25">…</text:span></text:p>
      <text:p text:style-name="P331" loext:marker-style-name="T3"><text:span text:style-name="T25">} MyStruct;</text:span></text:p>
      <text:p text:style-name="P331" loext:marker-style-name="T3"><text:span text:style-name="T25">int myFunction(MyStruct *value);</text:span></text:p>
      <text:p text:style-name="P331" loext:marker-style-name="T3"><text:span text:style-name="T25">#endif int myFunction2(MyStruct *value);</text:span></text:p>
      <text:p text:style-name="P332" loext:marker-style-name="T3"><text:span text:style-name="T25">#endif</text:span></text:p>
      <text:p text:style-name="P332" loext:marker-style-name="T3"><text:span text:style-name="T25">int main()</text:span></text:p>
      <text:p text:style-name="P332" loext:marker-style-name="T3"><text:span text:style-name="T25">{</text:span></text:p>
      <text:p text:style-name="P318" loext:marker-style-name="T3"><text:span text:style-name="T25"><text:tab/>// do something</text:span></text:p>
      <text:p text:style-name="P206" loext:marker-style-name="T3"><text:span text:style-name="T25">}</text:span></text:p>
      <text:p text:style-name="P138" loext:marker-style-name="T3"><text:span text:style-name="T9">When the compiler reaches the second inclusion of </text:span><text:span text:style-name="T25">header-1.h</text:span><text:span text:style-name="T9">,</text:span><text:span text:style-name="T25"> HEADER_1_H</text:span><text:span text:style-name="T9"> was already defined by the previous inclusion. So, now everything boils down to:</text:span></text:p>
      <text:p text:style-name="P318" loext:marker-style-name="T3"><text:span text:style-name="T25">#define HEADER_1_H</text:span></text:p>
      <text:p text:style-name="P318" loext:marker-style-name="T3"><text:span text:style-name="T25">typedef struct</text:span></text:p>
      <text:p text:style-name="P318" loext:marker-style-name="T3"><text:span text:style-name="T25">{</text:span></text:p>
      <text:p text:style-name="P318" loext:marker-style-name="T3"><text:span text:style-name="T25">…</text:span></text:p>
      <text:p text:style-name="P318" loext:marker-style-name="T3"><text:span text:style-name="T25">} MyStruct;</text:span></text:p>
      <text:p text:style-name="P318" loext:marker-style-name="T3"><text:span text:style-name="T25">int myFunction(MyStruct *value);</text:span></text:p>
      <text:p text:style-name="P318" loext:marker-style-name="T3"><text:span text:style-name="T25">#define HEADER_2_H</text:span></text:p>
      <text:p text:style-name="P318" loext:marker-style-name="T3"><text:span text:style-name="T25">int myFunction2(MyStruct *value);</text:span></text:p>
      <text:p text:style-name="P318" loext:marker-style-name="T3"><text:span text:style-name="T25">int main()</text:span></text:p>
      <text:p text:style-name="P318" loext:marker-style-name="T3"><text:soft-page-break/><text:span text:style-name="T25">{</text:span></text:p>
      <text:p text:style-name="P318" loext:marker-style-name="T3"><text:span text:style-name="T25"><text:tab/>// do something</text:span></text:p>
      <text:p text:style-name="P202" loext:marker-style-name="T3"><text:span text:style-name="T25">}</text:span></text:p>
      <text:p text:style-name="P142" loext:marker-style-name="T3"><text:span text:style-name="T9">And thus, there is no compilation error.</text:span></text:p>
      <text:p text:style-name="P167" loext:marker-style-name="T3"><text:span text:style-name="T9">Note: There are multiple different conventions for naming the header guards. Some people like to name it </text:span><text:span text:style-name="T25">HEADER_2_H_</text:span><text:span text:style-name="T9">, some include the project name like </text:span><text:span text:style-name="T25">MY_PROJECT_HEADER_2_H</text:span><text:span text:style-name="T9">. The important thing is to ensure that the convention you follow makes it so that each file in your project has a unique header guard.</text:span></text:p>
      <text:list xml:id="list185529490370091" text:continue-numbering="true" text:style-name="WWNum9">
        <text:list-item>
          <text:h text:style-name="P105" text:outline-level="1" loext:marker-style-name="T3"><text:bookmark-start text:name="__RefHeading___Toc2244_1327778131"/><text:span text:style-name="T3"><text:s text:c="3"/></text:span><text:bookmark-start text:name="_Toc195978901"/><text:span text:style-name="T3">Memory Layout in C</text:span><text:bookmark-end text:name="__RefHeading___Toc2244_1327778131"/><text:bookmark-end text:name="_Toc195978901"/></text:h>
        </text:list-item>
      </text:list>
      <text:p text:style-name="P137" loext:marker-style-name="T3"><text:span text:style-name="T9">After compiling a C program, a binary executable file(.exe) is created, and when we execute the program, this binary file loads into RAM in an organized manner. After being loaded into the RAM, memory layout in C Program has six components which are </text:span><text:span text:style-name="T21">text segment, initialized data segment, uninitialized data segment, command-line arguments, stack, and heap</text:span><text:span text:style-name="T9">. Each of these six different segments stores different parts of code and have </text:span><text:span text:style-name="T21">their own read, write permissions</text:span><text:span text:style-name="T9">. If a program tries to access the value stored in any segment differently than it is supposed to, it results in a </text:span><text:span text:style-name="T21">segmentation fault</text:span><text:span text:style-name="T9"> error.</text:span></text:p>
      <text:h text:style-name="P62" text:outline-level="2" loext:marker-style-name="T3"><text:span text:style-name="T3">Scope of article</text:span></text:h>
      <text:list text:style-name="WWNum4">
        <text:list-item>
          <text:p text:style-name="P187" loext:marker-style-name="T3"><text:span text:style-name="T9">This article discusses how a program is loaded into RAM when a C program executes, which helps programmers decide the amount of memory the program uses for its execution.</text:span></text:p>
        </text:list-item>
        <text:list-item>
          <text:p text:style-name="P187" loext:marker-style-name="T3"><text:span text:style-name="T9">This article explains each of these sections in memory layout in C with examples.</text:span></text:p>
        </text:list-item>
        <text:list-item>
          <text:p text:style-name="P188" loext:marker-style-name="T3"><text:span text:style-name="T9">This article does not discuss how a program compiles and the state of CPU registers and how their value change during program compilation.</text:span></text:p>
        </text:list-item>
      </text:list>
      <text:h text:style-name="P61" text:outline-level="2" loext:marker-style-name="T3"><text:span text:style-name="T3">Introduction</text:span></text:h>
      <text:p text:style-name="P137" loext:marker-style-name="T3"><text:span text:style-name="T9">When we execute a C program, the executable code of the file loads into RAM in an organized manner. Computers do not access program instructions directly from secondary storage because the access time of secondary storage is longer when compared to that of RAM. RAM is faster than secondary storage but has a limited storage capacity, so it is necessary for programmers to utilize this limited storage efficiently. Knowledge of memory layout in C is helpful to programmers because they can decide the amount of memory utilized by the program for its execution.</text:span></text:p>
      <text:p text:style-name="P137" loext:marker-style-name="T3"><text:span text:style-name="T9">A C program memory layout in C mainly comprises six components these are heap, stack, code segment, command-line arguments, uninitialized and initialized data segments. Each of these </text:span><text:span text:style-name="T21">segments has its own read and write permissions</text:span><text:span text:style-name="T9">. A segmentation fault occurs when a program tries to access any of the segments in a way that is not allowed, which is also a common reason for the program to crash.</text:span></text:p>
      <text:h text:style-name="P61" text:outline-level="2" loext:marker-style-name="T3"><text:soft-page-break/><text:span text:style-name="T3">Diagram for memory structure of C</text:span></text:h>
      <text:p text:style-name="P168" loext:marker-style-name="T3"><text:span text:style-name="T9">The diagram mentioned below shows a visual representation of how RAM loads a program written in C into several segments.</text:span></text:p>
      <text:p text:style-name="P254" loext:marker-style-name="T3"><draw:frame draw:style-name="fr2" draw:name="Picture 3529" text:anchor-type="as-char" svg:width="15.921cm" svg:height="11.735cm" draw:z-index="1"><draw:image xlink:href="Pictures/1000000000000565000003FA477C2791.jpg" xlink:type="simple" xlink:show="embed" xlink:actuate="onLoad" draw:mime-type="image/jpeg"/></draw:frame></text:p>
      <text:p text:style-name="P142" loext:marker-style-name="T3"><text:span text:style-name="T9">Let us discuss each of these data segments in detail.</text:span></text:p>
      <text:h text:style-name="P64" text:outline-level="2" loext:marker-style-name="T3"><text:span text:style-name="T3">Text Segment</text:span></text:h>
      <text:list text:style-name="WWNum5">
        <text:list-item>
          <text:p text:style-name="P189" loext:marker-style-name="T3"><text:span text:style-name="T9">After we compile the program, a binary file generates, which is used to execute our program by loading it into RAM. This binary file contains instructions, and these instructions get stored in the text segment of the memory.</text:span></text:p>
        </text:list-item>
        <text:list-item>
          <text:p text:style-name="P190" loext:marker-style-name="T3"><text:span text:style-name="T9">Text segment has read-only permission that prevents the program from accidental modifications.</text:span></text:p>
        </text:list-item>
        <text:list-item>
          <text:p text:style-name="P191" loext:marker-style-name="T3"><text:span text:style-name="T9">Text segment in RAM is shareable so that a single copy is required in the memory for frequent applications like a text editor, shells, etc.</text:span></text:p>
        </text:list-item>
      </text:list>
      <text:h text:style-name="P61" text:outline-level="2" loext:marker-style-name="T3"><text:span text:style-name="T3">Initialized data segment</text:span></text:h>
      <text:p text:style-name="P138" loext:marker-style-name="T3"><text:span text:style-name="T9">Initialized data segment or </text:span><text:span text:style-name="T21">data segment</text:span><text:span text:style-name="T9"> is part of the computer's virtual memory space of a C program that contains values of all external, global, static, and constant variables whose values are initialized at the time of variable declaration in the program. Because the values of variables can change during program execution, this memory segment has </text:span><text:span text:style-name="T21">read-write</text:span><text:span text:style-name="T9"> permission. We can further classify the data segment into the </text:span><text:span text:style-name="T21">read-write and read-only areas</text:span><text:span text:style-name="T9">. const variable comes under the read-only area. The remaining types of variables come in the read-write area. For example,</text:span></text:p>
      <text:p text:style-name="P202" loext:marker-style-name="T3"><text:span text:style-name="T25">const hello* = "Data segment";</text:span></text:p>
      <text:p text:style-name="P138" loext:marker-style-name="T3"><text:soft-page-break/><text:span text:style-name="T9">Here, the pointer variable hello comes under the read-write area, and the value of the string literal "Data segment" lies comes under initialized read-only data segment.</text:span></text:p>
      <text:p text:style-name="P23">#include &lt;stdio.h&gt;</text:p>
      <text:p text:style-name="P23">/* global variables stored in the read-write part of initialized data segment <text:s/>*/</text:p>
      <text:p text:style-name="P23">int global_var = 50;</text:p>
      <text:p text:style-name="P23">char *hello = "Hello World"; /* global variables stored in the read-only part of initialized data segment <text:s/>*/</text:p>
      <text:p text:style-name="P23">const int global_var2 = 30;</text:p>
      <text:p text:style-name="P23">int main()</text:p>
      <text:p text:style-name="P23">{</text:p>
      <text:p text:style-name="P23"><text:s text:c="4"/>// static variable stored in initialized data segment</text:p>
      <text:p text:style-name="P23"><text:s text:c="4"/>static int a = 10;</text:p>
      <text:p text:style-name="P23"><text:s text:c="4"/>return 0;</text:p>
      <text:p text:style-name="P23">}</text:p>
      <text:p text:style-name="P137" loext:marker-style-name="T3"><text:span text:style-name="T9">In this example, variables global_var and pointer hello are declared outside the scope of main() function because of which they are stored in the read-write part of the initialized data segment but, global variable global_var2 is declared with the keyword const and hence it is stored in the read-only part of initialized data segment. Static variables like a are also stored in this part of the memory.</text:span></text:p>
      <text:h text:style-name="P63" text:outline-level="2" loext:marker-style-name="T3"><text:span text:style-name="T3">Uninitialized data segment</text:span></text:h>
      <text:p text:style-name="P149" loext:marker-style-name="T3"><text:span text:style-name="T9">An uninitialized data segment is also known as </text:span><text:span text:style-name="T21">bss (block started by symbol)</text:span><text:span text:style-name="T9">. The program loaded allocates memory for this segment when it loads. Every data in bss is </text:span><text:span text:style-name="T21">initialized to arithmetic 0</text:span><text:span text:style-name="T9"> and </text:span><text:span text:style-name="T21">pointers to null pointer</text:span><text:span text:style-name="T9"> by the kernel before the C program executes. BSS also contains all the static and global variables, initialized with arithmetic 0. Because values of variables stored in bss can be changed, this data segment has </text:span><text:span text:style-name="T21">read-write permissions</text:span><text:span text:style-name="T22">.</text:span></text:p>
      <text:p text:style-name="P23">#include &lt;stdio.h&gt;</text:p>
      <text:p text:style-name="P23">// Uninitialized global variable stored in the bss segment int global_variable;</text:p>
      <text:p text:style-name="P23">int main()</text:p>
      <text:p text:style-name="P3" loext:marker-style-name="T3"><text:span text:style-name="T25">{ <text:s text:c="2"/>// Uninitialized static variable stored in bss static int static_variable;</text:span></text:p>
      <text:p text:style-name="P23"><text:s text:c="4"/>printf("global_variable = %d\n", global_variable);</text:p>
      <text:p text:style-name="P23"><text:s text:c="4"/>printf("static_variable = %d\n", static_variable);</text:p>
      <text:p text:style-name="P23"><text:soft-page-break/><text:s text:c="4"/>return 0;</text:p>
      <text:p text:style-name="P23">}</text:p>
      <text:p text:style-name="P334" loext:marker-style-name="T3"><text:span text:style-name="T21">Output</text:span></text:p>
      <text:p text:style-name="P23">global_variable = 0</text:p>
      <text:p text:style-name="P23">static_variable = 0</text:p>
      <text:p text:style-name="P154" loext:marker-style-name="T3"><text:span text:style-name="T9">Here, both the variables global_variable and static_variables are uninitialized. Hence they are stored in the bss segment in the memory layout in C. Before the program execution begins, these values are initialized with value 0 by the kernel. This can be verified by printing the values of the variable as shown in the program.</text:span></text:p>
      <text:h text:style-name="P63" text:outline-level="2" loext:marker-style-name="T3"><text:span text:style-name="T3">Stack</text:span></text:h>
      <text:p text:style-name="P154" loext:marker-style-name="T3"><text:span text:style-name="T9">The stack segment follows the LIFO (Last In First Out) structure and grows down to the lower address, but it depends on computer architecture. Stack </text:span><text:span text:style-name="T21">grows in the direction opposite to heap</text:span><text:span text:style-name="T9">. Stack segment </text:span><text:span text:style-name="T21">stores the value of local variables and values of parameters passed to a function</text:span><text:span text:style-name="T9"> along with some additional information like the instruction's return address, which is to be executed after a function call.</text:span></text:p>
      <text:p text:style-name="P154" loext:marker-style-name="T3"><text:span text:style-name="T21">Stack pointer</text:span><text:span text:style-name="T9"> register keeps track of the top of the stack and its value change when push/pop actions are performed on the segment. The values are passed to stack when a function is called stack frame. </text:span><text:span text:style-name="T21">Stack frame</text:span><text:span text:style-name="T9"> stores the value of function temporary variables and some automatic variables that store extra information like the return address and details of the caller's environment (memory registers). Each time function calls itself recursively, a </text:span><text:span text:style-name="T21">new stack frame is created</text:span><text:span text:style-name="T9">, which allows a set of variables of one stack frame to not interfere with other variables of a different instance of the function. This is how recursive functions work.</text:span></text:p>
      <text:p text:style-name="P169" loext:marker-style-name="T3"><text:span text:style-name="T9">Let us see an example to understand the variables stored in the stack memory segment.</text:span></text:p>
      <text:p text:style-name="P23">#include &lt;stdio.h&gt;</text:p>
      <text:p text:style-name="P23">void foo()</text:p>
      <text:p text:style-name="P23">{</text:p>
      <text:p text:style-name="P23"><text:s text:c="4"/>// Local variables stored in the stack when the function call is made</text:p>
      <text:p text:style-name="P23"><text:s text:c="4"/>int a, b;</text:p>
      <text:p text:style-name="P23">}</text:p>
      <text:p text:style-name="P23">int main()</text:p>
      <text:p text:style-name="P23">{</text:p>
      <text:p text:style-name="P23"><text:s text:c="4"/>// Local variables stored in the stack</text:p>
      <text:p text:style-name="P3"><draw:frame draw:style-name="fr1" draw:name="Picture 3815" text:anchor-type="char" svg:x="5.761cm" svg:y="-0.046cm" svg:width="10.028cm" svg:height="17.835cm" draw:z-index="2"><draw:image xlink:href="Pictures/10000000000003660000060B4D66437A.jpg" xlink:type="simple" xlink:show="embed" xlink:actuate="onLoad" draw:mime-type="image/jpeg"/></draw:frame><text:soft-page-break/><text:span text:style-name="T25"><text:s text:c="4"/>int local = 5;</text:span></text:p>
      <text:p text:style-name="P23"><text:s text:c="4"/>char name[26];</text:p>
      <text:p text:style-name="P23"><text:s text:c="4"/>foo();</text:p>
      <text:p text:style-name="P23"><text:s text:c="4"/>return 0;</text:p>
      <text:p text:style-name="P23">}</text:p>
      <text:p text:style-name="P152" loext:marker-style-name="T3"><text:span text:style-name="T9">Here, all the variables are stored in a stack memory layout in C because they are declared inside their parent function's scope. These variables only take the space in memory till their function is executed. For example, in the above code, the first main() starts its execution, and a stack frame for main() is made and pushed into the program stack with data of variables local and name. Then in main, we call foo, then another stack frame is made and pushed for it separately, which contains data of variables a and b. After the execution of foo, its stack frame is popped out, and its variable gets unallocated, and when the program ends, main's stack frame also gets popped out.</text:span></text:p>
      <text:p text:style-name="P131" loext:marker-style-name="T3"/>
      <text:h text:style-name="P62" text:outline-level="2" loext:marker-style-name="T3"><text:span text:style-name="T3">Heap</text:span></text:h>
      <text:p text:style-name="P170" loext:marker-style-name="T3"><text:span text:style-name="T9">Heap is used for memory which is </text:span><text:span text:style-name="T21">allocated during the run time</text:span><text:span text:style-name="T9"> (dynamically allocated memory). Heap generally begins at the end of bss segment and, they grow and shrink in the opposite direction of the Stack. Commands like malloc, calloc, free, realloc, etc are used to manage allocations in the heap segment which internally use sbrk and brk system calls to change memory allocation within the heap segment. Heap data segment is shared among modules loading dynamically and all the shared libraries in a process.</text:span></text:p>
      <text:p text:style-name="P318" loext:marker-style-name="T3"><text:span text:style-name="T25">#include &lt;stdio.h&gt;</text:span></text:p>
      <text:p text:style-name="P318" loext:marker-style-name="T3"><text:span text:style-name="T25">#include &lt;stdlib.h&gt;</text:span></text:p>
      <text:p text:style-name="P318" loext:marker-style-name="T3"><text:span text:style-name="T25">int main()</text:span></text:p>
      <text:p text:style-name="P318" loext:marker-style-name="T3"><text:span text:style-name="T25">{</text:span></text:p>
      <text:p text:style-name="P318" loext:marker-style-name="T3"><text:soft-page-break/><text:span text:style-name="T25"><text:s text:c="4"/>// memory allocated in heap segment</text:span></text:p>
      <text:p text:style-name="P318" loext:marker-style-name="T3"><text:span text:style-name="T25"><text:s text:c="4"/>char *var = (char *)malloc(sizeof(char));</text:span></text:p>
      <text:p text:style-name="P318" loext:marker-style-name="T3"><text:span text:style-name="T25"><text:s text:c="4"/>return 0;</text:span></text:p>
      <text:p text:style-name="P318" loext:marker-style-name="T3"><text:span text:style-name="T25">}</text:span></text:p>
      <text:p text:style-name="P154" loext:marker-style-name="T3"><text:span text:style-name="T9">Here, we create a variable of data type char by allocation memory of size 1 byte (equal to size of char in C) at the time of program execution. Because the variable is created dynamically such variables are initialized in the heap segment of the memory.</text:span></text:p>
      <text:h text:style-name="P63" text:outline-level="2" loext:marker-style-name="T3"><text:span text:style-name="T3">Command-line arguments</text:span></text:h>
      <text:p text:style-name="P170" loext:marker-style-name="T3"><text:span text:style-name="T9">When a program executes with arguments passed from the console like argv and argc and other environment variables, the value of these </text:span><text:span text:style-name="T21">variables gets stored in this memory layout in C</text:span><text:span text:style-name="T9">.</text:span></text:p>
      <text:p text:style-name="P22">#include &lt;stdio.h&gt;</text:p>
      <text:p text:style-name="P22">int main(int argc, char *argv[])</text:p>
      <text:p text:style-name="P22">{</text:p>
      <text:p text:style-name="P22"><text:s text:c="4"/>int i;</text:p>
      <text:p text:style-name="P22"><text:s text:c="4"/>// first value in argv stores file name</text:p>
      <text:p text:style-name="P22"><text:s text:c="4"/>printf("File name = %s\n", argv[0]);</text:p>
      <text:p text:style-name="P22"><text:s text:c="4"/>printf("Number of arguments passed = %d\n", argc - 1);</text:p>
      <text:p text:style-name="P22"><text:s text:c="4"/>for (i = 1; i &lt; argc; i++)</text:p>
      <text:p text:style-name="P22"><text:s text:c="4"/>{</text:p>
      <text:p text:style-name="P22"><text:s text:c="8"/>printf("Value of Argument_%d = %s\n", i, argv[i]);</text:p>
      <text:p text:style-name="P22"><text:s text:c="4"/>}</text:p>
      <text:p text:style-name="P37"/>
      <text:p text:style-name="P22"><text:s text:c="4"/>return 0;</text:p>
      <text:p text:style-name="P22">}</text:p>
      <text:h text:style-name="P62" text:outline-level="2" loext:marker-style-name="T3"><text:span text:style-name="T3">Output</text:span></text:h>
      <text:p text:style-name="P202" loext:marker-style-name="T3"><text:span text:style-name="T25">~$ gcc file_1.c -o file_1</text:span></text:p>
      <text:p text:style-name="P202" loext:marker-style-name="T3"><text:span text:style-name="T25">~$ ./file_1 100 23 43 69</text:span></text:p>
      <text:p text:style-name="P202" loext:marker-style-name="T3"><text:span text:style-name="T25">File name = ./file_1</text:span></text:p>
      <text:p text:style-name="P202" loext:marker-style-name="T3"><text:span text:style-name="T25">Number of arguments passed = 4</text:span></text:p>
      <text:p text:style-name="P202" loext:marker-style-name="T3"><text:span text:style-name="T25">Value of Argument_1 = 100</text:span></text:p>
      <text:p text:style-name="P202" loext:marker-style-name="T3"><text:soft-page-break/><text:span text:style-name="T25">Value of Argument_2 = 23</text:span></text:p>
      <text:p text:style-name="P202" loext:marker-style-name="T3"><text:span text:style-name="T25">Value of Argument_3 = 43</text:span></text:p>
      <text:p text:style-name="P210" loext:marker-style-name="T3"><text:span text:style-name="T25">Value of Argument_4 = 69</text:span></text:p>
      <text:p text:style-name="P154" loext:marker-style-name="T3"><text:span text:style-name="T9">This example explains how command-line arguments are passed and used in the program. Here, this segment stores the value of variables argc and argv where argc stores the number of arguments passed and argv stores the value of actual parameters along with file name.</text:span></text:p>
      <text:h text:style-name="P63" text:outline-level="2" loext:marker-style-name="T3"><text:span text:style-name="T3">Examples</text:span></text:h>
      <text:p text:style-name="P154" loext:marker-style-name="T3"><text:span text:style-name="T9">The size command is used to check the sizes (in bytes) of these different memory segments. Let us see some examples to visualize the memory layout in C, in detail.</text:span></text:p>
      <text:h text:style-name="P63" text:outline-level="2" loext:marker-style-name="T3"><text:span text:style-name="T3">A simple C program </text:span></text:h>
      <text:p text:style-name="P22">#include&lt;stdio.h&gt;</text:p>
      <text:p text:style-name="P22">int main()</text:p>
      <text:p text:style-name="P22">{</text:p>
      <text:p text:style-name="P22"><text:tab/><text:tab/><text:tab/>return 0;</text:p>
      <text:p text:style-name="P22">}</text:p>
      <text:h text:style-name="P62" text:outline-level="2" loext:marker-style-name="T3"><text:span text:style-name="T3">Output</text:span></text:h>
      <text:p text:style-name="P345" loext:marker-style-name="T3"><text:span text:style-name="T25">~$ gcc file_1.c -o file_1 ~$ size file_1 <text:s text:c="3"/></text:span></text:p>
      <text:p text:style-name="P346" loext:marker-style-name="T3"><text:span text:style-name="T25">text <text:s text:c="3"/>data <text:s text:c="4"/>bss <text:s text:c="4"/>dec <text:s text:c="4"/>hex filename <text:s text:c="3"/>1418 <text:s text:c="4"/>544 <text:s text:c="6"/>8 <text:s text:c="6"/>1970 <text:s text:c="4"/>7b2 file_1</text:span></text:p>
      <text:p text:style-name="P346" loext:marker-style-name="T3"><text:span text:style-name="T9">Let us now add a global variable</text:span></text:p>
      <text:p text:style-name="P22">#include &lt;stdio.h&gt;</text:p>
      <text:p text:style-name="P22">int global_variable = 5;</text:p>
      <text:p text:style-name="P22">int main()</text:p>
      <text:p text:style-name="P22">{</text:p>
      <text:p text:style-name="P22">return 0;</text:p>
      <text:p text:style-name="P22">}</text:p>
      <text:h text:style-name="P62" text:outline-level="2" loext:marker-style-name="T3"><text:span text:style-name="T3">Output</text:span></text:h>
      <text:p text:style-name="P347" loext:marker-style-name="T3"><text:span text:style-name="T25">~$ gcc file_1.c -o file_1 ~$ size file_1 <text:s text:c="3"/></text:span></text:p>
      <text:p text:style-name="P347" loext:marker-style-name="T3"><text:soft-page-break/><text:span text:style-name="T25">text <text:s text:c="3"/>data <text:s text:c="4"/>bss <text:s text:c="4"/>dec <text:s text:c="4"/>hex filename <text:s text:c="3"/>1418 <text:s text:c="4"/>548 <text:s text:c="6"/>4 <text:s text:c="3"/>1970 <text:s text:c="7"/>7b2 file_1</text:span></text:p>
      <text:p text:style-name="P154" loext:marker-style-name="T3"><text:span text:style-name="T9">Adding one global variable increased memory allocated by data segment (Initialized data segment) by 4 bytes, which is the actual memory size of 1 variable of type integer (sizeof(global_variable)).</text:span></text:p>
      <text:p text:style-name="P169" loext:marker-style-name="T3"><text:span text:style-name="T9">Let us add one uninitialized static variable that should increase memory occupied by bss.</text:span></text:p>
      <text:p text:style-name="P22">#include&lt;stdio.h&gt;</text:p>
      <text:p text:style-name="P22">int global_variable = 5;</text:p>
      <text:p text:style-name="P22">int main()</text:p>
      <text:p text:style-name="P22">{</text:p>
      <text:p text:style-name="P22"><text:tab/><text:tab/><text:tab/>static int static_variable_1;</text:p>
      <text:p text:style-name="P22"><text:tab/><text:tab/><text:tab/>return 0;</text:p>
      <text:p text:style-name="P22">}</text:p>
      <text:h text:style-name="P62" text:outline-level="2" loext:marker-style-name="T3"><text:span text:style-name="T3">Output</text:span></text:h>
      <text:p text:style-name="P202" loext:marker-style-name="T3"><text:span text:style-name="T25">~$gcc file_1.c -o file_1</text:span></text:p>
      <text:p text:style-name="P202" loext:marker-style-name="T3"><text:span text:style-name="T25">~$ size file_1</text:span></text:p>
      <text:p text:style-name="P322" loext:marker-style-name="T3"><text:span text:style-name="T25">text <text:s text:c="3"/>data <text:s text:c="4"/>bss <text:s text:c="4"/>dec <text:s text:c="4"/>hex filename <text:s text:c="3"/>1418 <text:s text:c="4"/>548 <text:s text:c="5"/>12 <text:s text:c="3"/>1978 <text:s text:c="4"/>7ba file_1</text:span></text:p>
      <text:p text:style-name="P169" loext:marker-style-name="T3"><text:span text:style-name="T9">But if we add a static variable with an initialized value, it will be stored in the data segment.</text:span></text:p>
      <text:p text:style-name="P22">#include&lt;stdio.h&gt;</text:p>
      <text:p text:style-name="P22">int global_variable = 5;</text:p>
      <text:p text:style-name="P22">int main()</text:p>
      <text:p text:style-name="P22">{</text:p>
      <text:p text:style-name="P22"><text:tab/><text:tab/><text:tab/>static int static_variable_1;</text:p>
      <text:p text:style-name="P22"><text:tab/><text:tab/><text:tab/>static int static_variable_2 = 12;</text:p>
      <text:p text:style-name="P22"><text:tab/><text:tab/><text:tab/>return 0;</text:p>
      <text:p text:style-name="P22">}</text:p>
      <text:h text:style-name="P62" text:outline-level="2" loext:marker-style-name="T3"><text:span text:style-name="T3">Output</text:span></text:h>
      <text:p text:style-name="P347" loext:marker-style-name="T3"><text:span text:style-name="T25">~$gcc file_1.c -o file_1 ~$ size file_1 <text:s text:c="3"/></text:span></text:p>
      <text:p text:style-name="P347" loext:marker-style-name="T3"><text:soft-page-break/><text:span text:style-name="T25">text <text:s text:c="3"/>data <text:s text:c="4"/>bss <text:s text:c="4"/>dec <text:s text:c="4"/>hex filename <text:s text:c="3"/>1418 <text:s text:c="4"/>552 <text:s text:c="5"/>8 <text:s text:c="7"/>1978 <text:s text:c="4"/>7ba file_1</text:span></text:p>
      <text:p text:style-name="P169" loext:marker-style-name="T3"><text:span text:style-name="T9">Similarly, if we add a global variable with an uninitialized value, it will be stored in bss.</text:span></text:p>
      <text:p text:style-name="P22">#include&lt;stdio.h&gt;</text:p>
      <text:p text:style-name="P22">int global_variable = 5;</text:p>
      <text:p text:style-name="P22">int global_variable_in_bss;</text:p>
      <text:p text:style-name="P22">int main()</text:p>
      <text:p text:style-name="P22">{</text:p>
      <text:p text:style-name="P22"><text:tab/><text:tab/><text:tab/>static int static_variable_1;</text:p>
      <text:p text:style-name="P22"><text:tab/><text:tab/><text:tab/>static int static_variable_2 = 12;</text:p>
      <text:p text:style-name="P22"><text:tab/><text:tab/><text:tab/>return 0;</text:p>
      <text:p text:style-name="P22">}</text:p>
      <text:h text:style-name="P62" text:outline-level="2" loext:marker-style-name="T3"><text:span text:style-name="T3">Output</text:span></text:h>
      <text:p text:style-name="P347" loext:marker-style-name="T3"><text:span text:style-name="T25">~$gcc file_1.c -o file_1 ~$ size file_1 <text:s text:c="3"/></text:span></text:p>
      <text:p text:style-name="P347" loext:marker-style-name="T3"><text:span text:style-name="T25">text <text:s text:c="3"/>data <text:s text:c="4"/>bss <text:s text:c="4"/>dec <text:s text:c="4"/>hex filename <text:s text:c="3"/>1418 <text:s text:c="4"/>552 <text:s text:c="5"/>16 <text:s text:c="6"/>1978 <text:s text:c="4"/>7ba file_1</text:span></text:p>
      <text:p text:style-name="P154" loext:marker-style-name="T3"><text:span text:style-name="T9">Also, we have classified initialized data segment into two parts:</text:span></text:p>
      <text:list text:style-name="WWNum6">
        <text:list-item>
          <text:p text:style-name="P192" loext:marker-style-name="T3"><text:span text:style-name="T9">read-only area</text:span></text:p>
        </text:list-item>
        <text:list-item>
          <text:p text:style-name="P193" loext:marker-style-name="T3"><text:span text:style-name="T9">read-write area</text:span></text:p>
        </text:list-item>
      </text:list>
      <text:p text:style-name="P171" loext:marker-style-name="T3"><text:span text:style-name="T9">Let us see two C programs to understand this classification</text:span><text:span text:style-name="T22">.</text:span></text:p>
      <text:h text:style-name="P62" text:outline-level="2" loext:marker-style-name="T3"><text:span text:style-name="T3">Program 1</text:span></text:h>
      <text:p text:style-name="P22">#include &lt;stdio.h&gt;</text:p>
      <text:p text:style-name="P22">/* <text:s/>* created in the read-write area <text:s/>*/</text:p>
      <text:p text:style-name="P22">char str[] = "Hello";</text:p>
      <text:p text:style-name="P22">int main()</text:p>
      <text:p text:style-name="P22">{</text:p>
      <text:p text:style-name="P22"><text:tab/><text:tab/><text:tab/>printf("%s\n",str);</text:p>
      <text:p text:style-name="P22"><text:s text:c="6"/>str[0] = 'Y';</text:p>
      <text:p text:style-name="P22"><text:soft-page-break/><text:s text:c="6"/>printf("%s\n",str);</text:p>
      <text:p text:style-name="P22"><text:tab/><text:tab/><text:tab/>return 0;</text:p>
      <text:p text:style-name="P22">}</text:p>
      <text:h text:style-name="P70" text:outline-level="2" loext:marker-style-name="T3"><text:span text:style-name="T40">Output</text:span></text:h>
      <text:p text:style-name="P202" loext:marker-style-name="T3"><text:span text:style-name="T25">Hello</text:span></text:p>
      <text:p text:style-name="P202" loext:marker-style-name="T3"><text:span text:style-name="T25">Yello</text:span></text:p>
      <text:h text:style-name="P71" text:outline-level="3" loext:marker-style-name="T3"><text:span text:style-name="T3">Program 2</text:span></text:h>
      <text:p text:style-name="P22">#include &lt;stdio.h&gt;</text:p>
      <text:p text:style-name="P22">/* <text:s/>* created in a read-only area <text:s/>*/</text:p>
      <text:p text:style-name="P22">char* str = "Hello";</text:p>
      <text:p text:style-name="P22">int main()</text:p>
      <text:p text:style-name="P22">{</text:p>
      <text:p text:style-name="P22"><text:tab/><text:tab/><text:tab/>printf("%s\n",str);</text:p>
      <text:p text:style-name="P22"><text:s text:c="6"/>str[0] = 'Y';</text:p>
      <text:p text:style-name="P22"><text:s text:c="6"/>printf("%s\n",str);</text:p>
      <text:p text:style-name="P22"><text:tab/><text:tab/><text:tab/>return 0;</text:p>
      <text:p text:style-name="P22">}</text:p>
      <text:h text:style-name="P70" text:outline-level="2" loext:marker-style-name="T3"><text:span text:style-name="T40">Output</text:span></text:h>
      <text:p text:style-name="P210" loext:marker-style-name="T3"><text:span text:style-name="T25">Segmentation fault (core dumped)</text:span></text:p>
      <text:p text:style-name="P154" loext:marker-style-name="T3"><text:span text:style-name="T9">In the first example, the global variable str is a character array and we can change its value but in the second case, we cannot change the character of the string because variable str is string literal and stored in the read-write area of the data segment because of which the second program throws an error.</text:span></text:p>
      <text:h text:style-name="P72" text:outline-level="3" loext:marker-style-name="T3"><text:span text:style-name="T3">Conclusion</text:span></text:h>
      <text:list text:style-name="WWNum7">
        <text:list-item>
          <text:p text:style-name="P194" loext:marker-style-name="T3"><text:span text:style-name="T9">When a program in C is executed, binary code is loaded into RAM and is segregated into five different areas which are text segment, initialized data segment, uninitialized data segment, command-line arguments, stack, and heap.</text:span></text:p>
        </text:list-item>
        <text:list-item>
          <text:p text:style-name="P195" loext:marker-style-name="T3"><text:span text:style-name="T9">Code instructions are stored in text segment and this is shareable memory. If arguments are passed when code is executed from the console, the values of arguments are stored in the command line arguments area in memory.</text:span></text:p>
        </text:list-item>
        <text:list-item>
          <text:p text:style-name="P344" loext:marker-style-name="T3"><text:soft-page-break/><text:span text:style-name="T9">Initialized data segment stores global, static, external variables that are initialized beforehand in the program. Uninitialized data segment or bss contains all the uninitialized global and static variables.</text:span></text:p>
        </text:list-item>
        <text:list-item>
          <text:p text:style-name="P194" loext:marker-style-name="T3"><text:span text:style-name="T9">Stack stores all local variables and arguments of functions. They also store a function return address of the instruction, which is to be executed after a function call.</text:span></text:p>
        </text:list-item>
        <text:list-item>
          <text:p text:style-name="P194" loext:marker-style-name="T3"><text:span text:style-name="T9">Stack and heap grow opposite to each other.</text:span></text:p>
        </text:list-item>
        <text:list-item>
          <text:p text:style-name="P196" loext:marker-style-name="T3"><text:span text:style-name="T9">Heap stores all dynamically allocated memory in the program and is managed by commands like malloc, calloc, free etc.</text:span></text:p>
        </text:list-item>
      </text:list>
      <text:list text:continue-list="list185529490370091" text:style-name="WWNum9">
        <text:list-item>
          <text:h text:style-name="P109" text:outline-level="1" loext:marker-style-name="T3"><text:bookmark-start text:name="__RefHeading___Toc2246_1327778131"/><text:span text:style-name="T3"><text:s text:c="3"/></text:span><text:bookmark-start text:name="_Toc195978902"/><text:span text:style-name="T3">Passing an array to a function</text:span><text:bookmark-end text:name="__RefHeading___Toc2246_1327778131"/><text:bookmark-end text:name="_Toc195978902"/></text:h>
        </text:list-item>
      </text:list>
      <text:p text:style-name="P5">#include &lt;stdio.h&gt;</text:p>
      <text:p text:style-name="P22">void helper_1(int arr[], int element) // int arr[] creates a pointer to the first element of the array. Array is always passed by reference.</text:p>
      <text:p text:style-name="P22">{</text:p>
      <text:p text:style-name="P202" loext:marker-style-name="T3"><text:span text:style-name="T25"><text:s text:c="4"/>printf("Size of arr inside helper_1: %d\n", sizeof(arr)); // arr is just a pointer pointing to the first element of the array. Size of arr is just a word, irrespective of what it points to. 8 bytes in 64 bit architecture.</text:span></text:p>
      <text:p text:style-name="P22"><text:s text:c="4"/>for (int i = 0; i &lt; element; i++)</text:p>
      <text:p text:style-name="P22"><text:s text:c="4"/>{</text:p>
      <text:p text:style-name="P22"><text:s text:c="8"/>printf("%d ", arr[i]);</text:p>
      <text:p text:style-name="P22"><text:s text:c="4"/>}</text:p>
      <text:p text:style-name="P22"><text:s text:c="4"/>printf("\n");</text:p>
      <text:p text:style-name="P22">}</text:p>
      <text:p text:style-name="P22">void helper_2(int *arr, int element) // Array is always passed by reference.</text:p>
      <text:p text:style-name="P22">{</text:p>
      <text:p text:style-name="P202" loext:marker-style-name="T3"><text:span text:style-name="T25"><text:s text:c="4"/>printf("Size of arr inside helper_2: %d\n", sizeof(arr)); // arr is just a pointer pointing to the first element of the array. Size of arr is just a word, irrespective of what it points to. 8 bytes in 64 bit architecture.</text:span></text:p>
      <text:p text:style-name="P22"><text:s text:c="4"/>for (int i = 0; i &lt; element; i++)</text:p>
      <text:p text:style-name="P22"><text:s text:c="4"/>{</text:p>
      <text:p text:style-name="P22"><text:s text:c="8"/>printf("%d ", arr[i]);</text:p>
      <text:p text:style-name="P22"><text:soft-page-break/><text:s text:c="4"/>}</text:p>
      <text:p text:style-name="P22"><text:s text:c="4"/>printf("\n");</text:p>
      <text:p text:style-name="P22">}</text:p>
      <text:p text:style-name="P22">int main(void)</text:p>
      <text:p text:style-name="P22">{</text:p>
      <text:p text:style-name="P22"><text:s text:c="4"/>int arr[] = {1, 2, 3, 4};</text:p>
      <text:p text:style-name="P22"><text:s text:c="4"/>int element = sizeof(arr) / sizeof(arr[0]); // F<text:span text:style-name="T50">i</text:span>nding the number of elements in the array.</text:p>
      <text:p text:style-name="P202" loext:marker-style-name="T3"><text:span text:style-name="T25"><text:s text:c="4"/>printf("Size of int: %d\n", sizeof(int));</text:span></text:p>
      <text:p text:style-name="P22"><text:s text:c="4"/>printf("Size of arr: %d\n", sizeof(arr));</text:p>
      <text:p text:style-name="P22"><text:s text:c="4"/>helper_1(arr, element); // Passing arr to the function.</text:p>
      <text:p text:style-name="P22"><text:s text:c="4"/>helper_2(arr, element); // Passing arr to the function.</text:p>
      <text:p text:style-name="P22"><text:s text:c="4"/>return (0);</text:p>
      <text:p text:style-name="P22">}</text:p>
      <text:p text:style-name="P138" loext:marker-style-name="T3"><text:span text:style-name="T9">Output:</text:span></text:p>
      <text:p text:style-name="P202" loext:marker-style-name="T3"><text:span text:style-name="T25">Size of int: 4</text:span></text:p>
      <text:p text:style-name="P340" loext:marker-style-name="T3"><text:span text:style-name="T25">Size of arr: 16</text:span></text:p>
      <text:p text:style-name="P340" loext:marker-style-name="T3"><text:span text:style-name="T25">Size of arr inside helper_1: 8</text:span></text:p>
      <text:p text:style-name="P341" loext:marker-style-name="T3"><text:span text:style-name="T25">1 2 3 4</text:span></text:p>
      <text:p text:style-name="P341" loext:marker-style-name="T3"><text:span text:style-name="T25">Size of arr inside helper_2: 8</text:span></text:p>
      <text:p text:style-name="P208" loext:marker-style-name="T3"><text:span text:style-name="T25">1 2 3 4</text:span></text:p>
      <text:list text:continue-numbering="true" text:style-name="WWNum9">
        <text:list-item>
          <text:h text:style-name="P121" text:outline-level="1" loext:marker-style-name="T3"><text:bookmark-start text:name="__RefHeading___Toc2248_1327778131"/><text:span text:style-name="T3"><text:s/></text:span><text:bookmark-start text:name="_Toc195978903"/><text:span text:style-name="T3">Normal declaration of array of pointers vs. array allocated with malloc()</text:span><text:bookmark-end text:name="__RefHeading___Toc2248_1327778131"/><text:bookmark-end text:name="_Toc195978903"/></text:h>
        </text:list-item>
      </text:list>
      <text:p text:style-name="P289" loext:marker-style-name="T3"><text:span text:style-name="T9">The first is the difference between declaring pointer to an array as</text:span></text:p>
      <text:p text:style-name="P202" loext:marker-style-name="T3"><text:span text:style-name="T25">int num[n];</text:span></text:p>
      <text:p text:style-name="P327" loext:marker-style-name="T3"><text:span text:style-name="T25">int (*array)[n]; array = &amp;num;</text:span></text:p>
      <text:p text:style-name="P349" loext:marker-style-name="T3"><text:soft-page-break/><text:span text:style-name="T9">and </text:span><text:span text:style-name="T25">int* array = malloc(n * sizeof(int));</text:span></text:p>
      <text:p text:style-name="P171" loext:marker-style-name="T3"><text:span text:style-name="T9">In the first version, you are declaring an object with automatic storage duration. This means that the array lives only as long as the function that calls it exists. In the second version, you are getting memory with dynamic storage duration, which means that it will exist until it is explicitly deallocated with </text:span><text:span text:style-name="T25">free()</text:span><text:span text:style-name="T9">.</text:span></text:p>
      <text:p text:style-name="P138" loext:marker-style-name="T3"><text:span text:style-name="T9">The reason that the second version works here is an implementation detail of how C is usually compiled. Typically, C memory is split into several regions, including the stack (for function calls and local variables) and the heap (for malloced objects). The stack typically has a much smaller size than the heap; usually it's something like 8MB. As a result, if you try to allocate a huge array with:</text:span></text:p>
      <text:p text:style-name="P335" loext:marker-style-name="T3"><text:span text:style-name="T25">int num[n]; int (*array)[n]; array = &amp;num;</text:span></text:p>
      <text:p text:style-name="P137" loext:marker-style-name="T3"><text:span text:style-name="T9">Then you might exceed the stack's storage space, causing the segmentation fault. On the other hand, the heap usually has a huge size (say, as much space as is free on the system), and so mallocing a large object won't cause an out-of-memory error.</text:span></text:p>
      <text:p text:style-name="P172" loext:marker-style-name="T3"><text:span text:style-name="T9">In general, be careful with variable-length arrays in C. They can easily exceed stack size. Prefer malloc unless you know the size is small or that you really only do want the array for a short period of time.</text:span></text:p>
      <text:list text:continue-numbering="true" text:style-name="WWNum9">
        <text:list-item>
          <text:h text:style-name="P122" text:outline-level="1" loext:marker-style-name="T3"><text:bookmark-start text:name="__RefHeading___Toc2261_1327778131"/><text:span text:style-name="T3"><text:s text:c="3"/>Token-pasting operator (##)</text:span><text:bookmark-end text:name="__RefHeading___Toc2261_1327778131"/></text:h>
        </text:list-item>
      </text:list>
      <text:p text:style-name="P290" loext:marker-style-name="T3"><text:span text:style-name="T9">The token-pasting operator ## defined by ANSI enables us to combine two tokens within a macro definition to form a single token.</text:span></text:p>
      <text:p text:style-name="P138" loext:marker-style-name="T3"><text:span text:style-name="T9">Example 1:</text:span></text:p>
      <text:p text:style-name="P22">#include &lt;stdio.h&gt;</text:p>
      <text:p text:style-name="P22">#define PASTE(arg1, arg2) \</text:p>
      <text:p text:style-name="P22"><text:s text:c="4"/>arg1##arg2</text:p>
      <text:p text:style-name="P22">int main()</text:p>
      <text:p text:style-name="P22">{</text:p>
      <text:p text:style-name="P22"><text:s text:c="4"/>int value_1 = 1000;</text:p>
      <text:p text:style-name="P22"><text:s text:c="4"/>printf("value_1 = %d\n", PASTE(value_, 1));</text:p>
      <text:p text:style-name="P22">}</text:p>
      <text:p text:style-name="P138" loext:marker-style-name="T3"><text:soft-page-break/><text:span text:style-name="T9">Output:</text:span></text:p>
      <text:p text:style-name="P211" loext:marker-style-name="T3"><text:span text:style-name="T25">value_1 = 1000</text:span></text:p>
      <text:p text:style-name="P138" loext:marker-style-name="T3"><text:span text:style-name="T9">Example 2:</text:span></text:p>
      <text:p text:style-name="P318" loext:marker-style-name="T3"><text:span text:style-name="T25">#include &lt;stdio.h&gt;</text:span></text:p>
      <text:p text:style-name="P318" loext:marker-style-name="T3"><text:span text:style-name="T25">#define CONCAT(A, B) \</text:span></text:p>
      <text:p text:style-name="P318" loext:marker-style-name="T3"><text:span text:style-name="T25"><text:s text:c="4"/>A##B</text:span></text:p>
      <text:p text:style-name="P318" loext:marker-style-name="T3"><text:span text:style-name="T25">int main()</text:span></text:p>
      <text:p text:style-name="P318" loext:marker-style-name="T3"><text:span text:style-name="T25">{</text:span></text:p>
      <text:p text:style-name="P318" loext:marker-style-name="T3"><text:span text:style-name="T25"><text:s text:c="4"/>printf("value1: %d\n", CONCAT(12, 20));</text:span></text:p>
      <text:p text:style-name="P318" loext:marker-style-name="T3"><text:span text:style-name="T25"><text:s text:c="4"/>printf("value2: %d\n", CONCAT(12, 20) + 10);</text:span></text:p>
      <text:p text:style-name="P318" loext:marker-style-name="T3"><text:span text:style-name="T25"><text:s text:c="4"/>return 0;</text:span></text:p>
      <text:p text:style-name="P318" loext:marker-style-name="T3"><text:span text:style-name="T25">}</text:span></text:p>
      <text:p text:style-name="P138" loext:marker-style-name="T3"><text:span text:style-name="T9">Output:</text:span></text:p>
      <text:p text:style-name="P333" loext:marker-style-name="T3"><text:span text:style-name="T25">value1: 1220 value2: 1230</text:span></text:p>
      <text:p text:style-name="P138" loext:marker-style-name="T3"><text:span text:style-name="T9">Example 3:</text:span></text:p>
      <text:p text:style-name="P202" loext:marker-style-name="T3"><text:span text:style-name="T25">#include &lt;stdio.h&gt;</text:span></text:p>
      <text:p text:style-name="P202" loext:marker-style-name="T3"><text:span text:style-name="T25">#define MY_DEVICE_BASE_ADDR <text:s/>0x40004000</text:span></text:p>
      <text:p text:style-name="P202" loext:marker-style-name="T3"><text:span text:style-name="T25">#define MY_DEVICE_REG_CTRL_OFS <text:s/>0x20</text:span></text:p>
      <text:p text:style-name="P202" loext:marker-style-name="T3"><text:span text:style-name="T25">#define MY_DEVICE_REG_STATUS_OFS 0x30</text:span></text:p>
      <text:p text:style-name="P202" loext:marker-style-name="T3"><text:span text:style-name="T25">#define MY_DEVICE_REG_INTR_OFS <text:s/>0x40</text:span></text:p>
      <text:p text:style-name="P212" loext:marker-style-name="T3"><text:span text:style-name="T25">#define REG(name) ((unsigned int)(MY_DEVICE_BASE_ADDR) + </text:span></text:p>
      <text:p text:style-name="P336" loext:marker-style-name="T3"><text:span text:style-name="T25">MY_DEVICE_REG_##name##_OFS) int main()</text:span></text:p>
      <text:p text:style-name="P202" loext:marker-style-name="T3"><text:span text:style-name="T25">{</text:span></text:p>
      <text:p text:style-name="P339" loext:marker-style-name="T3"><text:span text:style-name="T25">printf("Example to use ## Pre-Processor!\n"); printf("*** My-Device Register ***\n"); </text:span><text:soft-page-break/><text:span text:style-name="T25">printf("Control-Register Addr = 0x%x\n", REG(CTRL)); printf("Status-Register Addr = 0x%x\n", REG(STATUS)); printf("Interrupt-Register Addr = 0x%x\n", REG(INTR));</text:span></text:p>
      <text:p text:style-name="P215" loext:marker-style-name="T3"><text:span text:style-name="T25">return 0;</text:span></text:p>
      <text:p text:style-name="P211" loext:marker-style-name="T3"><text:span text:style-name="T25">}</text:span></text:p>
      <text:p text:style-name="P138" loext:marker-style-name="T3"><text:span text:style-name="T9">Output:</text:span></text:p>
      <text:p text:style-name="P202" loext:marker-style-name="T3"><text:span text:style-name="T25">Example to use ## Pre-Processor!</text:span></text:p>
      <text:p text:style-name="P202" loext:marker-style-name="T3"><text:span text:style-name="T25">*** My-Device Register ***</text:span></text:p>
      <text:p text:style-name="P202" loext:marker-style-name="T3"><text:span text:style-name="T25">Control-Register Addr = 0x40004020</text:span></text:p>
      <text:p text:style-name="P337" loext:marker-style-name="T3"><text:span text:style-name="T25">Status-Register Addr = 0x40004030 Interrupt-Register Addr = 0x40004040</text:span></text:p>
      <text:p text:style-name="P138" loext:marker-style-name="T3"><text:span text:style-name="T9">Example 4:</text:span></text:p>
      <text:p text:style-name="P202" loext:marker-style-name="T3"><text:span text:style-name="T25">#include &lt;stdio.h&gt;</text:span></text:p>
      <text:p text:style-name="P202" loext:marker-style-name="T3"><text:span text:style-name="T25">#define LINKED_LIST(A) <text:s text:c="8"/>\</text:span></text:p>
      <text:p text:style-name="P202" loext:marker-style-name="T3"><text:span text:style-name="T25"><text:s text:c="4"/>struct list_##A <text:s text:c="11"/>\</text:span></text:p>
      <text:p text:style-name="P202" loext:marker-style-name="T3"><text:span text:style-name="T25"><text:s text:c="4"/>{ <text:s text:c="25"/>\</text:span></text:p>
      <text:p text:style-name="P202" loext:marker-style-name="T3"><text:span text:style-name="T25"><text:s text:c="8"/>A value; <text:s text:c="14"/>\</text:span></text:p>
      <text:p text:style-name="P202" loext:marker-style-name="T3"><text:span text:style-name="T25"><text:s text:c="8"/>struct list_##A *next; \</text:span></text:p>
      <text:p text:style-name="P202" loext:marker-style-name="T3"><text:span text:style-name="T25"><text:s text:c="4"/>}</text:span></text:p>
      <text:p text:style-name="P202" loext:marker-style-name="T3"><text:span text:style-name="T25">int main(void)</text:span></text:p>
      <text:p text:style-name="P202" loext:marker-style-name="T3"><text:span text:style-name="T25">{</text:span></text:p>
      <text:p text:style-name="P202" loext:marker-style-name="T3"><text:span text:style-name="T25"><text:s text:c="4"/>LINKED_LIST(int);</text:span></text:p>
      <text:p text:style-name="P202" loext:marker-style-name="T3"><text:span text:style-name="T25"><text:s text:c="4"/>return (0);</text:span></text:p>
      <text:p text:style-name="P202" loext:marker-style-name="T3"><text:span text:style-name="T25">}</text:span></text:p>
      <text:p text:style-name="P138" loext:marker-style-name="T3"><text:span text:style-name="T9">When compiled and stopped after the preprocessing stage with the below command:</text:span></text:p>
      <text:p text:style-name="P202" loext:marker-style-name="T3"><text:span text:style-name="T25">gcc -E main.c -o main.i</text:span></text:p>
      <text:p text:style-name="P138" loext:marker-style-name="T3"><text:span text:style-name="T9">Output:</text:span></text:p>
      <text:p text:style-name="P338" loext:marker-style-name="T3"><text:soft-page-break/><text:span text:style-name="T25">int main(void)</text:span></text:p>
      <text:p text:style-name="P318" loext:marker-style-name="T3"><text:span text:style-name="T25">{</text:span></text:p>
      <text:p text:style-name="P318" loext:marker-style-name="T3"><text:span text:style-name="T25"><text:tab/>struct list_int</text:span></text:p>
      <text:p text:style-name="P318" loext:marker-style-name="T3"><text:span text:style-name="T25"><text:tab/>{</text:span></text:p>
      <text:p text:style-name="P318" loext:marker-style-name="T3"><text:span text:style-name="T25"><text:tab/><text:tab/>int value; struct list_int *next;</text:span></text:p>
      <text:p text:style-name="P318" loext:marker-style-name="T3"><text:span text:style-name="T25"><text:tab/>};</text:span></text:p>
      <text:p text:style-name="P215" loext:marker-style-name="T3"><text:span text:style-name="T25">return(0);</text:span></text:p>
      <text:p text:style-name="P208" loext:marker-style-name="T3"><text:span text:style-name="T25">}</text:span></text:p>
      <text:list text:continue-numbering="true" text:style-name="WWNum9">
        <text:list-item>
          <text:h text:style-name="P122" text:outline-level="1" loext:marker-style-name="T3"><text:bookmark-start text:name="__RefHeading___Toc2271_1327778131"/><text:span text:style-name="T3"><text:s text:c="3"/>Macro with variable arguments</text:span><text:bookmark-end text:name="__RefHeading___Toc2271_1327778131"/></text:h>
        </text:list-item>
      </text:list>
      <text:p text:style-name="P283" loext:marker-style-name="T3"><text:span text:style-name="T25">#define dbg_print(fmt,args...) printf("Debug: "fmt ,##args)</text:span></text:p>
      <text:p text:style-name="P173" loext:marker-style-name="T3"><text:span text:style-name="T9">This is a GCC-specific variadic macro, which allows you to pass a variable number of arguments. </text:span></text:p>
      <text:p text:style-name="P174" loext:marker-style-name="T3"><text:span text:style-name="T9">Here's how it works:</text:span></text:p>
      <text:p text:style-name="P350" loext:marker-style-name="T3"><text:span text:style-name="T25">fmt</text:span><text:span text:style-name="T9"> is the first fixed parameter (the format string). </text:span><text:span text:style-name="T25">args...</text:span><text:span text:style-name="T9"> captures the rest of the arguments.</text:span></text:p>
      <text:p text:style-name="P138" loext:marker-style-name="T3"><text:span text:style-name="T9">The </text:span><text:span text:style-name="T25">##</text:span><text:span text:style-name="T9"> part is a GCC extension that removes the preceding comma if </text:span><text:span text:style-name="T25">args</text:span><text:span text:style-name="T9"> is empty, making the macro safe to use even if you pass no variable arguments.</text:span></text:p>
      <text:p text:style-name="P138" loext:marker-style-name="T3"><text:span text:style-name="T9">Example 1:</text:span></text:p>
      <text:p text:style-name="P202" loext:marker-style-name="T3"><text:span text:style-name="T25">dbg_print("Value is %d\n", 42);</text:span></text:p>
      <text:p text:style-name="P138" loext:marker-style-name="T3"><text:span text:style-name="T9">Expands to:</text:span></text:p>
      <text:p text:style-name="P202" loext:marker-style-name="T3"><text:span text:style-name="T25">printf("Debug: Value is %d\n", 42);</text:span></text:p>
      <text:p text:style-name="P138" loext:marker-style-name="T3"><text:span text:style-name="T9">Example 2:</text:span></text:p>
      <text:p text:style-name="P202" loext:marker-style-name="T3"><text:span text:style-name="T25">dbg_print("Just a message\n");</text:span></text:p>
      <text:p text:style-name="P138" loext:marker-style-name="T3"><text:span text:style-name="T9">Expands to:</text:span></text:p>
      <text:p text:style-name="P206" loext:marker-style-name="T3"><text:span text:style-name="T25">printf("Debug: Just a message\n");</text:span></text:p>
      <text:p text:style-name="P175" loext:marker-style-name="T3"><text:span text:style-name="T9">What if </text:span><text:span text:style-name="T25">##args</text:span><text:span text:style-name="T9"> wasn’t used?</text:span></text:p>
      <text:p text:style-name="P202" loext:marker-style-name="T3"><text:soft-page-break/><text:span text:style-name="T25">dbg_print("Just a message\n");</text:span></text:p>
      <text:p text:style-name="P138" loext:marker-style-name="T3"><text:span text:style-name="T9">Expands to:</text:span></text:p>
      <text:p text:style-name="P202" loext:marker-style-name="T3"><text:span text:style-name="T25">printf("Debug: Just a message\n", );</text:span></text:p>
      <text:p text:style-name="P176" loext:marker-style-name="T3"><text:span text:style-name="T21">Syntax error</text:span><text:span text:style-name="T9">: Trailing comma before the closing parenthesis when no args are provided.</text:span></text:p>
      <text:list text:continue-numbering="true" text:style-name="WWNum9">
        <text:list-item>
          <text:h text:style-name="P122" text:outline-level="1" loext:marker-style-name="T3"><text:bookmark-start text:name="__RefHeading___Toc2273_1327778131"/><text:span text:style-name="T3"><text:s text:c="3"/>Stringizing operator (#)</text:span><text:bookmark-end text:name="__RefHeading___Toc2273_1327778131"/></text:h>
        </text:list-item>
      </text:list>
      <text:p text:style-name="P285" loext:marker-style-name="T3"><text:span text:style-name="T9">Sometimes you may need to convert a macro’s argument to a string. Parameters are not replaced inside string constants, but you can use the ‘#’ preprocessing operator instead. When a macro parameter is used with a leading ‘#’, the preprocessor replaces it with the literal text of the actual argument, converted to a string constant. Unlike normal parameter replacement, the argument is not macro-expanded first. This is called stringizing.</text:span></text:p>
      <text:p text:style-name="P202" loext:marker-style-name="T3"><text:span text:style-name="T25">#define print_string(y) #y</text:span></text:p>
      <text:p text:style-name="P142" loext:marker-style-name="T3"><text:span text:style-name="T9">This will convert whatever is passed as a parameter y into a string.</text:span></text:p>
      <text:p text:style-name="P142" loext:marker-style-name="T3"><text:span text:style-name="T9">This will delete leading and trailing white space.</text:span></text:p>
      <text:p text:style-name="P142" loext:marker-style-name="T3"><text:span text:style-name="T9">If we pass the macro, it won’t expand. It will print the string.</text:span></text:p>
      <text:p text:style-name="P142" loext:marker-style-name="T3"><text:span text:style-name="T9">\ will convert into \\ and " is converted into \"</text:span></text:p>
      <text:p text:style-name="P137" loext:marker-style-name="T3"><text:span text:style-name="T9">Some characters cannot be stringized – notably, the comma , because it is used to delimit parameters and the right parenthesis ) because it marks the end of the parameter list.</text:span></text:p>
      <text:p text:style-name="P142" loext:marker-style-name="T3"><text:span text:style-name="T9">Example 1:</text:span></text:p>
      <text:p text:style-name="P138" loext:marker-style-name="T3"><text:span text:style-name="T9">Consider the below code.</text:span></text:p>
      <text:p text:style-name="P202" loext:marker-style-name="T3"><text:span text:style-name="T25">#define print_string(y) #y</text:span></text:p>
      <text:p text:style-name="P202" loext:marker-style-name="T3"><text:span text:style-name="T25">#define DEF welcome</text:span></text:p>
      <text:p text:style-name="P138" loext:marker-style-name="T3"><text:span text:style-name="T9">I’m using the print_string macro like below.</text:span></text:p>
      <text:p text:style-name="P348" loext:marker-style-name="T3"><text:span text:style-name="T25">print_string(Testing);</text:span></text:p>
      <text:p text:style-name="P348" loext:marker-style-name="T3"><text:span text:style-name="T25">print_string( Testing <text:s/>Program );</text:span></text:p>
      <text:p text:style-name="P348" loext:marker-style-name="T3"><text:span text:style-name="T25">print_string("Testing" "Program");</text:span></text:p>
      <text:p text:style-name="P348" loext:marker-style-name="T3"><text:span text:style-name="T25">print_string(Testing DEF Program);</text:span><text:span text:style-name="T9"> <text:s/>(Here DEF is a macro)</text:span></text:p>
      <text:p text:style-name="P138" loext:marker-style-name="T3"><text:span text:style-name="T9">This macro will expand like below.</text:span></text:p>
      <text:p text:style-name="P206" loext:marker-style-name="T3"><text:span text:style-name="T25">"Testing"</text:span></text:p>
      <text:p text:style-name="P142" loext:marker-style-name="T3"><text:soft-page-break/><text:span text:style-name="T25">"Testing Program"</text:span><text:span text:style-name="T9"> (leading and trailing spaces were trimmed and space between words was compressed to a single space character)</text:span></text:p>
      <text:p text:style-name="P138" loext:marker-style-name="T3"><text:span text:style-name="T25">"\"Testing\" \"Program\""</text:span><text:span text:style-name="T9">(the quotes were automatically converted)</text:span></text:p>
      <text:p text:style-name="P159" loext:marker-style-name="T3"><text:span text:style-name="T25">"Testing DEF Program"</text:span><text:span text:style-name="T9"> (DEF macro won’t expand)</text:span></text:p>
      <text:p text:style-name="P142" loext:marker-style-name="T3"><text:span text:style-name="T9">Example 2:</text:span></text:p>
      <text:p text:style-name="P138" loext:marker-style-name="T3"><text:span text:style-name="T9">Consider the below code.</text:span></text:p>
      <text:p text:style-name="P202" loext:marker-style-name="T3"><text:span text:style-name="T25">#define print_string(y) y</text:span></text:p>
      <text:p text:style-name="P202" loext:marker-style-name="T3"><text:span text:style-name="T25">#define DEF welcome</text:span></text:p>
      <text:p text:style-name="P162" loext:marker-style-name="T3"><text:span text:style-name="T9">I’m using the print_string macro like below.</text:span></text:p>
      <text:p text:style-name="P205" loext:marker-style-name="T3"><text:span text:style-name="T25">print_string(Testing DEF Program);</text:span><text:span text:style-name="T9"> (Here DEF is a macro)</text:span></text:p>
      <text:p text:style-name="P177" loext:marker-style-name="T3"><text:span text:style-name="T9">This macro will expand like below.</text:span></text:p>
      <text:p text:style-name="P178" loext:marker-style-name="T3"><text:span text:style-name="T25">"Testing welcome Program"</text:span><text:span text:style-name="T9"> (DEF macro won’t expand)</text:span></text:p>
      <text:list text:continue-numbering="true" text:style-name="WWNum9">
        <text:list-item>
          <text:h text:style-name="P121" text:outline-level="1" loext:marker-style-name="T3"><text:bookmark-start text:name="__RefHeading___Toc2256_1327778131"/><text:span text:style-name="T3"><text:s/></text:span><text:bookmark-start text:name="_Toc195978907"/><text:span text:style-name="T3">Both Stringize and the Token-pasting operators in a single macro</text:span><text:bookmark-end text:name="__RefHeading___Toc2256_1327778131"/><text:bookmark-end text:name="_Toc195978907"/></text:h>
        </text:list-item>
      </text:list>
      <text:p text:style-name="P2" loext:marker-style-name="T3"><text:span text:style-name="T25">#define tokenpaster(n) printf ("token" #n " = %d", token##n) tokenpaster(34);</text:span></text:p>
      <text:p text:style-name="P46">This example results in the following actual output from the preprocessor:</text:p>
      <text:p text:style-name="P213" loext:marker-style-name="T3"><text:span text:style-name="T25">printf ("token34 = %d", token34);</text:span></text:p>
      <text:p text:style-name="P46">Both the stringize and the token-pasting operators are used in this example.</text:p>
      <text:p text:style-name="P43"/>
      <text:list text:continue-numbering="true" text:style-name="WWNum9">
        <text:list-item>
          <text:h text:style-name="P123" text:outline-level="1" loext:marker-style-name="T3"><text:bookmark-start text:name="_Toc195978907_Copy_1"/><text:bookmark-start text:name="__RefHeading___Toc3901_3692198669"/><text:span text:style-name="T3">Const and Pointer</text:span><text:bookmark-end text:name="_Toc195978907_Copy_1"/><text:bookmark-end text:name="__RefHeading___Toc3901_3692198669"/></text:h>
        </text:list-item>
      </text:list>
      <text:p text:style-name="P4">int *const ptr = &amp;a; // Pointer can't change, value can.</text:p>
      <text:p text:style-name="P35"/>
      <text:p text:style-name="P4">const int *ptr = &amp;a; // Pointer can change, value can't.</text:p>
      <text:p text:style-name="P35"/>
      <text:p text:style-name="P4">int const *ptr = &amp;a; // Same as <text:span text:style-name="T49">ab</text:span>ove.</text:p>
      <text:p text:style-name="P35"/>
      <text:p text:style-name="P4">const int *const ptr = &amp;a; // Neither pointer nor value can change.</text:p>
      <text:p text:style-name="P35"/>
      <text:p text:style-name="P4">int const *const ptr = &amp;a; // Same as above.</text:p>
      <text:p text:style-name="P35"/>
      <text:p text:style-name="P142" loext:marker-style-name="T9"><text:soft-page-break/><text:span text:style-name="T9">Note: </text:span><text:span text:style-name="T25">const</text:span><text:span text:style-name="T9"> cannot move to the left if there is an immediate </text:span><text:span text:style-name="T25">*</text:span><text:span text:style-name="T9"> at its left. </text:span><text:span text:style-name="T16">In other words, when there is no </text:span><text:span text:style-name="T25">* </text:span><text:span text:style-name="T16">between </text:span><text:span text:style-name="T25">const</text:span><text:span text:style-name="T16"> and </text:span><text:span text:style-name="T25">ptr</text:span><text:span text:style-name="T16">, the pointer is a constant.</text:span></text:p>
      <text:p text:style-name="P35"/>
      <text:list text:continue-numbering="true" text:style-name="WWNum9">
        <text:list-item>
          <text:h text:style-name="P123" text:outline-level="1" loext:marker-style-name="T3"><text:bookmark text:name="_Toc195978907_Copy_1_Copy_1_Copy_1"/><text:bookmark-start text:name="__RefHeading___Toc3901_3692198669_Copy_1"/><text:span text:style-name="T3">Swapping without using Third variable</text:span><text:bookmark-end text:name="__RefHeading___Toc3901_3692198669_Copy_1"/></text:h>
        </text:list-item>
      </text:list>
      <text:p text:style-name="P4">a = a + b;</text:p>
      <text:p text:style-name="P4">b = a - b;</text:p>
      <text:p text:style-name="P4">a = a - b;</text:p>
      <text:p text:style-name="P35"/>
      <text:list text:continue-numbering="true" text:style-name="WWNum9">
        <text:list-item>
          <text:h text:style-name="P123" text:outline-level="1" loext:marker-style-name="T3"><text:bookmark text:name="_Toc195978907_Copy_1_Copy_1"/><text:bookmark-start text:name="__RefHeading___Toc3901_3692198669_Copy_2"/><text:span text:style-name="T3">Swapping using Bitwise operator</text:span><text:bookmark-end text:name="__RefHeading___Toc3901_3692198669_Copy_2"/></text:h>
        </text:list-item>
      </text:list>
      <text:p text:style-name="P4">a = a ^ b;</text:p>
      <text:p text:style-name="P4">b = a ^ b;</text:p>
      <text:p text:style-name="P4">a = a ^ b;</text:p>
      <text:p text:style-name="P35"/>
      <text:p text:style-name="P35"/>
      <text:list text:continue-numbering="true" text:style-name="WWNum9">
        <text:list-item>
          <text:h text:style-name="P123" text:outline-level="1" loext:marker-style-name="T3"><text:bookmark-start text:name="__RefHeading___Toc3901_3692198669_Copy_3"/><text:span text:style-name="T3">Application of union</text:span><text:bookmark-end text:name="__RefHeading___Toc3901_3692198669_Copy_3"/></text:h>
        </text:list-item>
      </text:list>
      <text:p text:style-name="P4">#include &lt;stdio.h&gt;</text:p>
      <text:p text:style-name="P35"/>
      <text:p text:style-name="P4">typedef union {</text:p>
      <text:p text:style-name="P4"><text:s text:c="4"/>unsigned char byte;</text:p>
      <text:p text:style-name="P4"><text:s text:c="4"/>struct {</text:p>
      <text:p text:style-name="P4"><text:s text:c="8"/>unsigned char bit0 : 1;</text:p>
      <text:p text:style-name="P4"><text:s text:c="8"/>unsigned char bit1 : 1;</text:p>
      <text:p text:style-name="P4"><text:s text:c="8"/>unsigned char bit2 : 1;</text:p>
      <text:p text:style-name="P4"><text:s text:c="8"/>unsigned char bit3 : 1;</text:p>
      <text:p text:style-name="P4"><text:s text:c="8"/>unsigned char bit4 : 1;</text:p>
      <text:p text:style-name="P4"><text:s text:c="8"/>unsigned char bit5 : 1;</text:p>
      <text:p text:style-name="P4"><text:s text:c="8"/>unsigned char bit6 : 1;</text:p>
      <text:p text:style-name="P4"><text:s text:c="8"/>unsigned char bit7 : 1;</text:p>
      <text:p text:style-name="P4"><text:s text:c="4"/>};</text:p>
      <text:p text:style-name="P4">} RegisterTemplate;</text:p>
      <text:p text:style-name="P35"/>
      <text:p text:style-name="P4">int main() {</text:p>
      <text:p text:style-name="P4"><text:s text:c="4"/>RegisterTemplate reg;</text:p>
      <text:p text:style-name="P35"/>
      <text:p text:style-name="P4"><text:s text:c="4"/>// Assign a value to byte (you can set it to any 8-bit value)</text:p>
      <text:p text:style-name="P4"><text:s text:c="4"/>reg.byte = 0xAB; <text:s/>// 0xAB in binary is 10101011</text:p>
      <text:p text:style-name="P35"/>
      <text:p text:style-name="P4"><text:s text:c="4"/>// Print the byte as individual bits</text:p>
      <text:p text:style-name="P4"><text:s text:c="4"/>printf("Byte (individual bits): ");</text:p>
      <text:p text:style-name="P4"><text:s text:c="4"/>printf("%d%d%d%d%d%d%d%d\n", </text:p>
      <text:p text:style-name="P4"><text:soft-page-break/><text:s text:c="11"/>reg.bit7, reg.bit6, reg.bit5, reg.bit4, </text:p>
      <text:p text:style-name="P4"><text:s text:c="11"/>reg.bit3, reg.bit2, reg.bit1, reg.bit0);</text:p>
      <text:p text:style-name="P35"/>
      <text:p text:style-name="P4"><text:s text:c="4"/>return 0;</text:p>
      <text:p text:style-name="P4">}</text:p>
      <text:p text:style-name="P35"/>
      <text:p text:style-name="P47">Output:</text:p>
      <text:p text:style-name="P4">Byte (individual bits): 10101011</text:p>
      <text:p text:style-name="P35"/>
      <text:p text:style-name="P35"/>
      <text:list text:continue-numbering="true" text:style-name="WWNum9">
        <text:list-item>
          <text:h text:style-name="P123" text:outline-level="1" loext:marker-style-name="T3"><text:bookmark-start text:name="__RefHeading___Toc3901_3692198669_Copy_4"/><text:span text:style-name="T6">A</text:span><text:span text:style-name="T3">cesss a variable in another file without making it global</text:span><text:bookmark-end text:name="__RefHeading___Toc3901_3692198669_Copy_4"/></text:h>
        </text:list-item>
      </text:list>
      <text:p text:style-name="P2"><text:span text:style-name="T7">main.c:</text:span><text:span text:style-name="T3"><text:line-break/></text:span><text:span text:style-name="T25"><text:line-break/>#include &lt;stdio.h&gt;</text:span></text:p>
      <text:p text:style-name="P2" loext:marker-style-name="T25"><text:span text:style-name="T25">#include "data.h"</text:span></text:p>
      <text:p text:style-name="P2" loext:marker-style-name="T25"><text:span text:style-name="T25"/></text:p>
      <text:p text:style-name="P2" loext:marker-style-name="T25"><text:span text:style-name="T25">int main(void) {</text:span></text:p>
      <text:p text:style-name="P2" loext:marker-style-name="T25"><text:span text:style-name="T25"><text:s text:c="4"/>// Print the initial value</text:span></text:p>
      <text:p text:style-name="P2" loext:marker-style-name="T25"><text:span text:style-name="T25"><text:s text:c="4"/>printf("Initial value: %d\n", get_hidden_variable());</text:span></text:p>
      <text:p text:style-name="P2" loext:marker-style-name="T25"><text:span text:style-name="T25"/></text:p>
      <text:p text:style-name="P2" loext:marker-style-name="T25"><text:span text:style-name="T25"><text:s text:c="4"/>// Modify the value safely</text:span></text:p>
      <text:p text:style-name="P2" loext:marker-style-name="T25"><text:span text:style-name="T25"><text:s text:c="4"/>set_hidden_variable(100);</text:span></text:p>
      <text:p text:style-name="P2" loext:marker-style-name="T25"><text:span text:style-name="T25"><text:s text:c="4"/>printf("Updated value: %d\n", get_hidden_variable());</text:span></text:p>
      <text:p text:style-name="P2" loext:marker-style-name="T25"><text:span text:style-name="T25"/></text:p>
      <text:p text:style-name="P2" loext:marker-style-name="T25"><text:span text:style-name="T25"><text:s text:c="4"/>return 0;</text:span></text:p>
      <text:p text:style-name="P2" loext:marker-style-name="T25"><text:span text:style-name="T25">}</text:span></text:p>
      <text:p text:style-name="P4" loext:marker-style-name="T25"/>
      <text:p text:style-name="P2" loext:marker-style-name="T9"><text:span text:style-name="T17">data</text:span><text:span text:style-name="T9">.c:</text:span></text:p>
      <text:p text:style-name="P4" loext:marker-style-name="T25"/>
      <text:p text:style-name="P2" loext:marker-style-name="T25"><text:span text:style-name="T25">#include &lt;stdio.h&gt;</text:span></text:p>
      <text:p text:style-name="P2" loext:marker-style-name="T25"><text:span text:style-name="T25"/></text:p>
      <text:p text:style-name="P2" loext:marker-style-name="T25"><text:span text:style-name="T25">// 'static' makes this variable invisible to other files</text:span></text:p>
      <text:p text:style-name="P2" loext:marker-style-name="T25"><text:span text:style-name="T25">static int hidden_variable = 42; </text:span></text:p>
      <text:p text:style-name="P2" loext:marker-style-name="T25"><text:span text:style-name="T25"/></text:p>
      <text:p text:style-name="P2" loext:marker-style-name="T25"><text:span text:style-name="T25">// Getter function to read the value</text:span></text:p>
      <text:p text:style-name="P2" loext:marker-style-name="T25"><text:span text:style-name="T25">int get_hidden_variable(void) {</text:span></text:p>
      <text:p text:style-name="P2" loext:marker-style-name="T25"><text:span text:style-name="T25"><text:s text:c="4"/>return hidden_variable;</text:span></text:p>
      <text:p text:style-name="P2" loext:marker-style-name="T25"><text:span text:style-name="T25">}</text:span></text:p>
      <text:p text:style-name="P2" loext:marker-style-name="T25"><text:span text:style-name="T25"/></text:p>
      <text:p text:style-name="P2" loext:marker-style-name="T25"><text:span text:style-name="T25">// Setter function to modify the value (optional)</text:span></text:p>
      <text:p text:style-name="P2" loext:marker-style-name="T25"><text:span text:style-name="T25">void set_hidden_variable(int new_value) {</text:span></text:p>
      <text:p text:style-name="P2" loext:marker-style-name="T25"><text:span text:style-name="T25"><text:s text:c="4"/>if (new_value &gt;= 0) { // You can even add validation!</text:span></text:p>
      <text:p text:style-name="P2" loext:marker-style-name="T25"><text:span text:style-name="T25"><text:s text:c="8"/>hidden_variable = new_value;</text:span></text:p>
      <text:p text:style-name="P2" loext:marker-style-name="T25"><text:soft-page-break/><text:span text:style-name="T25"><text:s text:c="4"/>}</text:span></text:p>
      <text:p text:style-name="P2" loext:marker-style-name="T25"><text:span text:style-name="T25">}</text:span></text:p>
      <text:p text:style-name="P4" loext:marker-style-name="T25"/>
      <text:p text:style-name="P2" loext:marker-style-name="T9"><text:span text:style-name="T18">data</text:span><text:span text:style-name="T9">.h:</text:span></text:p>
      <text:p text:style-name="P286" loext:marker-style-name="T25"><text:span text:style-name="T25"/></text:p>
      <text:p text:style-name="P286" loext:marker-style-name="T25"><text:span text:style-name="T25">#ifndef DATA_H</text:span></text:p>
      <text:p text:style-name="P2" loext:marker-style-name="T25"><text:span text:style-name="T25">#define DATA_H</text:span></text:p>
      <text:p text:style-name="P2" loext:marker-style-name="T25"><text:span text:style-name="T25"/></text:p>
      <text:p text:style-name="P2" loext:marker-style-name="T25"><text:span text:style-name="T25">// Public interface to access the variable</text:span></text:p>
      <text:p text:style-name="P2" loext:marker-style-name="T25"><text:span text:style-name="T25">int get_hidden_variable(void);</text:span></text:p>
      <text:p text:style-name="P2" loext:marker-style-name="T25"><text:span text:style-name="T25">void set_hidden_variable(int new_value);</text:span></text:p>
      <text:p text:style-name="P2" loext:marker-style-name="T25"><text:span text:style-name="T25"/></text:p>
      <text:p text:style-name="P2" loext:marker-style-name="T25"><text:span text:style-name="T25">#endif</text:span></text:p>
      <text:p text:style-name="P4" loext:marker-style-name="T25"/>
      <text:p text:style-name="P2" loext:marker-style-name="T19"><text:span text:style-name="T19">Compilation command:</text:span></text:p>
      <text:p text:style-name="P2" loext:marker-style-name="T25"><text:span text:style-name="T25">gcc main.c data.c -o my_program</text:span></text:p>
      <text:p text:style-name="P2" loext:marker-style-name="T25"><text:span text:style-name="T25"/></text:p>
      <text:p text:style-name="P351" loext:marker-style-name="T19"><text:span text:style-name="T20">O</text:span><text:span text:style-name="T19">utput:</text:span></text:p>
      <text:p text:style-name="P4" loext:marker-style-name="T25">Initial value: 42</text:p>
      <text:p text:style-name="P4" loext:marker-style-name="T25">Updated value: 100</text:p>
      <text:p text:style-name="P4" loext:marker-style-name="T25"/>
      <text:list text:continue-numbering="true" text:style-name="WWNum9">
        <text:list-item>
          <text:h text:style-name="P123" text:outline-level="1" loext:marker-style-name="T3"><text:bookmark-start text:name="__RefHeading___Toc4154_2971701815"/><text:span text:style-name="T5">R</text:span><text:span text:style-name="T3">eversing of register</text:span><text:bookmark-end text:name="__RefHeading___Toc4154_2971701815"/></text:h>
        </text:list-item>
      </text:list>
      <text:p text:style-name="P4" loext:marker-style-name="T25">#include &lt;stdio.h&gt;</text:p>
      <text:p text:style-name="P4" loext:marker-style-name="T25">#include &lt;stdint.h&gt;</text:p>
      <text:p text:style-name="P4" loext:marker-style-name="T25"/>
      <text:p text:style-name="P234" loext:marker-style-name="T25">uint8_t reverseBits(uint8_t reg)</text:p>
      <text:p text:style-name="P234" loext:marker-style-name="T25">{</text:p>
      <text:p text:style-name="P4" loext:marker-style-name="T25"><text:s text:c="4"/>uint8_t reversed = 0;</text:p>
      <text:p text:style-name="P4" loext:marker-style-name="T25"><text:s text:c="4"/>int num_bits = 8; // Size of the register in bits</text:p>
      <text:p text:style-name="P4" loext:marker-style-name="T25"/>
      <text:p text:style-name="P234" loext:marker-style-name="T25"><text:s text:c="4"/>for (int i = 0; i &lt; num_bits; i++)</text:p>
      <text:p text:style-name="P234" loext:marker-style-name="T25"><text:tab/><text:tab/>{</text:p>
      <text:p text:style-name="P4" loext:marker-style-name="T25"><text:s text:c="8"/>// 1. Shift the reversed result to the left to make room for the next bit</text:p>
      <text:p text:style-name="P4" loext:marker-style-name="T25"><text:s text:c="8"/>reversed &lt;&lt;= 1;</text:p>
      <text:p text:style-name="P4" loext:marker-style-name="T25"><text:s text:c="8"/></text:p>
      <text:p text:style-name="P4" loext:marker-style-name="T25"><text:s text:c="8"/>// 2. Grab the lowest bit of the original register using bitwise AND (&amp; 1)</text:p>
      <text:p text:style-name="P4" loext:marker-style-name="T25"><text:s text:c="8"/>// 3. Add it to our reversed result using bitwise OR (|)</text:p>
      <text:p text:style-name="P4" loext:marker-style-name="T25"><text:s text:c="8"/>reversed |= (reg &amp; 1);</text:p>
      <text:p text:style-name="P4" loext:marker-style-name="T25"><text:s text:c="8"/></text:p>
      <text:p text:style-name="P4" loext:marker-style-name="T25"><text:s text:c="8"/>// 4. Shift the original register to the right to process the next bit</text:p>
      <text:p text:style-name="P4" loext:marker-style-name="T25"><text:s text:c="8"/>reg &gt;&gt;= 1;</text:p>
      <text:p text:style-name="P4" loext:marker-style-name="T25"><text:soft-page-break/><text:s text:c="4"/>}</text:p>
      <text:p text:style-name="P4" loext:marker-style-name="T25"><text:s text:c="4"/></text:p>
      <text:p text:style-name="P4" loext:marker-style-name="T25"><text:s text:c="4"/>return reversed;</text:p>
      <text:p text:style-name="P4" loext:marker-style-name="T25">}</text:p>
      <text:p text:style-name="P4" loext:marker-style-name="T25"/>
      <text:p text:style-name="P235" loext:marker-style-name="T25">int main()</text:p>
      <text:p text:style-name="P235" loext:marker-style-name="T25">{</text:p>
      <text:p text:style-name="P4" loext:marker-style-name="T25"><text:s text:c="4"/>// Example: 0b11010010 (Decimal 210)</text:p>
      <text:p text:style-name="P4" loext:marker-style-name="T25"><text:s text:c="4"/>// Reversed should be: 0b01001011 (Decimal 75)</text:p>
      <text:p text:style-name="P4" loext:marker-style-name="T25"><text:s text:c="4"/>uint8_t original = 0xD2; </text:p>
      <text:p text:style-name="P4" loext:marker-style-name="T25"><text:s text:c="4"/>uint8_t result = reverseBits(original);</text:p>
      <text:p text:style-name="P4" loext:marker-style-name="T25"/>
      <text:p text:style-name="P4" loext:marker-style-name="T25"><text:s text:c="4"/>printf("Original: 0x%02X\n", original);</text:p>
      <text:p text:style-name="P4" loext:marker-style-name="T25"><text:s text:c="4"/>printf("Reversed: 0x%02X\n", result);</text:p>
      <text:p text:style-name="P4" loext:marker-style-name="T25"/>
      <text:p text:style-name="P4" loext:marker-style-name="T25"><text:s text:c="4"/>return 0;</text:p>
      <text:p text:style-name="P4" loext:marker-style-name="T25">}</text:p>
      <text:p text:style-name="P286" loext:marker-style-name="T25"/>
      <text:p text:style-name="P286" loext:marker-style-name="T25"/>
      <text:p text:style-name="P136" loext:marker-style-name="T19">Optimal Solution:</text:p>
      <text:p text:style-name="P286" loext:marker-style-name="T25"/>
      <text:p text:style-name="P286" loext:marker-style-name="T25"><text:span text:style-name="T25">#include &lt;stdint.h&gt;</text:span></text:p>
      <text:p text:style-name="P4" loext:marker-style-name="T25"/>
      <text:p text:style-name="P291" loext:marker-style-name="T25"><text:span text:style-name="T25">uint32_t reverse_bits(uint32_t n)</text:span></text:p>
      <text:p text:style-name="P291" loext:marker-style-name="T25"><text:span text:style-name="T25">{</text:span></text:p>
      <text:p text:style-name="P2" loext:marker-style-name="T25"><text:span text:style-name="T25"><text:s text:c="4"/>// Step 1: Swap adjacent bits</text:span></text:p>
      <text:p text:style-name="P2" loext:marker-style-name="T25"><text:span text:style-name="T25"><text:s text:c="4"/>n = ((n &gt;&gt; 1) &amp; 0x55555555) | ((n &amp; 0x55555555) &lt;&lt; 1);</text:span></text:p>
      <text:p text:style-name="P4" loext:marker-style-name="T25"/>
      <text:p text:style-name="P2" loext:marker-style-name="T25"><text:span text:style-name="T25"><text:s text:c="4"/>// Step 2: Swap pairs of bits (4-bit groups)</text:span></text:p>
      <text:p text:style-name="P2" loext:marker-style-name="T25"><text:span text:style-name="T25"><text:s text:c="4"/>n = ((n &gt;&gt; 2) &amp; 0x33333333) | ((n &amp; 0x33333333) &lt;&lt; 2);</text:span></text:p>
      <text:p text:style-name="P4" loext:marker-style-name="T25"/>
      <text:p text:style-name="P2" loext:marker-style-name="T25"><text:span text:style-name="T25"><text:s text:c="4"/>// Step 3: Swap nibbles (8-bit groups)</text:span></text:p>
      <text:p text:style-name="P2" loext:marker-style-name="T25"><text:span text:style-name="T25"><text:s text:c="4"/>n = ((n &gt;&gt; 4) &amp; 0x0F0F0F0F) | ((n &amp; 0x0F0F0F0F) &lt;&lt; 4);</text:span></text:p>
      <text:p text:style-name="P4" loext:marker-style-name="T25"/>
      <text:p text:style-name="P2" loext:marker-style-name="T25"><text:span text:style-name="T25"><text:s text:c="4"/>// Step 4: Swap bytes</text:span></text:p>
      <text:p text:style-name="P2" loext:marker-style-name="T25"><text:span text:style-name="T25"><text:s text:c="4"/>n = ((n &gt;&gt; 8) &amp; 0x00FF00FF) | ((n &amp; 0x00FF00FF) &lt;&lt; 8);</text:span></text:p>
      <text:p text:style-name="P4" loext:marker-style-name="T25"/>
      <text:p text:style-name="P2" loext:marker-style-name="T25"><text:span text:style-name="T25"><text:s text:c="4"/>// Step 5: Swap 16-bit halves</text:span></text:p>
      <text:p text:style-name="P2" loext:marker-style-name="T25"><text:span text:style-name="T25"><text:s text:c="4"/>n = (n &gt;&gt; 16) | (n &lt;&lt; 16);</text:span></text:p>
      <text:p text:style-name="P4" loext:marker-style-name="T25"/>
      <text:p text:style-name="P2" loext:marker-style-name="T25"><text:span text:style-name="T25"><text:s text:c="4"/>return n;</text:span></text:p>
      <text:p text:style-name="P2" loext:marker-style-name="T25"><text:span text:style-name="T25">}</text:span></text:p>
      <text:p text:style-name="P4" loext:marker-style-name="T25"/>
      <text:list xml:id="list185530024154775" text:continue-numbering="true" text:style-name="WWNum9">
        <text:list-item>
          <text:h text:style-name="P123" text:outline-level="1" loext:marker-style-name="T3"><text:bookmark-start text:name="__RefHeading___Toc4154_2971701815 Copy 1"/><text:soft-page-break/><text:span text:style-name="T41">scanf() to read until new line</text:span><text:bookmark-end text:name="__RefHeading___Toc4154_2971701815 Copy 1"/></text:h>
        </text:list-item>
      </text:list>
      <text:p text:style-name="P2"><text:span text:style-name="T9">To read everything until a newline character (</text:span><text:span text:style-name="T10">\n</text:span><text:span text:style-name="T9">), you use the format specifier:</text:span></text:p>
      <text:p text:style-name="P2"><text:span text:style-name="Source_20_Text"><text:span text:style-name="T25">%[^\n]</text:span></text:span></text:p>
      <text:list text:style-name="L1">
        <text:list-item>
          <text:p text:style-name="P292"><text:span text:style-name="Source_20_Text"><text:span text:style-name="T9">[</text:span></text:span><text:span text:style-name="T9"> Starts the scanset.</text:span></text:p>
        </text:list-item>
        <text:list-item>
          <text:p text:style-name="P292"><text:span text:style-name="Source_20_Text"><text:span text:style-name="T9">^</text:span></text:span><text:span text:style-name="T9"> This is a "not" operator. It tells </text:span><text:span text:style-name="Source_20_Text"><text:span text:style-name="T9">scanf</text:span></text:span><text:span text:style-name="T9"> to keep reading as long as it does not encounter the following character.</text:span></text:p>
        </text:list-item>
        <text:list-item>
          <text:p text:style-name="P292"><text:span text:style-name="Source_20_Text"><text:span text:style-name="T9">\n</text:span></text:span><text:span text:style-name="T9"> The terminating character.</text:span></text:p>
        </text:list-item>
        <text:list-item>
          <text:p text:style-name="P292"><text:span text:style-name="Source_20_Text"><text:span text:style-name="T9">]</text:span></text:span><text:span text:style-name="T9"> Ends the scanset.</text:span></text:p>
        </text:list-item>
      </text:list>
      <text:p text:style-name="P57"><text:span text:style-name="T9"/></text:p>
      <text:p text:style-name="P4">#include &lt;stdio.h&gt;</text:p>
      <text:p text:style-name="P4"/>
      <text:p text:style-name="P4">int main()</text:p>
      <text:p text:style-name="P4">{</text:p>
      <text:p text:style-name="P4"><text:s text:c="4"/>char str[100];</text:p>
      <text:p text:style-name="P4"/>
      <text:p text:style-name="P4"><text:s text:c="4"/>printf("Enter a full sentence: ");</text:p>
      <text:p text:style-name="P4"><text:s text:c="4"/>// Reads up to 99 chars or until a newline, whichever comes first.</text:p>
      <text:p text:style-name="P4"><text:s text:c="4"/>scanf("%99[^\n]", str);</text:p>
      <text:p text:style-name="P2"><text:span text:style-name="Source_20_Text"><text:span text:style-name="T25"><text:s text:c="4"/></text:span></text:span></text:p>
      <text:p text:style-name="P2"><text:span text:style-name="Source_20_Text"><text:span text:style-name="T25"><text:s text:c="4"/>// Reads until the user hits Enter </text:span></text:span><text:span text:style-name="Source_20_Text"><text:span text:style-name="T26">(ie, new line)</text:span></text:span><text:span text:style-name="Source_20_Text"><text:span text:style-name="T25">.</text:span></text:span></text:p>
      <text:p text:style-name="P2"><text:span text:style-name="Source_20_Text"><text:span text:style-name="T25"><text:s text:c="4"/>scanf("%[^\n]", str);</text:span></text:span></text:p>
      <text:p text:style-name="P4"/>
      <text:p text:style-name="P4"><text:s text:c="4"/>printf("You entered: %s\n", str);</text:p>
      <text:p text:style-name="P4"/>
      <text:p text:style-name="P4"><text:s text:c="4"/>return 0;</text:p>
      <text:p text:style-name="P4">}</text:p>
      <text:p text:style-name="P287" loext:marker-style-name="T3"/>
      <text:list text:continue-list="list185530024154775" text:style-name="WWNum9">
        <text:list-item>
          <text:h text:style-name="P123" text:outline-level="1" loext:marker-style-name="T3"><text:bookmark-start text:name="__RefHeading___Toc4154_2971701815 Copy 1 Copy 1"/><text:span text:style-name="T42">Fall-through</text:span><text:bookmark-end text:name="__RefHeading___Toc4154_2971701815 Copy 1 Copy 1"/></text:h>
        </text:list-item>
      </text:list>
      <text:p text:style-name="P4">#include &lt;stdio.h&gt;</text:p>
      <text:p text:style-name="P4"/>
      <text:p text:style-name="P4">int main() {</text:p>
      <text:p text:style-name="P4"><text:s text:c="4"/>int x = 2;</text:p>
      <text:p text:style-name="P4"/>
      <text:p text:style-name="P4"><text:s text:c="4"/>switch(x) {</text:p>
      <text:p text:style-name="P4"><text:s text:c="8"/>case 1:</text:p>
      <text:p text:style-name="P4"><text:s text:c="12"/>printf("Case 1\n");</text:p>
      <text:p text:style-name="P4"><text:s text:c="12"/>break;</text:p>
      <text:p text:style-name="P4"/>
      <text:p text:style-name="P4"><text:s text:c="8"/>case 2:</text:p>
      <text:p text:style-name="P4"><text:s text:c="12"/>printf("Case 2\n"); <text:s text:c="2"/>// No break here.</text:p>
      <text:p text:style-name="P4"><text:soft-page-break/></text:p>
      <text:p text:style-name="P4"><text:s text:c="8"/>case 3:</text:p>
      <text:p text:style-name="P4"><text:s text:c="12"/>printf("Case 3\n");</text:p>
      <text:p text:style-name="P4"><text:s text:c="12"/>break;</text:p>
      <text:p text:style-name="P4"/>
      <text:p text:style-name="P4"><text:s text:c="8"/>case 4:</text:p>
      <text:p text:style-name="P4"><text:s text:c="12"/>printf("Case 4\n");</text:p>
      <text:p text:style-name="P4"><text:s text:c="12"/><text:span text:style-name="T43">b</text:span>reak;</text:p>
      <text:p text:style-name="P4"/>
      <text:p text:style-name="P4"><text:s text:c="8"/>default:</text:p>
      <text:p text:style-name="P4"><text:s text:c="12"/>printf("Default\n");</text:p>
      <text:p text:style-name="P4"><text:s text:c="4"/>}</text:p>
      <text:p text:style-name="P4"/>
      <text:p text:style-name="P4"><text:s text:c="4"/>return 0;</text:p>
      <text:p text:style-name="P4">}</text:p>
      <text:p text:style-name="P4"/>
      <text:p text:style-name="P47">Output:</text:p>
      <text:p text:style-name="P4">Case 2</text:p>
      <text:p text:style-name="P4">Case <text:span text:style-name="T1">3</text:span></text:p>
      <text:p text:style-name="P4"/>
      <text:list text:continue-numbering="true" text:style-name="WWNum9">
        <text:list-item>
          <text:h text:style-name="P124" text:outline-level="1" loext:marker-style-name="T3"><text:bookmark-start text:name="__RefHeading___Toc4154_2971701815 Copy 1 Copy 1 Copy 1"/>Driver library<text:bookmark-end text:name="__RefHeading___Toc4154_2971701815 Copy 1 Copy 1 Copy 1"/></text:h>
        </text:list-item>
      </text:list>
      <text:p text:style-name="P4">#include &lt;stdio.h&gt;</text:p>
      <text:p text:style-name="P4"/>
      <text:p text:style-name="P4">typedef union</text:p>
      <text:p text:style-name="P4">{</text:p>
      <text:p text:style-name="P4"><text:s text:c="4"/>unsigned char byte;</text:p>
      <text:p text:style-name="P4"><text:s text:c="4"/>struct</text:p>
      <text:p text:style-name="P4"><text:s text:c="4"/>{</text:p>
      <text:p text:style-name="P4"><text:s text:c="8"/>unsigned char:1;</text:p>
      <text:p text:style-name="P4"><text:s text:c="8"/>unsigned char ENABLE:2;</text:p>
      <text:p text:style-name="P4"><text:s text:c="8"/>unsigned char CONFIG:3;</text:p>
      <text:p text:style-name="P4"><text:s text:c="8"/>unsigned char STATUS:2;</text:p>
      <text:p text:style-name="P4"><text:s text:c="4"/>};</text:p>
      <text:p text:style-name="P4">} reg;</text:p>
      <text:p text:style-name="P4"/>
      <text:p text:style-name="P4">volatile reg* const temp = (volatile reg*)0x123;</text:p>
      <text:p text:style-name="P4">#define ABC (*temp)</text:p>
      <text:p text:style-name="P4"/>
      <text:p text:style-name="P4">int main()</text:p>
      <text:p text:style-name="P4">{</text:p>
      <text:p text:style-name="P4"><text:s text:c="4"/>ABC.ENABLE = 1;</text:p>
      <text:p text:style-name="P4"><text:s text:c="4"/>int var = ABC.STATUS;</text:p>
      <text:p text:style-name="P4"/>
      <text:p text:style-name="P4"><text:soft-page-break/><text:s text:c="4"/>printf("%x\n", ABC.ENABLE);</text:p>
      <text:p text:style-name="P4"><text:s text:c="4"/></text:p>
      <text:p text:style-name="P4"><text:s text:c="4"/>return 0;</text:p>
      <text:p text:style-name="P4">}</text:p>
      <text:p text:style-name="P4"/>
      <text:p text:style-name="P48">Output:</text:p>
      <text:p text:style-name="P25">1</text:p>
      <text:p text:style-name="P25"/>
      <text:list text:continue-numbering="true" text:style-name="WWNum9">
        <text:list-item>
          <text:h text:style-name="P125" text:outline-level="1" loext:marker-style-name="T3"><text:bookmark-start text:name="__RefHeading___Toc4154_2971701815 Copy 1 Copy 1 Copy 1 Copy 1"/><text:span text:style-name="T51">N</text:span>umber of bits to convert integer a to integer b<text:bookmark-end text:name="__RefHeading___Toc4154_2971701815 Copy 1 Copy 1 Copy 1 Copy 1"/></text:h>
        </text:list-item>
      </text:list>
      <text:p text:style-name="P4">#include &lt;stdio.h&gt;</text:p>
      <text:p text:style-name="P4"/>
      <text:p text:style-name="P4">// Function to find the number of bits to convert integer a to integer b</text:p>
      <text:p text:style-name="P4">int find_bits(int a, int b)</text:p>
      <text:p text:style-name="P4">{</text:p>
      <text:p text:style-name="P4"><text:s text:c="4"/>// a ^ b sets bits to 1 where a and b differ</text:p>
      <text:p text:style-name="P4"><text:s text:c="4"/>int xor_result = a ^ b;</text:p>
      <text:p text:style-name="P4"><text:s text:c="4"/>int count = 0;</text:p>
      <text:p text:style-name="P4"/>
      <text:p text:style-name="P4"><text:s text:c="4"/>// Count the number of set bits (1s) in xor_result</text:p>
      <text:p text:style-name="P4"><text:s text:c="4"/>while (xor_result &gt; 0)</text:p>
      <text:p text:style-name="P4"><text:s text:c="4"/>{</text:p>
      <text:p text:style-name="P4"><text:s text:c="8"/>count += (xor_result &amp; 1); // Check if the last bit is 1</text:p>
      <text:p text:style-name="P4"><text:s text:c="8"/>xor_result &gt;&gt;= 1; <text:s text:c="9"/>// Shift right to check the next bit</text:p>
      <text:p text:style-name="P4"><text:s text:c="4"/>}</text:p>
      <text:p text:style-name="P4"/>
      <text:p text:style-name="P4"><text:s text:c="4"/>return count;</text:p>
      <text:p text:style-name="P4">}</text:p>
      <text:p text:style-name="P4"/>
      <text:p text:style-name="P4">int main(void)</text:p>
      <text:p text:style-name="P4">{</text:p>
      <text:p text:style-name="P4"><text:s text:c="4"/>int a = 2; // Binary: 010</text:p>
      <text:p text:style-name="P4"><text:s text:c="4"/>int b = 5; // Binary: 101</text:p>
      <text:p text:style-name="P4"><text:s text:c="4"/>// Differing bits: <text:s text:c="2"/>111 <text:s/>-&gt; 3 bits need to change</text:p>
      <text:p text:style-name="P4"/>
      <text:p text:style-name="P4"><text:s text:c="4"/>printf("Number of bits to convert: %d\n", find_bits(a, b));</text:p>
      <text:p text:style-name="P4"/>
      <text:p text:style-name="P4"><text:s text:c="4"/>return 0;</text:p>
      <text:p text:style-name="P4">}</text:p>
      <text:p text:style-name="P4"/>
      <text:p text:style-name="P49">Output:</text:p>
      <text:p text:style-name="P26">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1" svg:font-family="Arial" style:font-adornments="Regular" style:font-family-generic="swiss" style:font-pitch="variable"/>
    <style:font-face style:name="Calibri" svg:font-family="Calibri" style:font-family-generic="roman"/>
    <style:font-face style:name="Calibri1" svg:font-family="Calibri" style:font-family-generic="swiss"/>
    <style:font-face style:name="Calibri2" svg:font-family="Calibri" style:font-family-generic="system" style:font-pitch="variable"/>
    <style:font-face style:name="Courier New" svg:font-family="'Courier New'" style:font-family-generic="roman"/>
    <style:font-face style:name="Courier New1" svg:font-family="'Courier New'" style:font-family-generic="system" style:font-pitch="variable"/>
    <style:font-face style:name="Droid Sans Mono" svg:font-family="'Droid Sans Mono',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Calibri1"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1"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1"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family-generic="swis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style style:name="Contents_20_1" style:display-name="Contents 1" style:family="paragraph" style:class="index">
      <style:paragraph-properties fo:margin-left="0.044cm" fo:margin-right="0.041cm" fo:margin-top="0cm" fo:margin-bottom="0.268cm" style:contextual-spacing="false" fo:line-height="108%" fo:text-align="start" style:justify-single-word="false" fo:orphans="2" fo:widows="2" fo:hyphenation-ladder-count="no-limit" fo:text-indent="-0.018cm" style:auto-text-indent="false" style:writing-mode="lr-tb"/>
      <style:text-properties fo:color="#000000" loext:opacity="100%" style:font-name="Calibri" fo:font-family="Calibri" style:font-family-generic="roman" fo:font-size="11pt" fo:language="en" fo:country="IN" style:letter-kerning="false" style:font-name-asian="Calibri2" style:font-family-asian="Calibri" style:font-family-generic-asian="system" style:font-pitch-asian="variable" style:font-size-asian="11pt" style:language-asian="en" style:country-asian="IN"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next-style-name="Standard" style:default-outline-level="1" style:list-style-name="WWNum9" style:list-level="1" style:class="text">
      <style:paragraph-properties fo:margin-top="0cm" fo:margin-bottom="0.342cm" style:contextual-spacing="false" fo:line-height="110%" fo:text-align="start" style:justify-single-word="false" fo:keep-together="always" fo:orphans="2" fo:widows="2" fo:hyphenation-ladder-count="no-limit" fo:keep-with-next="always" style:writing-mode="lr-tb"/>
      <style:text-properties fo:color="#0070c0" loext:opacity="100%" style:font-name="Calibri" fo:font-family="Calibri" style:font-family-generic="roman" fo:font-size="14pt" fo:language="en" fo:country="IN" fo:font-weight="bold" style:letter-kerning="false" style:font-name-asian="Calibri2" style:font-family-asian="Calibri" style:font-family-generic-asian="system" style:font-pitch-asian="variable" style:font-size-asian="14pt" style:language-asian="en" style:country-asian="IN" style:font-weight-asian="bold"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next-style-name="Standard" style:default-outline-level="2" style:list-style-name="" style:class="text">
      <style:paragraph-properties fo:margin-left="0.018cm" fo:margin-top="0cm" fo:margin-bottom="0.325cm" style:contextual-spacing="false" fo:line-height="110%" fo:text-align="start" style:justify-single-word="false" fo:keep-together="always" fo:orphans="2" fo:widows="2" fo:hyphenation-ladder-count="no-limit" fo:text-indent="-0.018cm" style:auto-text-indent="false" fo:keep-with-next="always" style:writing-mode="lr-tb"/>
      <style:text-properties fo:color="#000000" loext:opacity="100%" style:font-name="Times New Roman" fo:font-family="'Times New Roman'" style:font-family-generic="roman" fo:font-size="11pt" fo:language="en" fo:country="IN" fo:font-weight="bold" style:letter-kerning="false" style:font-name-asian="Times New Roman1" style:font-family-asian="'Times New Roman'" style:font-family-generic-asian="system" style:font-pitch-asian="variable" style:font-size-asian="11pt" style:language-asian="en" style:country-asian="IN"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1.27cm" fo:margin-top="0cm" fo:margin-bottom="0.282cm" style:contextual-spacing="true"/>
    </style:style>
    <style:style style:name="Heading_20_3" style:display-name="Heading 3" style:family="paragraph" style:next-style-name="Standard" style:default-outline-level="3" style:list-style-name="" style:class="text">
      <style:paragraph-properties fo:margin-left="0.018cm" fo:margin-top="0cm" fo:margin-bottom="0.325cm" style:contextual-spacing="false" fo:line-height="110%" fo:text-align="start" style:justify-single-word="false" fo:keep-together="always" fo:orphans="2" fo:widows="2" fo:hyphenation-ladder-count="no-limit" fo:text-indent="-0.018cm" style:auto-text-indent="false" fo:keep-with-next="always" style:writing-mode="lr-tb"/>
      <style:text-properties fo:color="#000000" loext:opacity="100%" style:font-name="Times New Roman" fo:font-family="'Times New Roman'" style:font-family-generic="roman" fo:font-size="11pt" fo:language="en" fo:country="IN" fo:font-weight="bold" style:letter-kerning="false" style:font-name-asian="Times New Roman1" style:font-family-asian="'Times New Roman'" style:font-family-generic-asian="system" style:font-pitch-asian="variable" style:font-size-asian="11pt" style:language-asian="en" style:country-asian="IN"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Source_20_Text" style:display-name="Source Text" style:family="text">
      <style:text-properties style:font-name="Liberation Mono" fo:font-family="'Liberation Mono'" style:font-family-generic="roman"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 style:display-name="ListLabel 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3" style:display-name="ListLabel 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4" style:display-name="ListLabel 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5" style:display-name="ListLabel 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 style:display-name="ListLabel 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7" style:display-name="ListLabel 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8" style:display-name="ListLabel 8"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9" style:display-name="ListLabel 9"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0" style:display-name="ListLabel 10"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1" style:display-name="ListLabel 1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2" style:display-name="ListLabel 1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3" style:display-name="ListLabel 1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5" style:display-name="ListLabel 1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6" style:display-name="ListLabel 1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7" style:display-name="ListLabel 1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8" style:display-name="ListLabel 18"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9" style:display-name="ListLabel 19"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0" style:display-name="ListLabel 20"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1" style:display-name="ListLabel 2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2" style:display-name="ListLabel 2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3" style:display-name="ListLabel 2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4" style:display-name="ListLabel 2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5" style:display-name="ListLabel 2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6" style:display-name="ListLabel 2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7" style:display-name="ListLabel 2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4" style:display-name="ListLabel 6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28" style:display-name="ListLabel 28"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Arial" style:font-family-complex="Arial" style:font-family-generic-complex="system" style:font-pitch-complex="variable" style:font-size-complex="10pt"/>
    </style:style>
    <style:style style:name="ListLabel_20_29" style:display-name="ListLabel 29"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0" style:display-name="ListLabel 30"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1" style:display-name="ListLabel 31"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2" style:display-name="ListLabel 32"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3" style:display-name="ListLabel 33"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4" style:display-name="ListLabel 34"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5" style:display-name="ListLabel 35"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6" style:display-name="ListLabel 36"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7" style:display-name="ListLabel 3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38" style:display-name="ListLabel 3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39" style:display-name="ListLabel 3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0" style:display-name="ListLabel 4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1" style:display-name="ListLabel 4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2" style:display-name="ListLabel 4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3" style:display-name="ListLabel 4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4" style:display-name="ListLabel 44"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5" style:display-name="ListLabel 45"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6" style:display-name="ListLabel 46"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47" style:display-name="ListLabel 4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8" style:display-name="ListLabel 4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9" style:display-name="ListLabel 4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0" style:display-name="ListLabel 5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1" style:display-name="ListLabel 5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2" style:display-name="ListLabel 5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3" style:display-name="ListLabel 5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4" style:display-name="ListLabel 54"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5" style:display-name="ListLabel 55"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56" style:display-name="ListLabel 56"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7" style:display-name="ListLabel 5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8" style:display-name="ListLabel 5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9" style:display-name="ListLabel 5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0" style:display-name="ListLabel 6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1" style:display-name="ListLabel 6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2" style:display-name="ListLabel 6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3" style:display-name="ListLabel 6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margin-left="0.388cm"/>
        </style:list-level-properties>
      </text:list-level-style-number>
      <text:list-level-style-number text:level="2" text:style-name="ListLabel_20_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margin-left="0.635cm"/>
        </style:list-level-properties>
      </text:list-level-style-number>
      <text:list-level-style-number text:level="2" text:style-name="ListLabel_20_11"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12"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14"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15"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17"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18"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margin-left="0.42cm"/>
        </style:list-level-properties>
      </text:list-level-style-number>
      <text:list-level-style-number text:level="2" text:style-name="ListLabel_20_20"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21"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23"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24"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26"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27"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57"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58"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59"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60"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61"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62"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63"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8T19:37:39.543661209</meta:creation-date>
    <dc:date>2026-03-18T20:05:56.446193997</dc:date>
    <meta:editing-duration>PT28M17S</meta:editing-duration>
    <meta:editing-cycles>1</meta:editing-cycles>
    <meta:generator>LibreOffice/24.2.7.2$Linux_X86_64 LibreOffice_project/420$Build-2</meta:generator>
    <meta:document-statistic meta:table-count="2" meta:image-count="5" meta:object-count="0" meta:page-count="106" meta:paragraph-count="2447" meta:word-count="16070" meta:character-count="96181" meta:non-whitespace-character-count="78836"/>
  </office:meta>
</office:document-meta>
</file>