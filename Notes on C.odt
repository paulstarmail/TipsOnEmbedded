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51000001CFE97EAF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7.053cm" fo:margin-left="-0.053cm" fo:margin-top="0cm" fo:margin-bottom="0cm" table:align="left" style:writing-mode="page"/>
    </style:style>
    <style:style style:name="Table2.A" style:family="table-column">
      <style:table-column-properties style:column-width="2.471cm"/>
    </style:style>
    <style:style style:name="Table2.B" style:family="table-column">
      <style:table-column-properties style:column-width="7.338cm"/>
    </style:style>
    <style:style style:name="Table2.C" style:family="table-column">
      <style:table-column-properties style:column-width="7.244cm"/>
    </style:style>
    <style:style style:name="Table2.1" style:family="table-row">
      <style:table-row-properties style:min-row-height="1.632cm" fo:keep-together="auto"/>
    </style:style>
    <style:style style:name="Table2.A1" style:family="table-cell">
      <style:table-cell-properties style:vertical-align="bottom" fo:padding-left="0.053cm" fo:padding-right="0.053cm" fo:padding-top="0cm" fo:padding-bottom="0cm" fo:border="none"/>
    </style:style>
    <style:style style:name="Table2.4" style:family="table-row">
      <style:table-row-properties style:min-row-height="2.027cm" fo:keep-together="auto"/>
    </style:style>
    <style:style style:name="P1" style:family="paragraph" style:parent-style-name="Footer">
      <style:paragraph-properties fo:text-align="center" style:justify-single-word="false"/>
    </style:style>
    <style:style style:name="P2" style:family="paragraph" style:parent-style-name="Code">
      <style:text-properties officeooo:paragraph-rsid="0023ad4f"/>
    </style:style>
    <style:style style:name="P3" style:family="paragraph" style:parent-style-name="Code">
      <style:text-properties officeooo:paragraph-rsid="00289710"/>
    </style:style>
    <style:style style:name="P4" style:family="paragraph" style:parent-style-name="Code">
      <style:text-properties officeooo:paragraph-rsid="002b21fe"/>
    </style:style>
    <style:style style:name="P5" style:family="paragraph" style:parent-style-name="Code">
      <style:text-properties officeooo:paragraph-rsid="002bae83"/>
    </style:style>
    <style:style style:name="P6" style:family="paragraph" style:parent-style-name="Code">
      <style:text-properties officeooo:paragraph-rsid="002c239e"/>
    </style:style>
    <style:style style:name="P7" style:family="paragraph" style:parent-style-name="Code">
      <style:text-properties officeooo:paragraph-rsid="0030a831"/>
    </style:style>
    <style:style style:name="P8" style:family="paragraph" style:parent-style-name="Code">
      <style:text-properties officeooo:paragraph-rsid="0032e10b"/>
    </style:style>
    <style:style style:name="P9" style:family="paragraph" style:parent-style-name="Code">
      <style:text-properties officeooo:paragraph-rsid="003657d3"/>
    </style:style>
    <style:style style:name="P10" style:family="paragraph" style:parent-style-name="Code">
      <style:text-properties officeooo:rsid="004de7aa" officeooo:paragraph-rsid="004de7aa"/>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paragraph-rsid="00268623" style:font-weight-asian="bold" style:font-weight-complex="bold"/>
    </style:style>
    <style:style style:name="P13" style:family="paragraph" style:parent-style-name="Standard">
      <style:text-properties fo:font-weight="bold" officeooo:paragraph-rsid="0042aa04" style:font-weight-asian="bold" style:font-weight-complex="bold"/>
    </style:style>
    <style:style style:name="P14" style:family="paragraph" style:parent-style-name="Standard">
      <style:text-properties fo:font-weight="bold" officeooo:paragraph-rsid="00498978" style:font-weight-asian="bold" style:font-weight-complex="bold"/>
    </style:style>
    <style:style style:name="P15" style:family="paragraph" style:parent-style-name="Standard">
      <style:text-properties fo:font-weight="bold" officeooo:paragraph-rsid="004f0309" style:font-weight-asian="bold" style:font-weight-complex="bold"/>
    </style:style>
    <style:style style:name="P16" style:family="paragraph" style:parent-style-name="Standard">
      <style:text-properties fo:font-weight="bold" officeooo:paragraph-rsid="0056c6b3" style:font-weight-asian="bold" style:font-weight-complex="bold"/>
    </style:style>
    <style:style style:name="P17" style:family="paragraph" style:parent-style-name="Standard">
      <style:text-properties fo:font-weight="bold" officeooo:paragraph-rsid="00601e06" style:font-weight-asian="bold" style:font-weight-complex="bold"/>
    </style:style>
    <style:style style:name="P18" style:family="paragraph" style:parent-style-name="Standard">
      <style:text-properties fo:font-weight="bold" officeooo:paragraph-rsid="006d4aa7" style:font-weight-asian="bold" style:font-weight-complex="bold"/>
    </style:style>
    <style:style style:name="P19" style:family="paragraph" style:parent-style-name="Standard">
      <style:text-properties fo:font-weight="bold" officeooo:paragraph-rsid="00815bc4" style:font-weight-asian="bold" style:font-weight-complex="bold"/>
    </style:style>
    <style:style style:name="P20" style:family="paragraph" style:parent-style-name="Standard">
      <style:text-properties fo:font-weight="bold" officeooo:paragraph-rsid="0082ecad" style:font-weight-asian="bold" style:font-weight-complex="bold"/>
    </style:style>
    <style:style style:name="P21" style:family="paragraph" style:parent-style-name="Standard">
      <style:text-properties fo:font-weight="bold" officeooo:paragraph-rsid="009598ab" style:font-weight-asian="bold" style:font-weight-complex="bold"/>
    </style:style>
    <style:style style:name="P22" style:family="paragraph" style:parent-style-name="Standard">
      <style:text-properties fo:font-weight="bold" officeooo:paragraph-rsid="00968c06" style:font-weight-asian="bold" style:font-weight-complex="bold"/>
    </style:style>
    <style:style style:name="P23" style:family="paragraph" style:parent-style-name="Standard">
      <style:text-properties fo:font-weight="bold" officeooo:paragraph-rsid="00b08e0d" style:font-weight-asian="bold" style:font-weight-complex="bold"/>
    </style:style>
    <style:style style:name="P24" style:family="paragraph" style:parent-style-name="Standard">
      <style:text-properties fo:font-weight="bold" officeooo:paragraph-rsid="00b6cafb" style:font-weight-asian="bold" style:font-weight-complex="bold"/>
    </style:style>
    <style:style style:name="P25" style:family="paragraph" style:parent-style-name="Standard">
      <style:text-properties fo:font-weight="bold" officeooo:paragraph-rsid="00b82574" style:font-weight-asian="bold" style:font-weight-complex="bold"/>
    </style:style>
    <style:style style:name="P26" style:family="paragraph" style:parent-style-name="Standard">
      <style:text-properties fo:font-weight="bold" officeooo:paragraph-rsid="00ba62b9" style:font-weight-asian="bold" style:font-weight-complex="bold"/>
    </style:style>
    <style:style style:name="P27" style:family="paragraph" style:parent-style-name="Standard">
      <style:text-properties fo:font-weight="bold" officeooo:paragraph-rsid="00c77d66" style:font-weight-asian="bold" style:font-weight-complex="bold"/>
    </style:style>
    <style:style style:name="P28" style:family="paragraph" style:parent-style-name="Standard">
      <style:text-properties fo:font-weight="bold" officeooo:paragraph-rsid="00c9620a" style:font-weight-asian="bold" style:font-weight-complex="bold"/>
    </style:style>
    <style:style style:name="P29" style:family="paragraph" style:parent-style-name="Standard">
      <style:text-properties fo:font-weight="bold" officeooo:paragraph-rsid="00d6eb36" style:font-weight-asian="bold" style:font-weight-complex="bold"/>
    </style:style>
    <style:style style:name="P30" style:family="paragraph" style:parent-style-name="Standard">
      <style:text-properties fo:font-weight="bold" officeooo:paragraph-rsid="00d8260a" style:font-weight-asian="bold" style:font-weight-complex="bold"/>
    </style:style>
    <style:style style:name="P31" style:family="paragraph" style:parent-style-name="Standard">
      <style:text-properties fo:font-weight="bold" officeooo:paragraph-rsid="00ea4b17" style:font-weight-asian="bold" style:font-weight-complex="bold"/>
    </style:style>
    <style:style style:name="P32" style:family="paragraph" style:parent-style-name="Standard">
      <style:text-properties fo:font-weight="bold" officeooo:paragraph-rsid="00ed6987" style:font-weight-asian="bold" style:font-weight-complex="bold"/>
    </style:style>
    <style:style style:name="P33" style:family="paragraph" style:parent-style-name="Standard">
      <style:text-properties fo:font-weight="bold" officeooo:paragraph-rsid="0089152d" style:font-weight-asian="bold" style:font-weight-complex="bold"/>
    </style:style>
    <style:style style:name="P34" style:family="paragraph" style:parent-style-name="Standard">
      <style:text-properties fo:font-weight="bold" officeooo:paragraph-rsid="00aa39aa" style:font-weight-asian="bold" style:font-weight-complex="bold"/>
    </style:style>
    <style:style style:name="P35" style:family="paragraph" style:parent-style-name="Standard">
      <style:text-properties fo:font-weight="bold" officeooo:paragraph-rsid="00d52700" style:font-weight-asian="bold" style:font-weight-complex="bold"/>
    </style:style>
    <style:style style:name="P36" style:family="paragraph" style:parent-style-name="Standard">
      <style:text-properties fo:font-weight="bold" officeooo:rsid="010c7eb9" officeooo:paragraph-rsid="010c7eb9" style:font-weight-asian="bold" style:font-weight-complex="bold"/>
    </style:style>
    <style:style style:name="P37" style:family="paragraph" style:parent-style-name="Standard">
      <style:paragraph-properties fo:text-align="center" style:justify-single-word="false"/>
      <style:text-properties style:font-name="Courier New" fo:font-size="36pt" fo:font-weight="bold" style:font-size-asian="36pt" style:font-weight-asian="bold" style:font-size-complex="36pt" style:font-weight-complex="bold"/>
    </style:style>
    <style:style style:name="P38" style:family="paragraph" style:parent-style-name="Standard">
      <style:text-properties style:font-name="Courier New" fo:font-weight="bold" style:font-weight-asian="bold" style:font-weight-complex="bold"/>
    </style:style>
    <style:style style:name="P39" style:family="paragraph" style:parent-style-name="Standard">
      <style:text-properties officeooo:paragraph-rsid="001736d5"/>
    </style:style>
    <style:style style:name="P40" style:family="paragraph" style:parent-style-name="Standard">
      <style:text-properties officeooo:paragraph-rsid="0019eebc"/>
    </style:style>
    <style:style style:name="P41" style:family="paragraph" style:parent-style-name="Standard">
      <style:text-properties officeooo:paragraph-rsid="003a5881"/>
    </style:style>
    <style:style style:name="P42" style:family="paragraph" style:parent-style-name="Standard">
      <style:text-properties officeooo:paragraph-rsid="0041141d"/>
    </style:style>
    <style:style style:name="P43" style:family="paragraph" style:parent-style-name="Code">
      <style:text-properties officeooo:paragraph-rsid="00a08c4b"/>
    </style:style>
    <style:style style:name="P44" style:family="paragraph" style:parent-style-name="Standard">
      <style:text-properties officeooo:paragraph-rsid="00a08c4b"/>
    </style:style>
    <style:style style:name="P45" style:family="paragraph" style:parent-style-name="Code">
      <style:text-properties officeooo:paragraph-rsid="00a536f4"/>
    </style:style>
    <style:style style:name="P46" style:family="paragraph" style:parent-style-name="Code">
      <style:text-properties officeooo:paragraph-rsid="00bb4697"/>
    </style:style>
    <style:style style:name="P47" style:family="paragraph" style:parent-style-name="Code">
      <style:text-properties officeooo:paragraph-rsid="00c77d66"/>
    </style:style>
    <style:style style:name="P48" style:family="paragraph" style:parent-style-name="Code">
      <style:text-properties officeooo:paragraph-rsid="00d2f585"/>
    </style:style>
    <style:style style:name="P49" style:family="paragraph" style:parent-style-name="Code">
      <style:text-properties officeooo:paragraph-rsid="00d47168"/>
    </style:style>
    <style:style style:name="P50" style:family="paragraph" style:parent-style-name="Code">
      <style:text-properties officeooo:paragraph-rsid="00e992d0"/>
    </style:style>
    <style:style style:name="P51" style:family="paragraph" style:parent-style-name="Code">
      <style:text-properties officeooo:paragraph-rsid="00ea4b17"/>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Standard">
      <style:text-properties fo:font-weight="normal" style:font-weight-asian="normal" style:font-weight-complex="normal"/>
    </style:style>
    <style:style style:name="P54" style:family="paragraph" style:parent-style-name="Standard">
      <style:text-properties officeooo:paragraph-rsid="007cc465"/>
    </style:style>
    <style:style style:name="P55" style:family="paragraph" style:parent-style-name="Standard">
      <style:text-properties officeooo:paragraph-rsid="0089152d"/>
    </style:style>
    <style:style style:name="P56" style:family="paragraph" style:parent-style-name="Standard">
      <style:text-properties officeooo:paragraph-rsid="008dff10"/>
    </style:style>
    <style:style style:name="P57" style:family="paragraph" style:parent-style-name="Standard">
      <style:text-properties officeooo:paragraph-rsid="009598ab"/>
    </style:style>
    <style:style style:name="P58" style:family="paragraph" style:parent-style-name="Standard">
      <style:text-properties officeooo:paragraph-rsid="00a2a0e8"/>
    </style:style>
    <style:style style:name="P59" style:family="paragraph" style:parent-style-name="Standard">
      <style:text-properties officeooo:paragraph-rsid="00aa39aa"/>
    </style:style>
    <style:style style:name="P60" style:family="paragraph" style:parent-style-name="Standard">
      <style:text-properties officeooo:paragraph-rsid="00b08e0d"/>
    </style:style>
    <style:style style:name="P61" style:family="paragraph" style:parent-style-name="Standard">
      <style:text-properties officeooo:paragraph-rsid="00b3ef8a"/>
    </style:style>
    <style:style style:name="P62" style:family="paragraph" style:parent-style-name="Standard">
      <style:text-properties officeooo:paragraph-rsid="00bedaf4"/>
    </style:style>
    <style:style style:name="P63" style:family="paragraph" style:parent-style-name="Standard">
      <style:text-properties officeooo:paragraph-rsid="00c9620a"/>
    </style:style>
    <style:style style:name="P64" style:family="paragraph" style:parent-style-name="Standard">
      <style:text-properties officeooo:paragraph-rsid="00d52700"/>
    </style:style>
    <style:style style:name="P65" style:family="paragraph" style:parent-style-name="Code">
      <style:text-properties officeooo:paragraph-rsid="00f4d0c8"/>
    </style:style>
    <style:style style:name="P66" style:family="paragraph" style:parent-style-name="Code">
      <style:text-properties officeooo:paragraph-rsid="00f66935"/>
    </style:style>
    <style:style style:name="P67" style:family="paragraph" style:parent-style-name="Code">
      <style:text-properties officeooo:paragraph-rsid="00fb6cd6"/>
    </style:style>
    <style:style style:name="P68" style:family="paragraph" style:parent-style-name="Code">
      <style:text-properties officeooo:paragraph-rsid="00fc42a4"/>
    </style:style>
    <style:style style:name="P69" style:family="paragraph" style:parent-style-name="Code">
      <style:text-properties officeooo:paragraph-rsid="00fdeddb"/>
    </style:style>
    <style:style style:name="P70" style:family="paragraph" style:parent-style-name="Code">
      <style:text-properties officeooo:paragraph-rsid="00ffc8b8"/>
    </style:style>
    <style:style style:name="P71" style:family="paragraph" style:parent-style-name="Code">
      <style:text-properties officeooo:paragraph-rsid="01003942"/>
    </style:style>
    <style:style style:name="P72" style:family="paragraph" style:parent-style-name="Code">
      <style:text-properties officeooo:paragraph-rsid="010156bf"/>
    </style:style>
    <style:style style:name="P73" style:family="paragraph" style:parent-style-name="Code">
      <style:text-properties officeooo:paragraph-rsid="0106109b"/>
    </style:style>
    <style:style style:name="P74" style:family="paragraph" style:parent-style-name="Code">
      <style:text-properties officeooo:rsid="010c7eb9" officeooo:paragraph-rsid="010c7eb9"/>
    </style:style>
    <style:style style:name="P75" style:family="paragraph" style:parent-style-name="Standard">
      <style:text-properties officeooo:rsid="010c7eb9" officeooo:paragraph-rsid="010c7eb9"/>
    </style:style>
    <style:style style:name="P76" style:family="paragraph" style:parent-style-name="Code">
      <style:text-properties officeooo:paragraph-rsid="010c7eb9"/>
    </style:style>
    <style:style style:name="P77" style:family="paragraph" style:parent-style-name="Code">
      <style:text-properties officeooo:paragraph-rsid="011144dc"/>
    </style:style>
    <style:style style:name="P78" style:family="paragraph" style:parent-style-name="Contents_20_1">
      <style:paragraph-properties>
        <style:tab-stops>
          <style:tab-stop style:position="16.999cm" style:type="right" style:leader-style="dotted" style:leader-text="."/>
        </style:tab-stops>
      </style:paragraph-properties>
    </style:style>
    <style:style style:name="P79" style:family="paragraph" style:parent-style-name="Section">
      <style:text-properties officeooo:paragraph-rsid="001f7f42"/>
    </style:style>
    <style:style style:name="P80" style:family="paragraph" style:parent-style-name="Section">
      <style:text-properties officeooo:paragraph-rsid="003e9d92"/>
    </style:style>
    <style:style style:name="P81" style:family="paragraph" style:parent-style-name="Section">
      <style:text-properties officeooo:rsid="00f2a995" officeooo:paragraph-rsid="00fb6cd6"/>
    </style:style>
    <style:style style:name="P82" style:family="paragraph" style:parent-style-name="Section">
      <style:text-properties officeooo:rsid="00f66935" officeooo:paragraph-rsid="00f66935"/>
    </style:style>
    <style:style style:name="P83" style:family="paragraph" style:parent-style-name="Section">
      <style:text-properties officeooo:rsid="00f8d019" officeooo:paragraph-rsid="00f8d019"/>
    </style:style>
    <style:style style:name="P84" style:family="paragraph" style:parent-style-name="Section">
      <style:text-properties officeooo:rsid="010156bf" officeooo:paragraph-rsid="010156bf"/>
    </style:style>
    <style:style style:name="P85" style:family="paragraph" style:parent-style-name="Section">
      <style:text-properties officeooo:rsid="0106109b" officeooo:paragraph-rsid="0106109b"/>
    </style:style>
    <style:style style:name="P86" style:family="paragraph" style:parent-style-name="Standard" style:list-style-name="L1"/>
    <style:style style:name="P87" style:family="paragraph" style:parent-style-name="Standard" style:list-style-name="L1">
      <style:text-properties officeooo:paragraph-rsid="003e9d92"/>
    </style:style>
    <style:style style:name="P88" style:family="paragraph" style:parent-style-name="Standard" style:list-style-name="L2">
      <style:text-properties style:font-name="Courier New" fo:font-weight="bold" style:font-weight-asian="bold" style:font-weight-complex="bold"/>
    </style:style>
    <style:style style:name="P89" style:family="paragraph" style:parent-style-name="Standard" style:list-style-name="L4">
      <style:text-properties style:font-name="Courier New" fo:font-weight="bold" style:font-weight-asian="bold" style:font-weight-complex="bold"/>
    </style:style>
    <style:style style:name="P90" style:family="paragraph" style:parent-style-name="Standard" style:list-style-name="L3"/>
    <style:style style:name="P91" style:family="paragraph" style:parent-style-name="Standard" style:list-style-name="L3">
      <style:text-properties officeooo:paragraph-rsid="007cc465"/>
    </style:style>
    <style:style style:name="P92" style:family="paragraph" style:parent-style-name="Standard" style:list-style-name="L5">
      <style:text-properties fo:font-weight="bold" style:font-weight-asian="bold" style:font-weight-complex="bold"/>
    </style:style>
    <style:style style:name="P93" style:family="paragraph" style:parent-style-name="Standard" style:list-style-name="L6">
      <style:text-properties fo:font-weight="bold" style:font-weight-asian="bold" style:font-weight-complex="bold"/>
    </style:style>
    <style:style style:name="P94" style:family="paragraph" style:parent-style-name="Standard" style:list-style-name="L7"/>
    <style:style style:name="T1" style:family="text">
      <style:text-properties officeooo:rsid="0019eebc"/>
    </style:style>
    <style:style style:name="T2" style:family="text">
      <style:text-properties style:font-name="Courier New"/>
    </style:style>
    <style:style style:name="T3" style:family="text">
      <style:text-properties style:font-name="Courier New"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958798" style:font-weight-asian="bold" style:font-weight-complex="bold"/>
    </style:style>
    <style:style style:name="T6" style:family="text">
      <style:text-properties fo:font-weight="bold" officeooo:rsid="00b08e0d" style:font-weight-asian="bold" style:font-weight-complex="bold"/>
    </style:style>
    <style:style style:name="T7" style:family="text">
      <style:text-properties officeooo:rsid="00772bb6"/>
    </style:style>
    <style:style style:name="T8" style:family="text">
      <style:text-properties officeooo:rsid="00796c2b"/>
    </style:style>
    <style:style style:name="T9" style:family="text">
      <style:text-properties officeooo:rsid="007cc465"/>
    </style:style>
    <style:style style:name="T10" style:family="text">
      <style:text-properties officeooo:rsid="00a39645"/>
    </style:style>
    <style:style style:name="T11" style:family="text">
      <style:text-properties officeooo:rsid="00a8b83c"/>
    </style:style>
    <style:style style:name="T12" style:family="text">
      <style:text-properties officeooo:rsid="00a96599"/>
    </style:style>
    <style:style style:name="T13" style:family="text">
      <style:text-properties officeooo:rsid="00aa39aa"/>
    </style:style>
    <style:style style:name="T14" style:family="text">
      <style:text-properties officeooo:rsid="00abfa1b"/>
    </style:style>
    <style:style style:name="T15" style:family="text">
      <style:text-properties officeooo:rsid="00d8260a"/>
    </style:style>
    <style:style style:name="T16" style:family="text">
      <style:text-properties officeooo:rsid="00f4d0c8"/>
    </style:style>
    <style:style style:name="T17" style:family="text">
      <style:text-properties officeooo:rsid="00f79bd0"/>
    </style:style>
    <style:style style:name="T18" style:family="text">
      <style:text-properties officeooo:rsid="00f8d019"/>
    </style:style>
    <style:style style:name="T19" style:family="text">
      <style:text-properties officeooo:rsid="00facc4a"/>
    </style:style>
    <style:style style:name="T20" style:family="text">
      <style:text-properties officeooo:rsid="010156bf"/>
    </style:style>
    <style:style style:name="T21" style:family="text">
      <style:text-properties officeooo:rsid="0103cf4a"/>
    </style:style>
    <style:style style:name="T22" style:family="text">
      <style:text-properties officeooo:rsid="010c7eb9"/>
    </style:style>
    <style:style style:name="T23" style:family="text">
      <style:text-properties officeooo:rsid="010e95c2"/>
    </style:style>
    <style:style style:name="T24" style:family="text">
      <style:text-properties officeooo:rsid="010ef18d"/>
    </style:style>
    <style:style style:name="T25" style:family="text">
      <style:text-properties officeooo:rsid="011144dc"/>
    </style:style>
    <style:style style:name="T26" style:family="text">
      <style:text-properties officeooo:rsid="011396ad"/>
    </style:style>
    <style:style style:name="T27" style:family="text">
      <style:text-properties officeooo:rsid="0115408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37"/>
      <text:p text:style-name="P37"/>
      <text:p text:style-name="P37"/>
      <text:p text:style-name="P37"/>
      <text:p text:style-name="P37"/>
      <text:p text:style-name="P37">Notes on 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ection"/>
          </text:index-source-styles>
        </text:table-of-content-source>
        <text:index-body>
          <text:index-title text:style-name="Sect1" text:name="Table of Contents1_Head" text:protected="true">
            <text:p text:style-name="Contents_20_Heading">Table of Contents</text:p>
          </text:index-title>
          <text:p text:style-name="P78"><text:a xlink:type="simple" xlink:href="#__RefHeading___Toc12733_2206932868" text:style-name="Index_20_Link" text:visited-style-name="Index_20_Link">1. Pointer and memory<text:tab/>4</text:a></text:p>
          <text:p text:style-name="P78"><text:a xlink:type="simple" xlink:href="#__RefHeading___Toc12867_2206932868" text:style-name="Index_20_Link" text:visited-style-name="Index_20_Link">2. Variadic functions<text:tab/>4</text:a></text:p>
          <text:p text:style-name="P78"><text:a xlink:type="simple" xlink:href="#__RefHeading___Toc12865_2206932868" text:style-name="Index_20_Link" text:visited-style-name="Index_20_Link">3. Pointers and Local variables in functions<text:tab/>5</text:a></text:p>
          <text:p text:style-name="P78"><text:a xlink:type="simple" xlink:href="#__RefHeading___Toc12863_2206932868" text:style-name="Index_20_Link" text:visited-style-name="Index_20_Link">4. Ternary operator<text:tab/>7</text:a></text:p>
          <text:p text:style-name="P78"><text:a xlink:type="simple" xlink:href="#__RefHeading___Toc12861_2206932868" text:style-name="Index_20_Link" text:visited-style-name="Index_20_Link">5. Terminating a program using exit() while inside a function without return type<text:tab/>7</text:a></text:p>
          <text:p text:style-name="P78"><text:a xlink:type="simple" xlink:href="#__RefHeading___Toc12859_2206932868" text:style-name="Index_20_Link" text:visited-style-name="Index_20_Link">6. Structure Packing and Padding<text:tab/>8</text:a></text:p>
          <text:p text:style-name="P78"><text:a xlink:type="simple" xlink:href="#__RefHeading___Toc12857_2206932868" text:style-name="Index_20_Link" text:visited-style-name="Index_20_Link">7. Arguments and Options<text:tab/>8</text:a></text:p>
          <text:p text:style-name="P78"><text:a xlink:type="simple" xlink:href="#__RefHeading___Toc12855_2206932868" text:style-name="Index_20_Link" text:visited-style-name="Index_20_Link">8. Memory Mapping an SFR<text:tab/>10</text:a></text:p>
          <text:p text:style-name="P78"><text:a xlink:type="simple" xlink:href="#__RefHeading___Toc12853_2206932868" text:style-name="Index_20_Link" text:visited-style-name="Index_20_Link">9. Convert Hexadecimal to Binary<text:tab/>10</text:a></text:p>
          <text:p text:style-name="P78"><text:a xlink:type="simple" xlink:href="#__RefHeading___Toc12851_2206932868" text:style-name="Index_20_Link" text:visited-style-name="Index_20_Link">10. Convert Byte to Binary<text:tab/>11</text:a></text:p>
          <text:p text:style-name="P78"><text:a xlink:type="simple" xlink:href="#__RefHeading___Toc12849_2206932868" text:style-name="Index_20_Link" text:visited-style-name="Index_20_Link">11. How does free() know the size of memory to be deallocated?<text:tab/>11</text:a></text:p>
          <text:p text:style-name="P78"><text:a xlink:type="simple" xlink:href="#__RefHeading___Toc12847_2206932868" text:style-name="Index_20_Link" text:visited-style-name="Index_20_Link">12. Setter and Getter Functions<text:tab/>12</text:a></text:p>
          <text:p text:style-name="P78"><text:a xlink:type="simple" xlink:href="#__RefHeading___Toc12845_2206932868" text:style-name="Index_20_Link" text:visited-style-name="Index_20_Link">13. Interrupt Handling in Microcontroller<text:tab/>12</text:a></text:p>
          <text:p text:style-name="P78"><text:a xlink:type="simple" xlink:href="#__RefHeading___Toc12843_2206932868" text:style-name="Index_20_Link" text:visited-style-name="Index_20_Link">14. Bit rate vs Baud rate<text:tab/>12</text:a></text:p>
          <text:p text:style-name="P78"><text:a xlink:type="simple" xlink:href="#__RefHeading___Toc12841_2206932868" text:style-name="Index_20_Link" text:visited-style-name="Index_20_Link">15. Static vs Global variables<text:tab/>12</text:a></text:p>
          <text:p text:style-name="P78"><text:a xlink:type="simple" xlink:href="#__RefHeading___Toc12839_2206932868" text:style-name="Index_20_Link" text:visited-style-name="Index_20_Link">16. memset() function<text:tab/>13</text:a></text:p>
          <text:p text:style-name="P78"><text:a xlink:type="simple" xlink:href="#__RefHeading___Toc12837_2206932868" text:style-name="Index_20_Link" text:visited-style-name="Index_20_Link">17. Dangling pointer<text:tab/>15</text:a></text:p>
          <text:p text:style-name="P78"><text:a xlink:type="simple" xlink:href="#__RefHeading___Toc12835_2206932868" text:style-name="Index_20_Link" text:visited-style-name="Index_20_Link">18. Void pointer<text:tab/>15</text:a></text:p>
          <text:p text:style-name="P78"><text:a xlink:type="simple" xlink:href="#__RefHeading___Toc12833_2206932868" text:style-name="Index_20_Link" text:visited-style-name="Index_20_Link">19. NULL Pointer<text:tab/>16</text:a></text:p>
          <text:p text:style-name="P78"><text:a xlink:type="simple" xlink:href="#__RefHeading___Toc12831_2206932868" text:style-name="Index_20_Link" text:visited-style-name="Index_20_Link">20. Wild pointer<text:tab/>17</text:a></text:p>
          <text:p text:style-name="P78"><text:a xlink:type="simple" xlink:href="#__RefHeading___Toc12829_2206932868" text:style-name="Index_20_Link" text:visited-style-name="Index_20_Link">21. Double Pointer (Pointer to Pointer)<text:tab/>17</text:a></text:p>
          <text:p text:style-name="P78"><text:a xlink:type="simple" xlink:href="#__RefHeading___Toc18486_660237004" text:style-name="Index_20_Link" text:visited-style-name="Index_20_Link">22. Call by reference function<text:tab/>18</text:a></text:p>
          <text:p text:style-name="P78"><text:a xlink:type="simple" xlink:href="#__RefHeading___Toc12827_2206932868" text:style-name="Index_20_Link" text:visited-style-name="Index_20_Link">23. Call by value function<text:tab/>19</text:a></text:p>
          <text:p text:style-name="P78"><text:a xlink:type="simple" xlink:href="#__RefHeading___Toc12825_2206932868" text:style-name="Index_20_Link" text:visited-style-name="Index_20_Link">24. volatile and const volatile keyword<text:tab/>20</text:a></text:p>
          <text:p text:style-name="P78"><text:a xlink:type="simple" xlink:href="#__RefHeading___Toc12823_2206932868" text:style-name="Index_20_Link" text:visited-style-name="Index_20_Link">25. static extern is invalid<text:tab/>20</text:a></text:p>
          <text:p text:style-name="P78"><text:a xlink:type="simple" xlink:href="#__RefHeading___Toc12821_2206932868" text:style-name="Index_20_Link" text:visited-style-name="Index_20_Link">26. inline Function<text:tab/>20</text:a></text:p>
          <text:p text:style-name="P78"><text:a xlink:type="simple" xlink:href="#__RefHeading___Toc12819_2206932868" text:style-name="Index_20_Link" text:visited-style-name="Index_20_Link">27. Storage class<text:tab/>21</text:a></text:p>
          <text:p text:style-name="P78"><text:a xlink:type="simple" xlink:href="#__RefHeading___Toc12817_2206932868" text:style-name="Index_20_Link" text:visited-style-name="Index_20_Link">28. Structure declaration and definition<text:tab/>24</text:a></text:p>
          <text:p text:style-name="P78"><text:a xlink:type="simple" xlink:href="#__RefHeading___Toc12815_2206932868" text:style-name="Index_20_Link" text:visited-style-name="Index_20_Link">29. typedef and struct<text:tab/>25</text:a></text:p>
          <text:p text:style-name="P78"><text:a xlink:type="simple" xlink:href="#__RefHeading___Toc12813_2206932868" text:style-name="Index_20_Link" text:visited-style-name="Index_20_Link">30. Passing structure to function<text:tab/>25</text:a></text:p>
          <text:p text:style-name="P78"><text:a xlink:type="simple" xlink:href="#__RefHeading___Toc12811_2206932868" text:style-name="Index_20_Link" text:visited-style-name="Index_20_Link">31. Static Function<text:tab/>27</text:a></text:p>
          <text:p text:style-name="P78"><text:a xlink:type="simple" xlink:href="#__RefHeading___Toc12809_2206932868" text:style-name="Index_20_Link" text:visited-style-name="Index_20_Link">32. Type casting<text:tab/>28</text:a></text:p>
          <text:p text:style-name="P78"><text:a xlink:type="simple" xlink:href="#__RefHeading___Toc12807_2206932868" text:style-name="Index_20_Link" text:visited-style-name="Index_20_Link">33. Integer Promotion<text:tab/>29</text:a></text:p>
          <text:p text:style-name="P78"><text:a xlink:type="simple" xlink:href="#__RefHeading___Toc12805_2206932868" text:style-name="Index_20_Link" text:visited-style-name="Index_20_Link">34. Dynamic Memory Allocation<text:tab/>30</text:a></text:p>
          <text:p text:style-name="P78"><text:a xlink:type="simple" xlink:href="#__RefHeading___Toc12803_2206932868" text:style-name="Index_20_Link" text:visited-style-name="Index_20_Link">35. Union<text:tab/>34</text:a></text:p>
          <text:p text:style-name="P78"><text:a xlink:type="simple" xlink:href="#__RefHeading___Toc12801_2206932868" text:style-name="Index_20_Link" text:visited-style-name="Index_20_Link">36. Linked List<text:tab/>36</text:a></text:p>
          <text:p text:style-name="P78"><text:a xlink:type="simple" xlink:href="#__RefHeading___Toc12799_2206932868" text:style-name="Index_20_Link" text:visited-style-name="Index_20_Link">37. Splitting a string using strtok()<text:tab/>39</text:a></text:p>
          <text:p text:style-name="P78"><text:a xlink:type="simple" xlink:href="#__RefHeading___Toc12797_2206932868" text:style-name="Index_20_Link" text:visited-style-name="Index_20_Link">38. Pointer to Structure<text:tab/>40</text:a></text:p>
          <text:p text:style-name="P78"><text:a xlink:type="simple" xlink:href="#__RefHeading___Toc12795_2206932868" text:style-name="Index_20_Link" text:visited-style-name="Index_20_Link">39. Easy way to find the number of elements in an array<text:tab/>40</text:a></text:p>
          <text:p text:style-name="P78"><text:a xlink:type="simple" xlink:href="#__RefHeading___Toc12793_2206932868" text:style-name="Index_20_Link" text:visited-style-name="Index_20_Link">40. Function Pointers<text:tab/>40</text:a></text:p>
          <text:p text:style-name="P78"><text:a xlink:type="simple" xlink:href="#__RefHeading___Toc12791_2206932868" text:style-name="Index_20_Link" text:visited-style-name="Index_20_Link">41. Call back function using function pointer – Example<text:tab/>45</text:a></text:p>
          <text:p text:style-name="P78"><text:a xlink:type="simple" xlink:href="#__RefHeading___Toc12789_2206932868" text:style-name="Index_20_Link" text:visited-style-name="Index_20_Link">42. Function pointer without a name in C<text:tab/>45</text:a></text:p>
          <text:p text:style-name="P78"><text:a xlink:type="simple" xlink:href="#__RefHeading___Toc12787_2206932868" text:style-name="Index_20_Link" text:visited-style-name="Index_20_Link">43. C program to check Endianness<text:tab/>46</text:a></text:p>
          <text:p text:style-name="P78"><text:a xlink:type="simple" xlink:href="#__RefHeading___Toc12785_2206932868" text:style-name="Index_20_Link" text:visited-style-name="Index_20_Link"><text:soft-page-break/>44. Initializing multi-dimensional array pointer<text:tab/>47</text:a></text:p>
          <text:p text:style-name="P78"><text:a xlink:type="simple" xlink:href="#__RefHeading___Toc12783_2206932868" text:style-name="Index_20_Link" text:visited-style-name="Index_20_Link">45. Bit-Shift and Bitwise operators<text:tab/>47</text:a></text:p>
          <text:p text:style-name="P78"><text:a xlink:type="simple" xlink:href="#__RefHeading___Toc12781_2206932868" text:style-name="Index_20_Link" text:visited-style-name="Index_20_Link">46. Pointer Arithmetic<text:tab/>48</text:a></text:p>
          <text:p text:style-name="P78"><text:a xlink:type="simple" xlink:href="#__RefHeading___Toc12779_2206932868" text:style-name="Index_20_Link" text:visited-style-name="Index_20_Link">47. enum<text:tab/>49</text:a></text:p>
          <text:p text:style-name="P78"><text:a xlink:type="simple" xlink:href="#__RefHeading___Toc12777_2206932868" text:style-name="Index_20_Link" text:visited-style-name="Index_20_Link">48. Bit Fields<text:tab/>51</text:a></text:p>
          <text:p text:style-name="P78"><text:a xlink:type="simple" xlink:href="#__RefHeading___Toc12775_2206932868" text:style-name="Index_20_Link" text:visited-style-name="Index_20_Link">49. Assigning Pointer address manually<text:tab/>53</text:a></text:p>
          <text:p text:style-name="P78"><text:a xlink:type="simple" xlink:href="#__RefHeading___Toc12773_2206932868" text:style-name="Index_20_Link" text:visited-style-name="Index_20_Link">50. Format Specifiers<text:tab/>53</text:a></text:p>
          <text:p text:style-name="P78"><text:a xlink:type="simple" xlink:href="#__RefHeading___Toc12771_2206932868" text:style-name="Index_20_Link" text:visited-style-name="Index_20_Link">51. Bootloader, Bootstrap Loader and Start-up Code<text:tab/>54</text:a></text:p>
          <text:p text:style-name="P78"><text:a xlink:type="simple" xlink:href="#__RefHeading___Toc12769_2206932868" text:style-name="Index_20_Link" text:visited-style-name="Index_20_Link">52. Header Include Guard<text:tab/>54</text:a></text:p>
          <text:p text:style-name="P78"><text:a xlink:type="simple" xlink:href="#__RefHeading___Toc12767_2206932868" text:style-name="Index_20_Link" text:visited-style-name="Index_20_Link">53. Memory Layout in C<text:tab/>57</text:a></text:p>
          <text:p text:style-name="P78"><text:a xlink:type="simple" xlink:href="#__RefHeading___Toc12765_2206932868" text:style-name="Index_20_Link" text:visited-style-name="Index_20_Link">54. Passing an array to a function<text:tab/>59</text:a></text:p>
          <text:p text:style-name="P78"><text:a xlink:type="simple" xlink:href="#__RefHeading___Toc12763_2206932868" text:style-name="Index_20_Link" text:visited-style-name="Index_20_Link">55. Normal declaration of array of pointers vs. array allocated with malloc()<text:tab/>60</text:a></text:p>
          <text:p text:style-name="P78"><text:a xlink:type="simple" xlink:href="#__RefHeading___Toc12761_2206932868" text:style-name="Index_20_Link" text:visited-style-name="Index_20_Link">56. Token-pasting operator (##)<text:tab/>61</text:a></text:p>
          <text:p text:style-name="P78"><text:a xlink:type="simple" xlink:href="#__RefHeading___Toc12759_2206932868" text:style-name="Index_20_Link" text:visited-style-name="Index_20_Link">57. Macro with variable arguments<text:tab/>63</text:a></text:p>
          <text:p text:style-name="P78"><text:a xlink:type="simple" xlink:href="#__RefHeading___Toc12757_2206932868" text:style-name="Index_20_Link" text:visited-style-name="Index_20_Link">58. Stringizing operator (#)<text:tab/>63</text:a></text:p>
          <text:p text:style-name="P78"><text:a xlink:type="simple" xlink:href="#__RefHeading___Toc12755_2206932868" text:style-name="Index_20_Link" text:visited-style-name="Index_20_Link">59. Both Stringize and the Token-pasting operators in a single macro<text:tab/>64</text:a></text:p>
          <text:p text:style-name="P78"><text:a xlink:type="simple" xlink:href="#__RefHeading___Toc12753_2206932868" text:style-name="Index_20_Link" text:visited-style-name="Index_20_Link">60. Const and Pointer<text:tab/>65</text:a></text:p>
          <text:p text:style-name="P78"><text:a xlink:type="simple" xlink:href="#__RefHeading___Toc12751_2206932868" text:style-name="Index_20_Link" text:visited-style-name="Index_20_Link">61. Swapping without using Third variable<text:tab/>65</text:a></text:p>
          <text:p text:style-name="P78"><text:a xlink:type="simple" xlink:href="#__RefHeading___Toc12749_2206932868" text:style-name="Index_20_Link" text:visited-style-name="Index_20_Link">62. Swapping using Bitwise operator<text:tab/>65</text:a></text:p>
          <text:p text:style-name="P78"><text:a xlink:type="simple" xlink:href="#__RefHeading___Toc12747_2206932868" text:style-name="Index_20_Link" text:visited-style-name="Index_20_Link">63. Application of union<text:tab/>65</text:a></text:p>
          <text:p text:style-name="P78"><text:a xlink:type="simple" xlink:href="#__RefHeading___Toc12745_2206932868" text:style-name="Index_20_Link" text:visited-style-name="Index_20_Link">64. Acesss a variable in another file without making it global<text:tab/>66</text:a></text:p>
          <text:p text:style-name="P78"><text:a xlink:type="simple" xlink:href="#__RefHeading___Toc12743_2206932868" text:style-name="Index_20_Link" text:visited-style-name="Index_20_Link">65. Reversing of register<text:tab/>67</text:a></text:p>
          <text:p text:style-name="P78"><text:a xlink:type="simple" xlink:href="#__RefHeading___Toc12741_2206932868" text:style-name="Index_20_Link" text:visited-style-name="Index_20_Link">66. scanf() to read until new line<text:tab/>68</text:a></text:p>
          <text:p text:style-name="P78"><text:a xlink:type="simple" xlink:href="#__RefHeading___Toc12739_2206932868" text:style-name="Index_20_Link" text:visited-style-name="Index_20_Link">67. Fall-through<text:tab/>69</text:a></text:p>
          <text:p text:style-name="P78"><text:a xlink:type="simple" xlink:href="#__RefHeading___Toc12737_2206932868" text:style-name="Index_20_Link" text:visited-style-name="Index_20_Link">68. Driver library<text:tab/>70</text:a></text:p>
          <text:p text:style-name="P78"><text:a xlink:type="simple" xlink:href="#__RefHeading___Toc12735_2206932868" text:style-name="Index_20_Link" text:visited-style-name="Index_20_Link">69. Number of bits to convert integer a to integer b<text:tab/>70</text:a></text:p>
          <text:p text:style-name="P78"><text:a xlink:type="simple" xlink:href="#__RefHeading___Toc20583_1961033176" text:style-name="Index_20_Link" text:visited-style-name="Index_20_Link">70. Fibonacci series without using recursion<text:tab/>71</text:a></text:p>
          <text:p text:style-name="P78"><text:a xlink:type="simple" xlink:href="#__RefHeading___Toc20577_1961033176" text:style-name="Index_20_Link" text:visited-style-name="Index_20_Link">71. Fibonacci series using recursion<text:tab/>72</text:a></text:p>
          <text:p text:style-name="P78"><text:a xlink:type="simple" xlink:href="#__RefHeading___Toc20581_1961033176" text:style-name="Index_20_Link" text:visited-style-name="Index_20_Link">72. Factorial without using recursion<text:tab/>73</text:a></text:p>
          <text:p text:style-name="P78"><text:a xlink:type="simple" xlink:href="#__RefHeading___Toc20579_1961033176" text:style-name="Index_20_Link" text:visited-style-name="Index_20_Link">73. Factorial using recursion<text:tab/>73</text:a></text:p>
          <text:p text:style-name="P78"><text:a xlink:type="simple" xlink:href="#__RefHeading___Toc20575_1961033176" text:style-name="Index_20_Link" text:visited-style-name="Index_20_Link">74. C program without semicolon<text:tab/>74</text:a></text:p>
          <text:p text:style-name="P78"><text:a xlink:type="simple" xlink:href="#__RefHeading___Toc20573_1961033176" text:style-name="Index_20_Link" text:visited-style-name="Index_20_Link">75. Printing multiple times without loop<text:tab/>74</text:a></text:p>
          <text:p text:style-name="P78"><text:a xlink:type="simple" xlink:href="#__RefHeading___Toc8398_662833756" text:style-name="Index_20_Link" text:visited-style-name="Index_20_Link">76. Reverse a number<text:tab/>7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Numbering_20_123">
        <text:list-item>
          <text:p text:style-name="P79"><text:bookmark-start text:name="__RefHeading___Toc12733_2206932868"/><text:soft-page-break/>Pointer and memory<text:bookmark-end text:name="__RefHeading___Toc12733_2206932868"/></text:p>
        </text:list-item>
      </text:list>
      <text:p text:style-name="Code">{</text:p>
      <text:p text:style-name="Code"><text:tab/>int a = 30;</text:p>
      <text:p text:style-name="Code"><text:tab/>int *b =&amp;a;</text:p>
      <text:p text:style-name="Code">}</text:p>
      <text:p text:style-name="Code"/>
      <text:p text:style-name="Standard">All variables are stored on stack.</text:p>
      <text:p text:style-name="Standard"/>
      <text:p text:style-name="Code">int *c = 42;</text:p>
      <text:p text:style-name="Code"/>
      <text:p text:style-name="Standard"><text:span text:style-name="T3">c</text:span> on stack and 42 on data segment.</text:p>
      <text:p text:style-name="Standard">The heap is only used when you explicitly request memory at runtime using functions like <text:span text:style-name="T3">malloc()</text:span>, <text:span text:style-name="T3">calloc()</text:span>, or <text:span text:style-name="T3">realloc()</text:span>. Since you didn't use those here, everything stays on the stack.</text:p>
      <text:p text:style-name="Standard"/>
      <text:p text:style-name="Code">{</text:p>
      <text:p text:style-name="Code"><text:tab/>int *p = malloc(sizeof(int));</text:p>
      <text:p text:style-name="Code"><text:tab/>*p = 78;</text:p>
      <text:p text:style-name="Code">}</text:p>
      <text:p text:style-name="Code">printf("%d", *p);</text:p>
      <text:p text:style-name="Code"/>
      <text:p text:style-name="Standard">While the pointer variable (the address) dies at the end of the block, the memory it pointed to stays allocated. Without the pointer, you no longer have the "map" to find that memory to use it or free it. p is stored on stack. But the memory it points to is on heap.</text:p>
      <text:p text:style-name="Standard"/>
      <text:list text:continue-numbering="true" text:style-name="Numbering_20_123">
        <text:list-item>
          <text:p text:style-name="Section"><text:bookmark-start text:name="__RefHeading___Toc12867_2206932868"/>Variadic functions<text:bookmark-end text:name="__RefHeading___Toc12867_2206932868"/></text:p>
        </text:list-item>
      </text:list>
      <text:p text:style-name="Standard">Variadic functions are functions that accept variable number of arguments. The type of the parameters is assumed beforehand and is hard coded. Below are two examples of the same.</text:p>
      <text:p text:style-name="Standard"/>
      <text:p text:style-name="P11">Example 1</text:p>
      <text:p text:style-name="P11"/>
      <text:p text:style-name="Code">#include &lt;stdarg.h&gt;</text:p>
      <text:p text:style-name="Code">#include &lt;stdio.h&gt;</text:p>
      <text:p text:style-name="Code">double average(int count, ...)</text:p>
      <text:p text:style-name="Code">{</text:p>
      <text:p text:style-name="Code"><text:tab/>va_list ap;</text:p>
      <text:p text:style-name="Code"><text:tab/>int j;</text:p>
      <text:p text:style-name="Code"><text:tab/>double sum = 0;</text:p>
      <text:p text:style-name="Code"><text:tab/>va_start(ap, count); /* Requires the last fixed parameter (to<text:tab/>get the address) */</text:p>
      <text:p text:style-name="Code"><text:tab/>for (j = 0; j &lt; count; j++)</text:p>
      <text:p text:style-name="Code"><text:tab/>{</text:p>
      <text:p text:style-name="Code"><text:tab/>sum += va_arg(ap, int); /* Increments ap to the next </text:p>
      <text:p text:style-name="Code"><text:tab/>argument. */</text:p>
      <text:p text:style-name="Code"><text:tab/>}</text:p>
      <text:p text:style-name="Code"><text:tab/>va_end(ap);</text:p>
      <text:p text:style-name="Code"><text:tab/>return(sum / count);</text:p>
      <text:p text:style-name="Code">}</text:p>
      <text:p text:style-name="Code"/>
      <text:p text:style-name="Code">int main(void)</text:p>
      <text:p text:style-name="Code"><text:soft-page-break/>{</text:p>
      <text:p text:style-name="P2"><text:tab/><text:tab/>printf("%f\n", average(3, 8, 3, 1));</text:p>
      <text:p text:style-name="P2"><text:tab/>printf("%f\n", average(5, 8, 2, 5, 7,9));</text:p>
      <text:p text:style-name="P2"><text:tab/>return(0);</text:p>
      <text:p text:style-name="Code">}</text:p>
      <text:p text:style-name="Code"/>
      <text:p text:style-name="P11">Output</text:p>
      <text:p text:style-name="P11"/>
      <text:p text:style-name="Code">4.000000</text:p>
      <text:p text:style-name="Code">6.200000</text:p>
      <text:p text:style-name="Standard"/>
      <text:p text:style-name="P12">Example 2</text:p>
      <text:p text:style-name="Standard"/>
      <text:p text:style-name="Code">#include &lt;stdio.h&gt;</text:p>
      <text:p text:style-name="Code">#include &lt;stdarg.h&gt;</text:p>
      <text:p text:style-name="Code"/>
      <text:p text:style-name="Code">/* print all args one at a time until a negative argument is seen. All args are assumed to be of int type */</text:p>
      <text:p text:style-name="Code"/>
      <text:p text:style-name="Code">void printargs(int arg1, ...)</text:p>
      <text:p text:style-name="Code">{</text:p>
      <text:p text:style-name="Code"><text:tab/>va_list ap;</text:p>
      <text:p text:style-name="P3"><text:tab/>int i;</text:p>
      <text:p text:style-name="P3"><text:tab/>va_start(ap, arg1);</text:p>
      <text:p text:style-name="Code"><text:tab/>for (i = arg1; i &gt;= 0; i = va_arg(ap, int))</text:p>
      <text:p text:style-name="Code"><text:tab/>{</text:p>
      <text:p text:style-name="Code"><text:tab/><text:tab/><text:tab/>printf("%d ", i);</text:p>
      <text:p text:style-name="Code"><text:tab/>}</text:p>
      <text:p text:style-name="Code"><text:tab/>va_end(ap);</text:p>
      <text:p text:style-name="Code"><text:tab/>putchar('\n');</text:p>
      <text:p text:style-name="Code">}</text:p>
      <text:p text:style-name="Code"/>
      <text:p text:style-name="Code">int main(void)</text:p>
      <text:p text:style-name="Code">{</text:p>
      <text:p text:style-name="Code"><text:tab/>printargs(5, 2, 14, 84, 97, 15, -1, 48, -1);</text:p>
      <text:p text:style-name="Code"><text:tab/>printargs(84, 51, -1, 3);</text:p>
      <text:p text:style-name="Code"><text:tab/>printargs(-1);</text:p>
      <text:p text:style-name="P3"><text:tab/>printargs(1, -1);</text:p>
      <text:p text:style-name="Code"><text:tab/>return(0);</text:p>
      <text:p text:style-name="Code">}</text:p>
      <text:p text:style-name="Standard"/>
      <text:p text:style-name="P11">Output</text:p>
      <text:p text:style-name="Code">5 2 14 84 97 15 84 51</text:p>
      <text:p text:style-name="Code">1</text:p>
      <text:p text:style-name="P39"/>
      <text:list text:continue-numbering="true" text:style-name="Numbering_20_123">
        <text:list-item>
          <text:p text:style-name="Section"><text:bookmark-start text:name="__RefHeading___Toc12865_2206932868"/>Pointers and Local variables in functions<text:bookmark-end text:name="__RefHeading___Toc12865_2206932868"/></text:p>
        </text:list-item>
      </text:list>
      <text:p text:style-name="Code">#include &lt;stdio.h&gt;</text:p>
      <text:p text:style-name="Code">#include &lt;stdlib.h&gt;</text:p>
      <text:p text:style-name="Code"/>
      <text:p text:style-name="Code">int *fun_1(void)</text:p>
      <text:p text:style-name="Code"><text:soft-page-break/>{</text:p>
      <text:p text:style-name="Code"><text:tab/>static int x = 10; <text:s/>//x is stored in the initialized .data section of memory. So it does not gets deleted even when the function returns. But accessing x by value is restricted only to this function. Also x is initialized only once at the first time.</text:p>
      <text:p text:style-name="Code"/>
      <text:p text:style-name="Code"><text:tab/>return(&amp;x);</text:p>
      <text:p text:style-name="Code">}</text:p>
      <text:p text:style-name="Code"/>
      <text:p text:style-name="Code">int *fun_2(void)</text:p>
      <text:p text:style-name="Code">{</text:p>
      <text:p text:style-name="Code"><text:tab/>int *ptr = (int *)malloc(sizeof(int)); <text:s/>//malloc() allocates memory on the heap, it remains valid until you explicitly free it. But ptr becomes invalid once this function returns. Returning ptr is safe. But once this function returns it is the caller’s responsibility to free the memory allocated in the heap which was pointed by ptr.</text:p>
      <text:p text:style-name="P5"><text:tab/></text:p>
      <text:p text:style-name="P5"><text:tab/>if (ptr == NULL) <text:s/>//Check if malloc failed.</text:p>
      <text:p text:style-name="P4"><text:tab/>{</text:p>
      <text:p text:style-name="P4"><text:tab/><text:tab/><text:tab/>printf("Memory allocation failed!\n");</text:p>
      <text:p text:style-name="P4"><text:tab/><text:tab/><text:tab/>return(NULL); <text:s/>//Return NULL if malloc fails</text:p>
      <text:p text:style-name="Code"><text:tab/>}</text:p>
      <text:p text:style-name="Code"><text:tab/>*ptr = 20;</text:p>
      <text:p text:style-name="Code"><text:tab/>return(ptr);</text:p>
      <text:p text:style-name="Code">}</text:p>
      <text:p text:style-name="Code"/>
      <text:p text:style-name="Code">int *fun_3(void)</text:p>
      <text:p text:style-name="Code">{</text:p>
      <text:p text:style-name="Code"><text:tab/>int y = 30; <text:s/>//y is stored in stack memory.</text:p>
      <text:p text:style-name="Code"><text:tab/>int *a = &amp;y; <text:s/>//a is stored in stack memory.</text:p>
      <text:p text:style-name="Code"><text:tab/>return(a); <text:s/>//Using a for returning address will cause undefined behaviour as a will be destroyed once this function completes execution.</text:p>
      <text:p text:style-name="Code">}</text:p>
      <text:p text:style-name="Code"/>
      <text:p text:style-name="P6">int *fun_4(void)</text:p>
      <text:p text:style-name="P6">{</text:p>
      <text:p text:style-name="Code"><text:s text:c="4"/>int z = 40; <text:s/>//Local variables are created in stack and they have scope. So, they are not accessible everywhere.</text:p>
      <text:p text:style-name="Code"><text:s text:c="4"/>return(&amp;z); <text:s/>//z is created on stack. So, it is destroyed when the function returns. Therefore, &amp;z is invalid address.</text:p>
      <text:p text:style-name="Code">}</text:p>
      <text:p text:style-name="Code"/>
      <text:p text:style-name="P6">int main(void)</text:p>
      <text:p text:style-name="P6">{</text:p>
      <text:p text:style-name="Code"><text:tab/>int *p = fun_1();</text:p>
      <text:p text:style-name="Code"><text:tab/>printf("%d\n", *p); <text:s/>//Prints 10.</text:p>
      <text:p text:style-name="Code"><text:tab/>p = fun_2();</text:p>
      <text:p text:style-name="Code"><text:tab/>printf("%d\n", *p); <text:s/>//Prints 20.</text:p>
      <text:p text:style-name="P6"><text:tab/>free(p);</text:p>
      <text:p text:style-name="P6"><text:soft-page-break/><text:tab/>p = fun_3();</text:p>
      <text:p text:style-name="Code"><text:tab/>printf("%d\n", *p); <text:s/>//Segmentation fault occurs and the program terminates here.</text:p>
      <text:p text:style-name="Code"><text:tab/>p = fun_4();</text:p>
      <text:p text:style-name="Code"><text:tab/>printf("%d\n", *p); <text:s/>//Segmentation fault occurs and the program terminates here.</text:p>
      <text:p text:style-name="Code"/>
      <text:p text:style-name="Code"><text:tab/>return(0);</text:p>
      <text:p text:style-name="Code">}</text:p>
      <text:p text:style-name="Standard"/>
      <text:p text:style-name="P11">Output</text:p>
      <text:p text:style-name="P11"/>
      <text:p text:style-name="Code">10</text:p>
      <text:p text:style-name="Code">20</text:p>
      <text:p text:style-name="Code">&lt;Segmentation fault&gt;</text:p>
      <text:p text:style-name="Code">&lt;Segmentation fault&gt;</text:p>
      <text:p text:style-name="Standard"/>
      <text:list text:continue-numbering="true" text:style-name="Numbering_20_123">
        <text:list-item>
          <text:p text:style-name="Section"><text:bookmark-start text:name="__RefHeading___Toc12863_2206932868"/>Ternary operator<text:bookmark-end text:name="__RefHeading___Toc12863_2206932868"/></text:p>
        </text:list-item>
      </text:list>
      <text:p text:style-name="Code">#include &lt;stdio.h&gt;</text:p>
      <text:p text:style-name="Code">int main(void)</text:p>
      <text:p text:style-name="Code">{</text:p>
      <text:p text:style-name="Code"><text:tab/>int a, b, result;</text:p>
      <text:p text:style-name="Code"><text:tab/>printf("Enter first number: ");</text:p>
      <text:p text:style-name="Code"><text:s text:c="4"/><text:tab/>scanf("%d", &amp;a);</text:p>
      <text:p text:style-name="Code"><text:s text:c="4"/><text:tab/>printf("Enter second number: ");</text:p>
      <text:p text:style-name="Code"><text:tab/>scanf("%d", &amp;b);</text:p>
      <text:p text:style-name="Code"><text:tab/>result = (a &gt; b)? a : b; <text:s text:c="4"/>printf("Highest is: %d\n", result);</text:p>
      <text:p text:style-name="P7"><text:s text:c="4"/>(a &gt; b)? printf("First number is highest") : printf("Second number is highest");</text:p>
      <text:p text:style-name="P7"><text:tab/>return(0);</text:p>
      <text:p text:style-name="Code">}</text:p>
      <text:p text:style-name="Standard"/>
      <text:p text:style-name="P11">Output</text:p>
      <text:p text:style-name="P11"/>
      <text:p text:style-name="Code">Enter first number: 87</text:p>
      <text:p text:style-name="P8">Enter second number: 765</text:p>
      <text:p text:style-name="P8">Highest is: 765</text:p>
      <text:p text:style-name="Code">Second number is highest</text:p>
      <text:p text:style-name="Standard"/>
      <text:list text:continue-numbering="true" text:style-name="Numbering_20_123">
        <text:list-item>
          <text:p text:style-name="Section"><text:bookmark-start text:name="__RefHeading___Toc12861_2206932868"/>Terminating a program using exit() while inside a function without return type<text:bookmark-end text:name="__RefHeading___Toc12861_2206932868"/></text:p>
        </text:list-item>
      </text:list>
      <text:p text:style-name="Code">#include &lt;stdio.h&gt;</text:p>
      <text:p text:style-name="Code">#include &lt;stdlib.h&gt;</text:p>
      <text:p text:style-name="Code"/>
      <text:p text:style-name="Code">void foo(void) {</text:p>
      <text:p text:style-name="Code"><text:s text:c="4"/>printf("Inside foo() before exit()\n");</text:p>
      <text:p text:style-name="Code"><text:s text:c="4"/>exit(1); <text:s/>//Exiting with failure. exit(0) for exiting with success.</text:p>
      <text:p text:style-name="Code"><text:s text:c="4"/>printf("Inside foo() after exit()\n");</text:p>
      <text:p text:style-name="Code">}</text:p>
      <text:p text:style-name="Code"><text:soft-page-break/></text:p>
      <text:p text:style-name="Code">int main(void)</text:p>
      <text:p text:style-name="Code">{</text:p>
      <text:p text:style-name="Code"><text:tab/><text:tab/><text:tab/>printf("Inside main() before foo()\n");</text:p>
      <text:p text:style-name="Code"><text:tab/><text:tab/><text:tab/>foo();</text:p>
      <text:p text:style-name="Code"><text:tab/><text:tab/><text:tab/>printf("Inside main() after foo()\n");</text:p>
      <text:p text:style-name="Code"><text:tab/><text:tab/><text:tab/>return(0);</text:p>
      <text:p text:style-name="Code">}</text:p>
      <text:p text:style-name="Standard"/>
      <text:p text:style-name="P11">Output</text:p>
      <text:p text:style-name="Standard"/>
      <text:p text:style-name="Code">Inside main() before foo()</text:p>
      <text:p text:style-name="Code">Inside foo() before exit()</text:p>
      <text:p text:style-name="Standard"/>
      <text:list text:continue-numbering="true" text:style-name="Numbering_20_123">
        <text:list-item>
          <text:p text:style-name="Section"><text:bookmark-start text:name="__RefHeading___Toc12859_2206932868"/>Structure Packing and Padding<text:bookmark-end text:name="__RefHeading___Toc12859_2206932868"/></text:p>
        </text:list-item>
      </text:list>
      <text:p text:style-name="Code">#include &lt;stdio.h&gt;</text:p>
      <text:p text:style-name="Code">#pragma pack(push, 4) <text:s/>//4-byte alignment.</text:p>
      <text:p text:style-name="Code">typedef struct</text:p>
      <text:p text:style-name="Code">{</text:p>
      <text:p text:style-name="Code"><text:tab/>int x; char y; int z;</text:p>
      <text:p text:style-name="Code">}packed_4;</text:p>
      <text:p text:style-name="Code"/>
      <text:p text:style-name="Code">#pragma pack(push, 1) <text:s/>//1-byte alignment.</text:p>
      <text:p text:style-name="Code">typedef struct</text:p>
      <text:p text:style-name="Code">{</text:p>
      <text:p text:style-name="Code"><text:tab/>char a;</text:p>
      <text:p text:style-name="Code"><text:tab/>int b;</text:p>
      <text:p text:style-name="Code"><text:tab/>packed_4 s1; <text:s/>//4-byte alignment.</text:p>
      <text:p text:style-name="Code">}nested_packed_1;</text:p>
      <text:p text:style-name="Code"/>
      <text:p text:style-name="Code">#pragma pack(pop);</text:p>
      <text:p text:style-name="Code">/* Pops out to previous alignment rule. ie, pack(push, 4) in this case will be active from here on.*/</text:p>
      <text:p text:style-name="Code"/>
      <text:p text:style-name="Code">int main(void)</text:p>
      <text:p text:style-name="Code">(</text:p>
      <text:p text:style-name="Code"><text:tab/>printf("Size of int: %d\n", (size_t)sizeof(int)); <text:s text:c="4"/><text:tab/>printf("Size of packed_4: %d\n", (size_t)sizeof(packed_4));</text:p>
      <text:p text:style-name="Code"><text:tab/>printf("Size of nested_packed_1: %d\n",(size_t)sizeof(nested_packed_1));</text:p>
      <text:p text:style-name="Code"><text:tab/>return(0);</text:p>
      <text:p text:style-name="Code">}</text:p>
      <text:p text:style-name="Standard"><text:s/></text:p>
      <text:p text:style-name="P11">Output</text:p>
      <text:p text:style-name="Standard"/>
      <text:p text:style-name="Code">Size of int: 4</text:p>
      <text:p text:style-name="Code">Size of packed_4: 12</text:p>
      <text:p text:style-name="Code">Size of nested_packed_1: 17</text:p>
      <text:p text:style-name="Standard"/>
      <text:list text:continue-numbering="true" text:style-name="Numbering_20_123">
        <text:list-item>
          <text:p text:style-name="Section"><text:bookmark-start text:name="__RefHeading___Toc12857_2206932868"/>Arguments and Options<text:bookmark-end text:name="__RefHeading___Toc12857_2206932868"/></text:p>
        </text:list-item>
      </text:list>
      <text:p text:style-name="Code"><text:soft-page-break/>#include &lt;stdio.h&gt;</text:p>
      <text:p text:style-name="Code">#include &lt;stdlib.h&gt; <text:s/>//For atof().</text:p>
      <text:p text:style-name="Code">#include &lt;string.h&gt; <text:s/>//For strcmp().</text:p>
      <text:p text:style-name="Code"/>
      <text:p text:style-name="Code">int main(int argc, char *argv[])</text:p>
      <text:p text:style-name="Code">{</text:p>
      <text:p text:style-name="Code"><text:tab/>if(argc == 2 &amp;&amp; (strcmp(argv[1], "-h") || strcmp(argv[1], "-help")))</text:p>
      <text:p text:style-name="Code"><text:tab/>{</text:p>
      <text:p text:style-name="Code"><text:tab/><text:tab/><text:tab/>printf("Usage: calc [option] [operand 1] [operand 2]\n");</text:p>
      <text:p text:style-name="Code"><text:s text:c="8"/><text:tab/>printf("-a, --add - Addition\n-s, --substract - </text:p>
      <text:p text:style-name="Code">Substraction\n-m, --multiply - Multiplication\n-d, --divide - </text:p>
      <text:p text:style-name="Code">Division\n");</text:p>
      <text:p text:style-name="Code"><text:tab/><text:tab/><text:tab/>return(0);</text:p>
      <text:p text:style-name="Code"><text:tab/>}</text:p>
      <text:p text:style-name="Code"><text:tab/>else if(argc != 4)</text:p>
      <text:p text:style-name="Code"><text:tab/>{</text:p>
      <text:p text:style-name="Code"><text:tab/><text:tab/><text:tab/>printf("Usage: calc [option] [operand 1] [operand 2]\n");</text:p>
      <text:p text:style-name="Code"><text:tab/><text:tab/><text:tab/>printf("-a, --add - Addition\n-s, --substract - </text:p>
      <text:p text:style-name="Code">Substraction\n-m, --multiply - Multiplication\n-d, --divide - </text:p>
      <text:p text:style-name="Code">Division\n");</text:p>
      <text:p text:style-name="Code"><text:tab/><text:tab/><text:tab/>return(-1);</text:p>
      <text:p text:style-name="Code"><text:tab/>}</text:p>
      <text:p text:style-name="Code"><text:tab/>else</text:p>
      <text:p text:style-name="Code"><text:tab/>{}</text:p>
      <text:p text:style-name="Code"><text:s text:c="2"/></text:p>
      <text:p text:style-name="P9"><text:tab/>if(strcmp(argv[1], "-a") == 0 || strcmp(argv[1], "--add") == 0)</text:p>
      <text:p text:style-name="P9"><text:tab/>{</text:p>
      <text:p text:style-name="Code"><text:tab/><text:tab/><text:tab/>printf("Addition is: %f\n", atof(argv[2]) + atof(argv[3]));</text:p>
      <text:p text:style-name="Code"><text:tab/><text:tab/><text:tab/>return(0);</text:p>
      <text:p text:style-name="Code"><text:s text:c="4"/>}</text:p>
      <text:p text:style-name="Code"><text:s text:c="4"/>else if(strcmp(argv[1], "-s") == 0 || strcmp(argv[1], "-substract") == 0)</text:p>
      <text:p text:style-name="Code"><text:tab/>{</text:p>
      <text:p text:style-name="P9"><text:tab/><text:tab/><text:tab/>printf("Substraction is: %f\n", atof(argv[2]) – atof(argv[3]));</text:p>
      <text:p text:style-name="P9"><text:tab/><text:tab/><text:tab/>return(0);</text:p>
      <text:p text:style-name="P9"><text:tab/>}</text:p>
      <text:p text:style-name="Code"><text:s text:c="4"/>else if(strcmp(argv[1], "-m") == 0 || strcmp(argv[1], "-multiply") == 0)</text:p>
      <text:p text:style-name="P9"><text:tab/>{</text:p>
      <text:p text:style-name="P9"><text:tab/><text:tab/><text:tab/>printf("Multiplication is: %f\n", atof(argv[2]) * atof(argv[3]));</text:p>
      <text:p text:style-name="Code"><text:tab/><text:tab/><text:tab/>return(0);</text:p>
      <text:p text:style-name="Code"><text:tab/>}</text:p>
      <text:p text:style-name="Code"><text:s text:c="4"/>else if(strcmp(argv[1], "-d") == 0 || strcmp(argv[1], "-divide") == 0)</text:p>
      <text:p text:style-name="Code"><text:soft-page-break/><text:tab/>{</text:p>
      <text:p text:style-name="Code"><text:tab/><text:tab/><text:tab/>printf("Division is: %f\n", atof(argv[2]) / atof(argv[3]));</text:p>
      <text:p text:style-name="Code"><text:tab/><text:tab/><text:tab/>return(0);</text:p>
      <text:p text:style-name="Code"><text:tab/>}</text:p>
      <text:p text:style-name="Code"><text:tab/>else</text:p>
      <text:p text:style-name="Code"><text:tab/>{</text:p>
      <text:p text:style-name="Code"><text:tab/><text:tab/><text:tab/>printf("Bad option(s) or/and argument(s)\n"); <text:s text:c="8"/><text:tab/><text:tab/><text:tab/><text:tab/>return(-1);</text:p>
      <text:p text:style-name="Code"><text:tab/>}</text:p>
      <text:p text:style-name="Code">}</text:p>
      <text:p text:style-name="Standard"/>
      <text:p text:style-name="P11">Output</text:p>
      <text:p text:style-name="Standard"/>
      <text:p text:style-name="Code">$ ./calc --add 2 3 </text:p>
      <text:p text:style-name="Code">Addition is: 5.000000</text:p>
      <text:p text:style-name="Standard"/>
      <text:list text:continue-numbering="true" text:style-name="Numbering_20_123">
        <text:list-item>
          <text:p text:style-name="Section"><text:bookmark-start text:name="__RefHeading___Toc12855_2206932868"/>Memory Mapping an SFR<text:bookmark-end text:name="__RefHeading___Toc12855_2206932868"/></text:p>
        </text:list-item>
      </text:list>
      <text:p text:style-name="Code">#define REGISTER_NAME (*(volatile unsigned char *) 0x1234)</text:p>
      <text:p text:style-name="Code"/>
      <text:p text:style-name="Standard">More specifically,</text:p>
      <text:p text:style-name="Standard"/>
      <text:p text:style-name="Code">*(volatile unsigned char *) 0x1234</text:p>
      <text:p text:style-name="Code"/>
      <text:p text:style-name="Standard">is an integer constant <text:span text:style-name="T3">0x1234</text:span>, that is typecast to a pointer (an address) that points to a volatile unsigned char (a single byte), So, the data that is to be read or written to should be having a data type of volatile unsigned char. The pointer has been dereferenced (by the star on the far left). This means that it is accessing (whether reading or writing) the value at the address <text:span text:style-name="T3">0x1234</text:span>. The volatile means that the value of the byte that is pointed to, can change due to something outside the main code, either through an Interrupt Service Routine (ISR), or more likely in this case, the hardware itself (because we are memory mapping a register).</text:p>
      <text:p text:style-name="Standard"/>
      <text:p text:style-name="Code">(*(volatile unsigned char *) 0x1234)</text:p>
      <text:p text:style-name="Standard"/>
      <text:p text:style-name="P41">is the same as above, but with extra parentheses around it to avoid confusion. </text:p>
      <text:p text:style-name="P41"/>
      <text:p text:style-name="Code">foo = (*(volatile unsigned char *) 0x1234);</text:p>
      <text:p text:style-name="Code"/>
      <text:p text:style-name="Standard">is taking the value stored at address 0x1234 and storing it in the variable foo.</text:p>
      <text:p text:style-name="Standard"/>
      <text:p text:style-name="Code">(*(volatile unsigned char *) 0x1234) = 0xAA;</text:p>
      <text:p text:style-name="P41"/>
      <text:p text:style-name="P41">is storing the value <text:span text:style-name="T3">0xAA</text:span> in address <text:span text:style-name="T3">0x1234</text:span>.</text:p>
      <text:p text:style-name="Standard"/>
      <text:list text:continue-numbering="true" text:style-name="Numbering_20_123">
        <text:list-item>
          <text:p text:style-name="Section"><text:bookmark-start text:name="__RefHeading___Toc12853_2206932868"/>Convert Hexadecimal to Binary<text:bookmark-end text:name="__RefHeading___Toc12853_2206932868"/></text:p>
        </text:list-item>
      </text:list>
      <text:p text:style-name="Code">#include &lt;stdio.h&gt;</text:p>
      <text:p text:style-name="Code">#include &lt;stdint.h&gt;</text:p>
      <text:p text:style-name="Code"/>
      <text:p text:style-name="Code">int main(void)</text:p>
      <text:p text:style-name="Code"><text:soft-page-break/>{</text:p>
      <text:p text:style-name="Code"><text:tab/>uint8_t hex, bit;</text:p>
      <text:p text:style-name="Code"><text:tab/>int8_t i; <text:s/>//Since its value would become –1.</text:p>
      <text:p text:style-name="Code"><text:tab/>printf("Enter the 1-byte Hex number: 0x");</text:p>
      <text:p text:style-name="Code"><text:tab/>scanf("%x", &amp;hex);</text:p>
      <text:p text:style-name="Code"><text:tab/>printf("The Bin equivalent is: 0b");</text:p>
      <text:p text:style-name="Code"><text:tab/>for(i = 7; i &gt;= 0; i--)</text:p>
      <text:p text:style-name="Code"><text:tab/>{</text:p>
      <text:p text:style-name="Code"><text:tab/><text:tab/><text:tab/>bit = ((hex &gt;&gt; i) &amp; 1);</text:p>
      <text:p text:style-name="Code"><text:tab/><text:tab/><text:tab/>printf("%d", bit);</text:p>
      <text:p text:style-name="Code"><text:tab/>}</text:p>
      <text:p text:style-name="Code"><text:tab/>return(0);</text:p>
      <text:p text:style-name="Code">}</text:p>
      <text:p text:style-name="Standard"/>
      <text:list text:continue-numbering="true" text:style-name="Numbering_20_123">
        <text:list-item>
          <text:p text:style-name="Section"><text:bookmark-start text:name="__RefHeading___Toc12851_2206932868"/>Convert Byte to Binary<text:bookmark-end text:name="__RefHeading___Toc12851_2206932868"/></text:p>
        </text:list-item>
      </text:list>
      <text:p text:style-name="Code">#define BYTE_TO_BINARY_PATTERN "%c%c%c%c%c%c%c%c"</text:p>
      <text:p text:style-name="Code">#define BYTE_TO_BINARY(byte) <text:s/>\</text:p>
      <text:p text:style-name="Code">(byte &amp; 0x80 ? '1' : '0'), \</text:p>
      <text:p text:style-name="Code">(byte &amp; 0x40 ? '1' : '0'), \</text:p>
      <text:p text:style-name="Code">(byte &amp; 0x20 ? '1' : '0'), \</text:p>
      <text:p text:style-name="Code">(byte &amp; 0x10 ? '1' : '0'), \</text:p>
      <text:p text:style-name="Code">(byte &amp; 0x08 ? '1' : '0'), \</text:p>
      <text:p text:style-name="Code">(byte &amp; 0x04 ? '1' : '0'), \</text:p>
      <text:p text:style-name="Code">(byte &amp; 0x02 ? '1' : '0'), \</text:p>
      <text:p text:style-name="Code">(byte &amp; 0x01 ? '1' : '0')</text:p>
      <text:p text:style-name="Code"/>
      <text:p text:style-name="P11">Usage in driver code:</text:p>
      <text:p text:style-name="Code"/>
      <text:p text:style-name="Code">printf("Leading text ""BYTE_TO_BINARY_PATTERN"\n", BYTE_TO_BINARY(byte));</text:p>
      <text:p text:style-name="Code"/>
      <text:p text:style-name="P11">For multi-byte types:</text:p>
      <text:p text:style-name="Code"/>
      <text:p text:style-name="Code">printf("m: "BYTE_TO_BINARY_PATTERN" "BYTE_TO_BINARY_PATTERN"\n", BYTE_TO_BINARY(m&gt;&gt;8), BYTE_TO_BINARY(m));</text:p>
      <text:p text:style-name="Standard"/>
      <text:list text:continue-numbering="true" text:style-name="Numbering_20_123">
        <text:list-item>
          <text:p text:style-name="Section"><text:bookmark-start text:name="__RefHeading___Toc12849_2206932868"/>How does free() know the size of memory to be deallocated?<text:bookmark-end text:name="__RefHeading___Toc12849_2206932868"/></text:p>
        </text:list-item>
      </text:list>
      <text:p text:style-name="Standard">The <text:span text:style-name="T3">free()</text:span> function is used to deallocate memory while it is allocated using <text:span text:style-name="T3">malloc()</text:span>, <text:span text:style-name="T3">calloc()</text:span> and <text:span text:style-name="T3">realloc()</text:span>. The syntax of the free is simple. We simply use free with the pointer. Then it can clean up the memory.</text:p>
      <text:p text:style-name="Standard"/>
      <text:p text:style-name="Code">free(ptr);</text:p>
      <text:p text:style-name="Standard"/>
      <text:p text:style-name="Standard">The <text:span text:style-name="T3">free()</text:span> is not taking any size as parameter, but only pointer. So the question comes, that how the free() function know about the size of the block to deallocate?</text:p>
      <text:p text:style-name="Standard">When we use the dynamic memory allocation techniques for memory allocations, then this is done in the actual heap section. It creates one word larger than the requested size. This extra word is used to store the size. This size is used by <text:span text:style-name="T3">free()</text:span> when it wants to clear the memory space.</text:p>
      <text:p text:style-name="Standard"/>
      <text:list text:continue-numbering="true" text:style-name="Numbering_20_123">
        <text:list-item>
          <text:p text:style-name="Section"><text:bookmark-start text:name="__RefHeading___Toc12847_2206932868"/><text:soft-page-break/>Setter and Getter Functions<text:bookmark-end text:name="__RefHeading___Toc12847_2206932868"/></text:p>
        </text:list-item>
      </text:list>
      <text:p text:style-name="Standard">“Setter” function is used to Set or Update value to the variable. “Getter” function is used to retrieve value of the variable.</text:p>
      <text:p text:style-name="Standard"/>
      <text:list xml:id="list224007765178118" text:continue-numbering="true" text:style-name="Numbering_20_123">
        <text:list-item>
          <text:p text:style-name="P80"><text:bookmark-start text:name="__RefHeading___Toc12845_2206932868"/>Interrupt Handling in Microcontroller<text:bookmark-end text:name="__RefHeading___Toc12845_2206932868"/></text:p>
        </text:list-item>
      </text:list>
      <text:list text:style-name="L1">
        <text:list-item>
          <text:p text:style-name="P87">Microcontroller finishes the current instruction it is executing and saves address of next instruction (which is in the Program Counter) on to the Stack.</text:p>
        </text:list-item>
        <text:list-item>
          <text:p text:style-name="P86">It also saves current status of all the interrupts internally (i.e., not on the Stack).</text:p>
        </text:list-item>
        <text:list-item>
          <text:p text:style-name="P86">It jumps to the memory location of "Interrupt Vector Table". Interrupt Vector Table contains addresses of all ISRs.</text:p>
        </text:list-item>
        <text:list-item>
          <text:p text:style-name="P86">Microcontroller fetches address of the ISR from Interrupt Vector Table and jumps to it. It starts executing the Interrupt Service Routine until it reaches last instruction of ISR.</text:p>
        </text:list-item>
        <text:list-item>
          <text:p text:style-name="P86">Upon executing last instruction, the microcontroller returns to the place where it was interrupted. First it gets the program counter (PC) address from Stack by popping top bytes of the Stack into PC. Then, it starts to execute from that address.</text:p>
        </text:list-item>
      </text:list>
      <text:p text:style-name="Standard"/>
      <text:list text:continue-list="list224007765178118" text:style-name="Numbering_20_123">
        <text:list-item>
          <text:p text:style-name="Section"><text:bookmark-start text:name="__RefHeading___Toc12843_2206932868"/>Bit rate vs Baud rate<text:bookmark-end text:name="__RefHeading___Toc12843_2206932868"/></text:p>
        </text:list-item>
      </text:list>
      <text:p text:style-name="Standard">baud rate = number of symbols per second</text:p>
      <text:p text:style-name="Standard">bit rate = number of bits per second = (baud rate)*(bits per symbol)*(number of channels)</text:p>
      <text:p text:style-name="Standard"/>
      <text:list text:continue-numbering="true" text:style-name="Numbering_20_123">
        <text:list-item>
          <text:p text:style-name="Section"><text:bookmark-start text:name="__RefHeading___Toc12841_2206932868"/>Static vs Global variables<text:bookmark-end text:name="__RefHeading___Toc12841_2206932868"/></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Feature</text:p>
          </table:table-cell>
          <table:table-cell table:style-name="Table2.A1" office:value-type="string">
            <text:p text:style-name="P11">Static Variable (inside function)</text:p>
          </table:table-cell>
          <table:table-cell table:style-name="Table2.A1" office:value-type="string">
            <text:p text:style-name="P11">Global Variable</text:p>
          </table:table-cell>
        </table:table-row>
        <table:table-row table:style-name="Table2.1">
          <table:table-cell table:style-name="Table2.A1" office:value-type="string">
            <text:p text:style-name="P11">Lifetime</text:p>
          </table:table-cell>
          <table:table-cell table:style-name="Table2.A1" office:value-type="string">
            <text:p text:style-name="Standard">Lives for the entire duration of the program.</text:p>
          </table:table-cell>
          <table:table-cell table:style-name="Table2.A1" office:value-type="string">
            <text:p text:style-name="Standard">Lives for the entire duration of the program.</text:p>
          </table:table-cell>
        </table:table-row>
        <table:table-row table:style-name="Table2.1">
          <table:table-cell table:style-name="Table2.A1" office:value-type="string">
            <text:p text:style-name="P11">Scope</text:p>
          </table:table-cell>
          <table:table-cell table:style-name="Table2.A1" office:value-type="string">
            <text:p text:style-name="Standard">Local. Only visible inside that specific function.</text:p>
          </table:table-cell>
          <table:table-cell table:style-name="Table2.A1" office:value-type="string">
            <text:p text:style-name="Standard">Global. Visible to every function in the file.</text:p>
          </table:table-cell>
        </table:table-row>
        <table:table-row table:style-name="Table2.4">
          <table:table-cell table:style-name="Table2.A1" office:value-type="string">
            <text:p text:style-name="P11">Initialization</text:p>
          </table:table-cell>
          <table:table-cell table:style-name="Table2.A1" office:value-type="string">
            <text:p text:style-name="Standard">Initialized only once (the first time the function is called).</text:p>
          </table:table-cell>
          <table:table-cell table:style-name="Table2.A1" office:value-type="string">
            <text:p text:style-name="Standard">Initialized once (at program start).</text:p>
          </table:table-cell>
        </table:table-row>
      </table:table>
      <text:p text:style-name="P42"/>
      <text:p text:style-name="Standard">If you declare <text:span text:style-name="T3">static int x = 0;</text:span> inside <text:span text:style-name="T3">function_A()</text:span>, you cannot go into <text:span text:style-name="T3">function_B()</text:span> and simply <text:span text:style-name="T3">type x = 5;</text:span>. The compiler will tell you that <text:span text:style-name="T3">x</text:span> is undefined. The "<text:span text:style-name="T3">static</text:span>" keyword effectively locks the variable's name inside the curly braces of the function where it was born.</text:p>
      <text:p text:style-name="Standard"/>
      <text:p text:style-name="P11">The "Backdoor" Exception</text:p>
      <text:p text:style-name="Standard"/>
      <text:p text:style-name="Standard">While you cannot access the name of the static variable globally, you could technically access its memory address globally if you pass it out via a pointer.</text:p>
      <text:p text:style-name="Standard">Because a static variable lives in the "Data Segment" of memory (not on the stack), its address remains valid even after the function returns.</text:p>
      <text:p text:style-name="Standard"/>
      <text:p text:style-name="P13"><text:soft-page-break/>Example of the "Backdoor" approach</text:p>
      <text:p text:style-name="P13"/>
      <text:p text:style-name="Code">int* get_static_ptr()</text:p>
      <text:p text:style-name="Code">{</text:p>
      <text:p text:style-name="Code"><text:s text:c="4"/>static int secret_counter = 0;</text:p>
      <text:p text:style-name="Code"><text:s text:c="4"/>return &amp;secret_counter; // Returning the address is safe because it's static</text:p>
      <text:p text:style-name="Code">}</text:p>
      <text:p text:style-name="Code"/>
      <text:p text:style-name="Code">int main()</text:p>
      <text:p text:style-name="Code">{</text:p>
      <text:p text:style-name="Code"><text:s text:c="4"/>int *ptr = get_static_ptr();</text:p>
      <text:p text:style-name="Code"><text:s text:c="4"/>*ptr = 100; // You are now modifying a "local" static variable from outside!</text:p>
      <text:p text:style-name="Code"><text:s text:c="4"/>return 0;</text:p>
      <text:p text:style-name="Code">}</text:p>
      <text:p text:style-name="Code"/>
      <text:p text:style-name="Standard">When should you use which?</text:p>
      <text:p text:style-name="Standard"><text:span text:style-name="T4">Use Global: </text:span>When many different, unrelated functions truly need to share the same piece of data (use sparingly, as globals make debugging difficult).</text:p>
      <text:p text:style-name="Standard"><text:span text:style-name="T4">Use Static (inside function): </text:span>When you want a function to "remember" something between calls (like a counter or a state) but you want to hide that data from the rest of the program to keep it safe.</text:p>
      <text:p text:style-name="P11">Summary</text:p>
      <text:p text:style-name="Standard">A static local variable is like a private diary: only you (the function) can read/write in it, but unlike a normal conversation (stack variable), the diary doesn't disappear when you leave the room.</text:p>
      <text:p text:style-name="Standard"/>
      <text:list text:continue-numbering="true" text:style-name="Numbering_20_123">
        <text:list-item>
          <text:p text:style-name="Section"><text:bookmark-start text:name="__RefHeading___Toc12839_2206932868"/>memset() function<text:bookmark-end text:name="__RefHeading___Toc12839_2206932868"/></text:p>
        </text:list-item>
      </text:list>
      <text:p text:style-name="Standard"><text:span text:style-name="T3">memset()</text:span> is used to fill a block of memory with a particular value.</text:p>
      <text:p text:style-name="Standard">The syntax of <text:span text:style-name="T3">memset()</text:span> function is as follows:</text:p>
      <text:p text:style-name="Standard"/>
      <text:p text:style-name="Code">// ptr - Starting address of memory to be filled</text:p>
      <text:p text:style-name="Code">// x <text:s text:c="2"/>- Value to be filled</text:p>
      <text:p text:style-name="Code">// n <text:s text:c="2"/>- Number of bytes to be filled starting</text:p>
      <text:p text:style-name="Code"/>
      <text:p text:style-name="Code">void *memset(void *ptr, int x, size_t n);</text:p>
      <text:p text:style-name="Standard"/>
      <text:p text:style-name="Standard">Note that <text:span text:style-name="T3">ptr</text:span> is a void pointer, so that we can pass any type of pointer to this function.</text:p>
      <text:p text:style-name="Standard">Let us see a simple example in C to demonstrate how <text:span text:style-name="T3">memset()</text:span> function is used:</text:p>
      <text:p text:style-name="Standard"/>
      <text:p text:style-name="Code">// C program to demonstrate working of memset()</text:p>
      <text:p text:style-name="Code">#include &lt;stdio.h&gt;</text:p>
      <text:p text:style-name="Code">#include &lt;string.h&gt;</text:p>
      <text:p text:style-name="Code">int main()</text:p>
      <text:p text:style-name="Code">{</text:p>
      <text:p text:style-name="Code"><text:tab/>char str[50] = "GeeksForGeeks is for programming geeks."; <text:s text:c="4"/><text:tab/>printf("\nBefore memset(): %s\n", str);</text:p>
      <text:p text:style-name="Code"><text:tab/>// Fill 8 characters starting from str[13] with '.'</text:p>
      <text:p text:style-name="Code"><text:tab/>memset(str + 13, '.', 8*sizeof(char));</text:p>
      <text:p text:style-name="Code"><text:soft-page-break/><text:tab/>printf("After memset(): <text:s/>%s", str);</text:p>
      <text:p text:style-name="Code"><text:tab/>return 0;</text:p>
      <text:p text:style-name="Code">}</text:p>
      <text:p text:style-name="Standard"/>
      <text:p text:style-name="P14">Output</text:p>
      <text:p text:style-name="P14"/>
      <text:p text:style-name="Code">Before memset(): GeeksForGeeks is for programming geeks.</text:p>
      <text:p text:style-name="Code">After memset(): GeeksForGeeks........programming geeks.</text:p>
      <text:p text:style-name="Standard"/>
      <text:p text:style-name="Standard"><text:span text:style-name="T4">Explanation:</text:span> <text:span text:style-name="T3">(str + 13)</text:span> points to first space (0 based index) of the string “<text:span text:style-name="T3">GeeksForGeeks is for programming geeks</text:span>.”, and <text:span text:style-name="T3">memset()</text:span> sets the character ‘<text:span text:style-name="T3">.</text:span>’ starting from first ‘ ‘ of the string up to 8 character positions of the given string and hence we get the output as shown above.</text:p>
      <text:p text:style-name="Standard"/>
      <text:p text:style-name="Code">// C program to demonstrate working of memset()</text:p>
      <text:p text:style-name="Code">#include &lt;stdio.h&gt;</text:p>
      <text:p text:style-name="Code">#include &lt;string.h&gt;</text:p>
      <text:p text:style-name="Code">void printArray(int arr[], int n)</text:p>
      <text:p text:style-name="Code">{</text:p>
      <text:p text:style-name="Code"><text:tab/>for (int i=0; i&lt;n; i++)</text:p>
      <text:p text:style-name="Code"><text:tab/>{</text:p>
      <text:p text:style-name="Code"><text:tab/><text:tab/><text:tab/>printf("%d ", arr[i]);</text:p>
      <text:p text:style-name="Code"><text:tab/>}</text:p>
      <text:p text:style-name="P10">}</text:p>
      <text:p text:style-name="Code"/>
      <text:p text:style-name="Code">int main()</text:p>
      <text:p text:style-name="Code">{</text:p>
      <text:p text:style-name="Code"><text:tab/>int n = 10;</text:p>
      <text:p text:style-name="Code"><text:tab/>int arr[n]; <text:s text:c="4"/>// Fill whole array with 0.</text:p>
      <text:p text:style-name="Code"><text:tab/>memset(arr, 0, n*sizeof(arr[0]));</text:p>
      <text:p text:style-name="Code"><text:tab/>printf("Array after memset()\n");</text:p>
      <text:p text:style-name="Code"><text:tab/>printArray(arr, n);</text:p>
      <text:p text:style-name="Code"><text:tab/>return 0;</text:p>
      <text:p text:style-name="Code">}</text:p>
      <text:p text:style-name="Standard"/>
      <text:p text:style-name="P15">Output</text:p>
      <text:p text:style-name="P15"/>
      <text:p text:style-name="Code">0 0 0 0 0 0 0 0 0 0</text:p>
      <text:p text:style-name="Standard"/>
      <text:p text:style-name="P15">Exercise</text:p>
      <text:p text:style-name="P15"/>
      <text:p text:style-name="Standard">Predict the output of below program.</text:p>
      <text:p text:style-name="Standard"/>
      <text:p text:style-name="Code">// C program to demonstrate working of memset()</text:p>
      <text:p text:style-name="Code">#include &lt;stdio.h&gt;</text:p>
      <text:p text:style-name="Code">#include &lt;string.h&gt;</text:p>
      <text:p text:style-name="Code">void printArray(int arr[], int n)</text:p>
      <text:p text:style-name="Code">{</text:p>
      <text:p text:style-name="Code"><text:tab/>for (int i=0; i&lt;n; i++)</text:p>
      <text:p text:style-name="Code"><text:tab/>{</text:p>
      <text:p text:style-name="Code"><text:soft-page-break/><text:tab/><text:tab/><text:tab/>printf("%d ", arr[i]);</text:p>
      <text:p text:style-name="Code"><text:tab/>}</text:p>
      <text:p text:style-name="Code">}</text:p>
      <text:p text:style-name="Code">int main()</text:p>
      <text:p text:style-name="Code">{</text:p>
      <text:p text:style-name="Code"><text:tab/>int n = 10;</text:p>
      <text:p text:style-name="Code"><text:tab/>int arr[n]; <text:s text:c="4"/>// Fill whole array with 100.</text:p>
      <text:p text:style-name="Code"><text:tab/>memset(arr, 10, n*sizeof(arr[0]));</text:p>
      <text:p text:style-name="Code"><text:tab/>printf("Array after memset()\n");</text:p>
      <text:p text:style-name="Code"><text:tab/>printArray(arr, n);</text:p>
      <text:p text:style-name="Code"><text:tab/>return 0;</text:p>
      <text:p text:style-name="Code">}</text:p>
      <text:p text:style-name="Code"/>
      <text:p text:style-name="Standard">Note that the above code doesn’t set array values to 10 as memset works character by character and an integer contains more than one byte (or characters).</text:p>
      <text:p text:style-name="Standard">However, if we replace 10 with -1, we get -1 values. Because representation of -1 contains all 1s in case of both char and int.</text:p>
      <text:p text:style-name="Standard"/>
      <text:list text:continue-numbering="true" text:style-name="Numbering_20_123">
        <text:list-item>
          <text:p text:style-name="Section"><text:bookmark-start text:name="__RefHeading___Toc12837_2206932868"/>Dangling pointer<text:bookmark-end text:name="__RefHeading___Toc12837_2206932868"/></text:p>
        </text:list-item>
      </text:list>
      <text:p text:style-name="Standard">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p>
      <text:p text:style-name="P11">Example 1</text:p>
      <text:p text:style-name="Standard"/>
      <text:p text:style-name="Code">#include &lt;stdlib.h&gt;</text:p>
      <text:p text:style-name="Code">int main()</text:p>
      <text:p text:style-name="Code">{</text:p>
      <text:p text:style-name="Code"><text:tab/>int* ptr = (int*)malloc(sizeof(int));</text:p>
      <text:p text:style-name="Code"><text:tab/>*ptr = 123;</text:p>
      <text:p text:style-name="Code"><text:tab/>free(ptr); //ptr has now become a dangling pointer.</text:p>
      <text:p text:style-name="Code"><text:tab/>return(0);</text:p>
      <text:p text:style-name="Code">}</text:p>
      <text:p text:style-name="Standard"/>
      <text:p text:style-name="P11">Example 2</text:p>
      <text:p text:style-name="Standard"/>
      <text:p text:style-name="Code">int* getPointer()</text:p>
      <text:p text:style-name="Code">{</text:p>
      <text:p text:style-name="Code"><text:s text:c="4"/>int x = 42;</text:p>
      <text:p text:style-name="Code"><text:s text:c="4"/>return &amp;x; <text:s/>// Returning address of a local variable</text:p>
      <text:p text:style-name="Code">}</text:p>
      <text:p text:style-name="Standard"/>
      <text:list text:continue-numbering="true" text:style-name="Numbering_20_123">
        <text:list-item>
          <text:p text:style-name="Section"><text:bookmark-start text:name="__RefHeading___Toc12835_2206932868"/>Void pointer<text:bookmark-end text:name="__RefHeading___Toc12835_2206932868"/></text:p>
        </text:list-item>
      </text:list>
      <text:p text:style-name="Standard">Void pointer is a specific pointer type – <text:span text:style-name="T3">void *</text:span>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point to any value. Important Points void pointers cannot be dereferenced. It can however be done using typecasting the void pointer Pointer arithmetic is not possible on pointers of void due to lack of concrete value and thus size.</text:p>
      <text:p text:style-name="Standard"><text:soft-page-break/></text:p>
      <text:p text:style-name="P11">Example</text:p>
      <text:p text:style-name="Standard"/>
      <text:p text:style-name="Code">#include&lt;stdlib.h&gt;</text:p>
      <text:p text:style-name="Code">int main()</text:p>
      <text:p text:style-name="Code">{</text:p>
      <text:p text:style-name="Code"><text:tab/>int x = 4;</text:p>
      <text:p text:style-name="Code"><text:tab/>float y = 5.5; //A void pointer</text:p>
      <text:p text:style-name="Code"><text:tab/>void *ptr;</text:p>
      <text:p text:style-name="Code"><text:tab/>ptr = &amp;x;</text:p>
      <text:p text:style-name="Code"><text:tab/>// (int*)ptr - does type casting of void.</text:p>
      <text:p text:style-name="Code"><text:tab/>// *((int*)ptr) dereferences the typecasted.</text:p>
      <text:p text:style-name="Code"><text:tab/>// void pointer variable.</text:p>
      <text:p text:style-name="Code"><text:tab/>printf("Integer variable is = %d", *((int*) ptr) ); // void pointer is now float</text:p>
      <text:p text:style-name="Code"><text:tab/>ptr = &amp;y; </text:p>
      <text:p text:style-name="Code"><text:tab/>printf("\nFloat variable is= %f", *((float*) ptr) ); return 0; </text:p>
      <text:p text:style-name="Code">}</text:p>
      <text:p text:style-name="Standard"/>
      <text:p text:style-name="P16">Output</text:p>
      <text:p text:style-name="P16"/>
      <text:p text:style-name="Code">Integer variable is = 4</text:p>
      <text:p text:style-name="Code">Float variable is= 5.500000</text:p>
      <text:p text:style-name="Standard"/>
      <text:list text:continue-numbering="true" text:style-name="Numbering_20_123">
        <text:list-item>
          <text:p text:style-name="Section"><text:bookmark-start text:name="__RefHeading___Toc12833_2206932868"/>NULL Pointer<text:bookmark-end text:name="__RefHeading___Toc12833_2206932868"/></text:p>
        </text:list-item>
      </text:list>
      <text:p text:style-name="Standard">NULL Pointer is a pointer which is pointing to nothing. In case, if we don’t have address to be assigned to a pointer, then we can simply use <text:span text:style-name="T3">NULL</text:span>.</text:p>
      <text:p text:style-name="Standard"/>
      <text:p text:style-name="Code">#include &lt;stdio.h&gt;</text:p>
      <text:p text:style-name="Code"/>
      <text:p text:style-name="Code">int main()</text:p>
      <text:p text:style-name="Code">{</text:p>
      <text:p text:style-name="Code"><text:tab/>// Null Pointer</text:p>
      <text:p text:style-name="Code"><text:tab/>int *ptr = NULL; </text:p>
      <text:p text:style-name="Code"><text:tab/>printf("The value of ptr is %u", ptr);</text:p>
      <text:p text:style-name="Code"><text:tab/>return 0; </text:p>
      <text:p text:style-name="Code">} </text:p>
      <text:p text:style-name="Standard"/>
      <text:p text:style-name="P11">Output</text:p>
      <text:p text:style-name="P11"/>
      <text:p text:style-name="Code">The value of ptr is 0</text:p>
      <text:p text:style-name="Code"/>
      <text:p text:style-name="P11">Important Points</text:p>
      <text:p text:style-name="Standard"/>
      <text:p text:style-name="Standard">NULL vs Uninitialized pointer – An uninitialized pointer stores an undefined value. A null pointer stores a defined value, but one that is defined by the environment to not be a valid address for any member or object.</text:p>
      <text:p text:style-name="Standard">NULL vs Void Pointer – Null pointer is a value, while void pointer is a type.</text:p>
      <text:p text:style-name="Standard"><text:soft-page-break/></text:p>
      <text:list text:continue-numbering="true" text:style-name="Numbering_20_123">
        <text:list-item>
          <text:p text:style-name="Section"><text:bookmark-start text:name="__RefHeading___Toc12831_2206932868"/>Wild pointer<text:bookmark-end text:name="__RefHeading___Toc12831_2206932868"/></text:p>
        </text:list-item>
      </text:list>
      <text:p text:style-name="Standard">A pointer which has not been initialized to anything (not even <text:span text:style-name="T3">NULL</text:span>) is known as wild pointer. The pointer may be initialized to a non-<text:span text:style-name="T3">NULL</text:span> garbage value that may not be a valid address.</text:p>
      <text:p text:style-name="Standard"/>
      <text:p text:style-name="Code">int main()</text:p>
      <text:p text:style-name="Code">{</text:p>
      <text:p text:style-name="Code"><text:tab/>int *p; <text:s/>/* wild pointer */</text:p>
      <text:p text:style-name="Code"><text:tab/>int x = 10;</text:p>
      <text:p text:style-name="Code"><text:tab/>p = &amp;x; <text:s/>//p is not a wild pointer now.</text:p>
      <text:p text:style-name="Code"><text:tab/>return 0; </text:p>
      <text:p text:style-name="Code">} </text:p>
      <text:p text:style-name="Standard"/>
      <text:list text:continue-numbering="true" text:style-name="Numbering_20_123">
        <text:list-item>
          <text:p text:style-name="Section"><text:bookmark-start text:name="__RefHeading___Toc12829_2206932868"/>Double Pointer (Pointer to Pointer)<text:bookmark-end text:name="__RefHeading___Toc12829_2206932868"/></text:p>
        </text:list-item>
      </text:list>
      <text:p text:style-name="Standard">We already know that a pointer points to a location in memory and thus used to store address of variables. So, when we define a pointer to pointer. The first pointer is used to store the address of second pointer. That is why they are also known as double pointers.</text:p>
      <text:p text:style-name="Standard">How to declare a pointer to pointer in C?</text:p>
      <text:p text:style-name="Standard">Declaring Pointer to Pointer is similar to declaring pointer in C. The difference is we have to place an additional ‘<text:span text:style-name="T3">*</text:span>’ before the name of pointer.</text:p>
      <text:p text:style-name="P17"/>
      <text:p text:style-name="P17">Syntax:</text:p>
      <text:p text:style-name="Standard"/>
      <text:p text:style-name="Code">int **ptr; <text:s text:c="3"/>// declaring double pointers</text:p>
      <text:p text:style-name="Standard"/>
      <text:p text:style-name="P11">Below diagram explains the concept of Double Pointers:</text:p>
      <text:p text:style-name="P17"/>
      <text:p text:style-name="Standard"><draw:frame draw:style-name="fr1" draw:name="Picture 55232" text:anchor-type="as-char" svg:width="15.857cm" svg:height="3.919cm" draw:z-index="0"><draw:image xlink:href="Pictures/1000000100000751000001CFE97EAF59.png" xlink:type="simple" xlink:show="embed" xlink:actuate="onLoad" draw:mime-type="image/png"/></draw:frame></text:p>
      <text:p text:style-name="Standard"/>
      <text:p text:style-name="Standard">The above diagram shows the memory representation of a pointer to pointer. The first pointer ptr1 stores the address of the second pointer ptr2 and the second pointer ptr2 stores the address of the variable.</text:p>
      <text:p text:style-name="P11">Let us understand this more clearly with the help of below program:</text:p>
      <text:p text:style-name="Standard"/>
      <text:p text:style-name="Code">// C program to demonstrate pointer to pointer #include &lt;stdio.h&gt; int main()</text:p>
      <text:p text:style-name="Code">{</text:p>
      <text:p text:style-name="Code"><text:tab/>int var = 789; // pointer for var</text:p>
      <text:p text:style-name="Code"><text:tab/>int *ptr2; // double pointer for ptr2</text:p>
      <text:p text:style-name="Code"><text:tab/>int **ptr1; // storing address of var in ptr2</text:p>
      <text:p text:style-name="Code"><text:tab/>ptr2 = &amp;var; // Storing address of ptr2 in ptr1</text:p>
      <text:p text:style-name="Code"><text:tab/>ptr1 = &amp;ptr2;</text:p>
      <text:p text:style-name="Code"><text:soft-page-break/><text:tab/>/* Displaying value of var using both single and double <text:tab/>pointers. */</text:p>
      <text:p text:style-name="Code"><text:tab/>printf("Value of var = %d\n", var ); </text:p>
      <text:p text:style-name="Code"><text:tab/>printf("Value of var using single pointer = %d\n", *ptr2 ); <text:tab/>printf("Value of var using double pointer = %d\n", **ptr1); <text:tab/>return 0; </text:p>
      <text:p text:style-name="Code">} </text:p>
      <text:p text:style-name="Standard"/>
      <text:p text:style-name="P11">Output</text:p>
      <text:p text:style-name="Code"/>
      <text:p text:style-name="Code">Value of var = 789</text:p>
      <text:p text:style-name="Code">Value of var using single pointer = 789</text:p>
      <text:p text:style-name="Code">Value of var using double pointer = 789</text:p>
      <text:p text:style-name="Standard"/>
      <text:list text:continue-numbering="true" text:style-name="Numbering_20_123">
        <text:list-item>
          <text:p text:style-name="Section"><text:bookmark-start text:name="__RefHeading___Toc18486_660237004"/>Call by reference function<text:bookmark-end text:name="__RefHeading___Toc18486_660237004"/></text:p>
        </text:list-item>
      </text:list>
      <text:p text:style-name="Standard">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p>
      <text:p text:style-name="Standard">To pass a value by reference, argument pointers are passed to the functions just like any other value. So accordingly you need to declare the function parameters as pointer types as in the following function <text:span text:style-name="T3">swap()</text:span>, which exchanges the values of the two integer variables pointed to, by their arguments.</text:p>
      <text:p text:style-name="Standard"/>
      <text:p text:style-name="Code">/* Function definition to swap the values */</text:p>
      <text:p text:style-name="Code">int swap(int *x, int *y)</text:p>
      <text:p text:style-name="Code">{</text:p>
      <text:p text:style-name="Code"><text:tab/>int temp;</text:p>
      <text:p text:style-name="Code"><text:tab/>temp = *x; <text:s text:c="3"/>/* save the value at address x */</text:p>
      <text:p text:style-name="Code"><text:tab/>*x = *y; <text:s text:c="5"/>/* put y into x */</text:p>
      <text:p text:style-name="Code"><text:tab/>*y = temp; <text:s text:c="3"/>/* put temp into y */</text:p>
      <text:p text:style-name="Code"><text:tab/>return 0;</text:p>
      <text:p text:style-name="Code">}</text:p>
      <text:p text:style-name="Code"/>
      <text:p text:style-name="Standard">Let us now call the function <text:span text:style-name="T3">swap()</text:span> by passing values by reference as in the following example.</text:p>
      <text:p text:style-name="Standard"/>
      <text:p text:style-name="Code">#include &lt;stdio.h&gt;</text:p>
      <text:p text:style-name="Code"/>
      <text:p text:style-name="Code">/* Function declaration */</text:p>
      <text:p text:style-name="Code">void swap(int *x, int *y);</text:p>
      <text:p text:style-name="Code"/>
      <text:p text:style-name="Code">int main ()</text:p>
      <text:p text:style-name="Code">{</text:p>
      <text:p text:style-name="Code"><text:tab/>/* Local variable definition */</text:p>
      <text:p text:style-name="Code"><text:tab/>int a = 100;</text:p>
      <text:p text:style-name="Code"><text:tab/>int b = 200;</text:p>
      <text:p text:style-name="Code"><text:tab/>printf("Before swap, value of a : %d\n", a );</text:p>
      <text:p text:style-name="Code"><text:tab/>printf("Before swap, value of b : %d\n", b );</text:p>
      <text:p text:style-name="Code"><text:soft-page-break/><text:tab/>/* Calling a function to swap the values. * &amp;a indicates pointer to a ie. address of variable a and * &amp;b indicates pointer to b ie. address of variable b. */</text:p>
      <text:p text:style-name="Code"><text:tab/>swap(&amp;a, &amp;b);</text:p>
      <text:p text:style-name="Code"><text:tab/>printf("After swap, value of a : %d\n", a );</text:p>
      <text:p text:style-name="Code"><text:tab/>printf("After swap, value of b : %d\n", b );</text:p>
      <text:p text:style-name="Code"><text:tab/>return 0;</text:p>
      <text:p text:style-name="Code">}</text:p>
      <text:p text:style-name="Code"/>
      <text:p text:style-name="Standard">Let us put the above code in a single C file, compile and execute it, to produce the following result.</text:p>
      <text:p text:style-name="Standard"/>
      <text:p text:style-name="Code">Before swap, value of a :100</text:p>
      <text:p text:style-name="Code">Before swap, value of b :200 After swap, value of a :200</text:p>
      <text:p text:style-name="Code">After swap, value of b :100</text:p>
      <text:p text:style-name="Code"/>
      <text:p text:style-name="Standard">It shows that the change has reflected outside the function as well, unlike call by value where the changes do not reflect outside the function.</text:p>
      <text:p text:style-name="P40"/>
      <text:list text:continue-numbering="true" text:style-name="Numbering_20_123">
        <text:list-item>
          <text:p text:style-name="Section"><text:bookmark-start text:name="__RefHeading___Toc12827_2206932868"/>Call by value function<text:bookmark-end text:name="__RefHeading___Toc12827_2206932868"/></text:p>
        </text:list-item>
      </text:list>
      <text:p text:style-name="Standard">The call by value method of passing arguments to a function copies the actual value of an argument into the formal parameter of the function. In this case, changes made to the parameter inside the function have no effect on the argument.</text:p>
      <text:p text:style-name="Standard">By default, C programming uses call by value to pass arguments. In general, it means the code within a function cannot alter the arguments used to call the function. Consider the function <text:span text:style-name="T3">swap()</text:span> definition as follows.</text:p>
      <text:p text:style-name="Standard"/>
      <text:p text:style-name="Code">/* Function definition to swap the values */</text:p>
      <text:p text:style-name="Code">int swap(int x, int y)</text:p>
      <text:p text:style-name="Code">{</text:p>
      <text:p text:style-name="Code"><text:tab/>int temp;</text:p>
      <text:p text:style-name="Code"><text:tab/>temp = x; /* save the value of x */</text:p>
      <text:p text:style-name="Code"><text:tab/>x = y; <text:s text:c="3"/>/* put y into x */</text:p>
      <text:p text:style-name="Code"><text:tab/>y = temp; /* put temp into y */</text:p>
      <text:p text:style-name="Code"><text:tab/>return 0;</text:p>
      <text:p text:style-name="Code">}</text:p>
      <text:p text:style-name="Code"/>
      <text:p text:style-name="Standard">Now, let us call the function swap() by passing actual values as in the following example.</text:p>
      <text:p text:style-name="Standard"/>
      <text:p text:style-name="Code">#include &lt;stdio.h&gt;</text:p>
      <text:p text:style-name="Code"/>
      <text:p text:style-name="Code">/* function declaration */</text:p>
      <text:p text:style-name="Code">void swap(int x, int y);</text:p>
      <text:p text:style-name="Code"/>
      <text:p text:style-name="Code">int main ()</text:p>
      <text:p text:style-name="Code">{</text:p>
      <text:p text:style-name="Code"><text:tab/>/* local variable definition */</text:p>
      <text:p text:style-name="Code"><text:tab/>int a = 100;</text:p>
      <text:p text:style-name="Code"><text:tab/>int b = 200;</text:p>
      <text:p text:style-name="Code"><text:tab/>printf("Before swap, value of a : %d\n", a );</text:p>
      <text:p text:style-name="Code"><text:tab/>printf("Before swap, value of b : %d\n", b );</text:p>
      <text:p text:style-name="Code"><text:soft-page-break/><text:tab/>/* calling a function to swap the values */</text:p>
      <text:p text:style-name="Code"><text:tab/>swap(a, b);</text:p>
      <text:p text:style-name="Code"><text:tab/>printf("After swap, value of a : %d\n", a );</text:p>
      <text:p text:style-name="Code"><text:tab/>printf("After swap, value of b : %d\n", b );</text:p>
      <text:p text:style-name="Code"><text:tab/>return 0;</text:p>
      <text:p text:style-name="Code">}</text:p>
      <text:p text:style-name="Code"/>
      <text:p text:style-name="Standard">Let us put the above code in a single C file, compile and execute it, it will produce the following result.</text:p>
      <text:p text:style-name="Standard"/>
      <text:p text:style-name="Code">Before swap, value of a :100</text:p>
      <text:p text:style-name="Code">Before swap, value of b :200 After swap, value of a :100</text:p>
      <text:p text:style-name="Code">After swap, value of b :200</text:p>
      <text:p text:style-name="Code"/>
      <text:p text:style-name="Standard">It shows that there are no changes in the values, though they had been changed inside the function.</text:p>
      <text:p text:style-name="Standard"/>
      <text:list text:continue-numbering="true" text:style-name="Numbering_20_123">
        <text:list-item>
          <text:p text:style-name="Section"><text:bookmark-start text:name="__RefHeading___Toc12825_2206932868"/>volatile and const volatile keyword<text:bookmark-end text:name="__RefHeading___Toc12825_2206932868"/></text:p>
        </text:list-item>
      </text:list>
      <text:p text:style-name="Standard">Used to avoid compiler optimizations for the specified variable. Normally used with interrupts and GPIO pins. Used to tell that the value of the variable can change at any time.</text:p>
      <text:p text:style-name="Standard"/>
      <text:p text:style-name="Code">volatile int x;</text:p>
      <text:p text:style-name="Code"/>
      <text:p text:style-name="Standard">const means that the value isn’t modifiable by the program.</text:p>
      <text:p text:style-name="Standard">And volatile means that the value is subject to sudden change (possibly from outside the program).</text:p>
      <text:p text:style-name="Standard">In fact, the C Standard gives an example of a valid declaration which is both const and volatile. The example is:</text:p>
      <text:p text:style-name="Standard"/>
      <text:p text:style-name="Code">const volatile int real_time_clock;</text:p>
      <text:p text:style-name="Standard"/>
      <text:p text:style-name="Standard">where,<text:span text:style-name="T3"> real_time_clock</text:span> may be modifiable by hardware, but cannot be assigned to, incremented, or decremented.</text:p>
      <text:p text:style-name="Standard"/>
      <text:list text:continue-numbering="true" text:style-name="Numbering_20_123">
        <text:list-item>
          <text:p text:style-name="Section"><text:bookmark-start text:name="__RefHeading___Toc12823_2206932868"/><text:span text:style-name="T1">s</text:span>tatic extern is invalid<text:bookmark-end text:name="__RefHeading___Toc12823_2206932868"/></text:p>
        </text:list-item>
      </text:list>
      <text:p text:style-name="Standard"><text:span text:style-name="T3">static</text:span> and <text:span text:style-name="T3">extern</text:span> keywords cannot be used together, while declaring a variable as below: static extern int num;</text:p>
      <text:p text:style-name="Standard">Because, static restricts the variable to the file in which it is declared and extern is used to access the variable from another file to this file. Both of these are contradictory and creates a conflict.</text:p>
      <text:p text:style-name="Standard"/>
      <text:list text:continue-numbering="true" text:style-name="Numbering_20_123">
        <text:list-item>
          <text:p text:style-name="Section"><text:bookmark-start text:name="__RefHeading___Toc12821_2206932868"/>inline Function<text:bookmark-end text:name="__RefHeading___Toc12821_2206932868"/></text:p>
        </text:list-item>
      </text:list>
      <text:p text:style-name="Standard">Inline Function are those function whose definitions are small and be substituted at the place where its function call is happened. Function substitution is totally compiler choice.</text:p>
      <text:p text:style-name="Standard"/>
      <text:p text:style-name="Code">#include &lt;stdio.h&gt;</text:p>
      <text:p text:style-name="Code"/>
      <text:p text:style-name="Code">// Inline function in C</text:p>
      <text:p text:style-name="Code">inline int foo()</text:p>
      <text:p text:style-name="Code">{</text:p>
      <text:p text:style-name="Code"><text:tab/>return 2;</text:p>
      <text:p text:style-name="Code"><text:soft-page-break/>}</text:p>
      <text:p text:style-name="Code"/>
      <text:p text:style-name="Code">// Driver code</text:p>
      <text:p text:style-name="Code">int main()</text:p>
      <text:p text:style-name="Code">{</text:p>
      <text:p text:style-name="Code"><text:tab/>int ret; <text:s text:c="4"/>// inline function call</text:p>
      <text:p text:style-name="Code"><text:tab/>ret = foo();</text:p>
      <text:p text:style-name="Code"><text:tab/>printf("Output is: %d\n", ret);</text:p>
      <text:p text:style-name="Code"><text:tab/>return 0;</text:p>
      <text:p text:style-name="Code">}</text:p>
      <text:p text:style-name="Code"/>
      <text:p text:style-name="P18">Output</text:p>
      <text:p text:style-name="Standard"/>
      <text:p text:style-name="Code">In function `main':</text:p>
      <text:p text:style-name="Code">undefined reference to `foo'.</text:p>
      <text:p text:style-name="Code"/>
      <text:p text:style-name="Standard">Why this error happened?</text:p>
      <text:p text:style-name="Standard">This is one of the side effects of GCC the way it handles inline function, when compiled, GCC performs inline substitution as the part of optimisation. So, there is no function call present (<text:span text:style-name="T3">foo</text:span>) inside main. Normally GCC’s file scope is “not extern linkage”. That means inline function is never ever provided to the linker which is causing linker error, mentioned above.</text:p>
      <text:p text:style-name="Standard">How to remove this error?</text:p>
      <text:p text:style-name="Standard">To resolve this problem use “<text:span text:style-name="T3">static</text:span>” before inline. Using static keyword forces the compiler to consider this inline function in the linker, and hence the program compiles and runs successfully.</text:p>
      <text:p text:style-name="P11"/>
      <text:p text:style-name="P11">Example</text:p>
      <text:p text:style-name="Standard"/>
      <text:p text:style-name="Code">#include &lt;stdio.h&gt;// Inline function in C</text:p>
      <text:p text:style-name="Code"/>
      <text:p text:style-name="Code">static inline int foo()</text:p>
      <text:p text:style-name="Code">{</text:p>
      <text:p text:style-name="Code"><text:tab/>return 2;</text:p>
      <text:p text:style-name="Code">}</text:p>
      <text:p text:style-name="Code"/>
      <text:p text:style-name="Code">// Driver code</text:p>
      <text:p text:style-name="Code">int main()</text:p>
      <text:p text:style-name="Code">{</text:p>
      <text:p text:style-name="Code"><text:tab/>int ret; // inline function call</text:p>
      <text:p text:style-name="Code"><text:tab/>ret = foo();</text:p>
      <text:p text:style-name="Code"><text:tab/>printf("Output is: %d\n", ret);</text:p>
      <text:p text:style-name="Code"><text:tab/>return 0;</text:p>
      <text:p text:style-name="Code">}</text:p>
      <text:p text:style-name="Standard"/>
      <text:p text:style-name="P11">Output</text:p>
      <text:p text:style-name="Standard"/>
      <text:p text:style-name="Code">Output is: 2</text:p>
      <text:p text:style-name="Standard"/>
      <text:list xml:id="list224009550865345" text:continue-numbering="true" text:style-name="Numbering_20_123">
        <text:list-item>
          <text:p text:style-name="Section"><text:bookmark-start text:name="__RefHeading___Toc12819_2206932868"/>Storage class<text:bookmark-end text:name="__RefHeading___Toc12819_2206932868"/></text:p>
        </text:list-item>
      </text:list>
      <text:p text:style-name="Standard"><text:soft-page-break/>A storage class defines the scope (visibility) and life-time of variables and/or functions within a C Program. They precede the type that they modify. We have four different storage classes in a C program.</text:p>
      <text:p text:style-name="Standard"/>
      <text:p text:style-name="Code">auto</text:p>
      <text:p text:style-name="Code">static</text:p>
      <text:p text:style-name="Code">register</text:p>
      <text:p text:style-name="Code">extern</text:p>
      <text:p text:style-name="Code"/>
      <text:list text:style-name="L2">
        <text:list-item>
          <text:p text:style-name="P88">auto</text:p>
        </text:list-item>
      </text:list>
      <text:p text:style-name="Standard">The auto storage class is the default storage class for all local variables.</text:p>
      <text:p text:style-name="Standard"/>
      <text:p text:style-name="Code">{</text:p>
      <text:p text:style-name="Code"><text:tab/>int mount;</text:p>
      <text:p text:style-name="Code"><text:tab/>auto int month;</text:p>
      <text:p text:style-name="Code">}</text:p>
      <text:p text:style-name="Code"/>
      <text:p text:style-name="Standard">The example above defines two variables with in the same storage class. '<text:span text:style-name="T3">auto</text:span>' can only be used within functions, i.e., local variables.</text:p>
      <text:p text:style-name="Standard"/>
      <text:list text:continue-numbering="true" text:style-name="L2">
        <text:list-item>
          <text:p text:style-name="P88">register</text:p>
        </text:list-item>
      </text:list>
      <text:p text:style-name="Standard">The register storage class is used to define local variables that should be stored in a register instead of RAM. This means that the variable has a maximum size equal to the register size (usually one word) and can't have the unary '<text:span text:style-name="T3">&amp;</text:span>' operator applied to it (as it does not have a memory location).</text:p>
      <text:p text:style-name="Standard"/>
      <text:p text:style-name="Code">{</text:p>
      <text:p text:style-name="Code"><text:tab/>register int miles;</text:p>
      <text:p text:style-name="Code">}</text:p>
      <text:p text:style-name="Code"/>
      <text:p text:style-name="Standard">The register should only be used for variables that require quick access such as counters. It should also be noted that defining '<text:span text:style-name="T3">register</text:span>' does not mean that the variable will be stored in a register. It means that it MIGHT be stored in a register depending on hardware and implementation restrictions.</text:p>
      <text:p text:style-name="Standard"/>
      <text:list text:continue-numbering="true" text:style-name="L2">
        <text:list-item>
          <text:p text:style-name="P88">static</text:p>
        </text:list-item>
      </text:list>
      <text:p text:style-name="Standard">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p>
      <text:p text:style-name="Standard">The static modifier may also be applied to global variables. When this is done, it causes that variable's scope to be restricted to the file in which it is declared.</text:p>
      <text:p text:style-name="Standard"/>
      <text:p text:style-name="P11">Example</text:p>
      <text:p text:style-name="Standard"/>
      <text:p text:style-name="Code">#include &lt;stdio.h&gt;</text:p>
      <text:p text:style-name="Code"/>
      <text:p text:style-name="Code">static int count = 5;</text:p>
      <text:p text:style-name="Code">/* Global static variable only accessible inside this file. It cannot be accessed with extern keyword from another file. */</text:p>
      <text:p text:style-name="Code"><text:soft-page-break/></text:p>
      <text:p text:style-name="Code">void func(void);</text:p>
      <text:p text:style-name="Code"/>
      <text:p text:style-name="Code">int main()</text:p>
      <text:p text:style-name="Code">{</text:p>
      <text:p text:style-name="Code"><text:tab/>while(count--)</text:p>
      <text:p text:style-name="Code"><text:tab/>{</text:p>
      <text:p text:style-name="Code"><text:tab/><text:tab/>func();</text:p>
      <text:p text:style-name="Code"><text:tab/>}</text:p>
      <text:p text:style-name="Code"><text:tab/>return 0;</text:p>
      <text:p text:style-name="Code">}</text:p>
      <text:p text:style-name="Code"/>
      <text:p text:style-name="Code">/* function definition */</text:p>
      <text:p text:style-name="Code">void func(void)</text:p>
      <text:p text:style-name="Code">{</text:p>
      <text:p text:style-name="Code"><text:tab/>static int i = 5; /* Local static variable. It gets initialized only once and retains its updated value over successive this function calls. It is invisible to outside this function. It is stored in initialized .data segment. */</text:p>
      <text:p text:style-name="Code"><text:tab/>i++;</text:p>
      <text:p text:style-name="Code"><text:tab/>printf("i is %d and count is %d\n", i, count);</text:p>
      <text:p text:style-name="Code">}</text:p>
      <text:p text:style-name="Code"/>
      <text:p text:style-name="Standard">When the above code is compiled and executed, it produces the following result <text:span text:style-name="T3">i</text:span> is <text:span text:style-name="T3">6</text:span> and <text:span text:style-name="T3">count</text:span> is <text:span text:style-name="T3">4</text:span></text:p>
      <text:p text:style-name="Standard"><text:span text:style-name="T3"/></text:p>
      <text:p text:style-name="Code">i is 7 and count is 3</text:p>
      <text:p text:style-name="Code">i is 8 and count is 2</text:p>
      <text:p text:style-name="Code">i is 9 and count is 1</text:p>
      <text:p text:style-name="Code">i is 10 and count is 0</text:p>
      <text:p text:style-name="Code"/>
      <text:list text:continue-numbering="true" text:style-name="L2">
        <text:list-item>
          <text:p text:style-name="P88">extern</text:p>
        </text:list-item>
      </text:list>
      <text:p text:style-name="Standard">The extern storage class is used to give a reference of a global variable that is visible to ALL the program files. When you use '<text:span text:style-name="T3">extern</text:span>', the variable cannot be initialized however, it points the variable name at a storage location that has been previously defined.</text:p>
      <text:p text:style-name="Standard">When you have multiple files and you define a global variable or function, which will also be used in other files, then extern will be used in another file to provide the reference of defined variable or function. Just for understanding, <text:span text:style-name="T3">extern</text:span> is used to declare a global variable or function in another file.</text:p>
      <text:p text:style-name="Standard">The extern modifier is most commonly used when there are two or more files sharing the same global variables or functions as explained below.</text:p>
      <text:p text:style-name="Standard"/>
      <text:p text:style-name="P11">First <text:span text:style-name="T7">f</text:span>ile: main.c</text:p>
      <text:p text:style-name="Standard"/>
      <text:p text:style-name="Code">#include &lt;stdio.h&gt;</text:p>
      <text:p text:style-name="Code"/>
      <text:p text:style-name="Code">int count;</text:p>
      <text:p text:style-name="Code">extern void write_extern();</text:p>
      <text:p text:style-name="Code"/>
      <text:p text:style-name="Code">int main()</text:p>
      <text:p text:style-name="Code"><text:soft-page-break/>{</text:p>
      <text:p text:style-name="Code"><text:tab/>count = 5;</text:p>
      <text:p text:style-name="Code"><text:tab/>write_extern();</text:p>
      <text:p text:style-name="Code">}</text:p>
      <text:p text:style-name="Code"/>
      <text:p text:style-name="P11">Second File: support.c</text:p>
      <text:p text:style-name="P11"/>
      <text:p text:style-name="Code">#include &lt;stdio.h&gt;</text:p>
      <text:p text:style-name="Code">extern int count;</text:p>
      <text:p text:style-name="Code">void write_extern(void)</text:p>
      <text:p text:style-name="Code">{</text:p>
      <text:p text:style-name="Code"><text:tab/>printf("count is %d\n", count);</text:p>
      <text:p text:style-name="Code">}</text:p>
      <text:p text:style-name="Code"/>
      <text:p text:style-name="Standard">Here, extern is being used to declare count in the second file, where as it has its definition in the first file, <text:span text:style-name="T3">main.c</text:span>. Now, compile these two files as follows.</text:p>
      <text:p text:style-name="Standard"/>
      <text:p text:style-name="Code">$ gcc main.c support.c</text:p>
      <text:p text:style-name="Standard"/>
      <text:p text:style-name="Standard">It will produce the executable program a.out. When this program is executed, it produces the following result.</text:p>
      <text:p text:style-name="Standard"/>
      <text:p text:style-name="Code">count is 5</text:p>
      <text:p text:style-name="Standard"/>
      <text:list text:continue-list="list224009550865345" text:style-name="Numbering_20_123">
        <text:list-item>
          <text:p text:style-name="Section"><text:bookmark-start text:name="__RefHeading___Toc12817_2206932868"/>Structure declaration and definition<text:bookmark-end text:name="__RefHeading___Toc12817_2206932868"/></text:p>
        </text:list-item>
      </text:list>
      <text:p text:style-name="Code">struct student</text:p>
      <text:p text:style-name="Code">{</text:p>
      <text:p text:style-name="Code"><text:tab/>int id;</text:p>
      <text:p text:style-name="Code"><text:tab/>char name[20];</text:p>
      <text:p text:style-name="Code">};</text:p>
      <text:p text:style-name="Code"/>
      <text:p text:style-name="Code">int main()</text:p>
      <text:p text:style-name="Code">{</text:p>
      <text:p text:style-name="Code"><text:tab/>struct student record;</text:p>
      <text:p text:style-name="Code"><text:tab/>record.id = 12;</text:p>
      <text:p text:style-name="Code"><text:tab/>strcpy(record.name, "Raju");</text:p>
      <text:p text:style-name="Code"><text:tab/>return(0);</text:p>
      <text:p text:style-name="Code">}</text:p>
      <text:p text:style-name="Code"/>
      <text:p text:style-name="P53">O<text:span text:style-name="T8">r</text:span></text:p>
      <text:p text:style-name="P11"/>
      <text:p text:style-name="Code">struct student</text:p>
      <text:p text:style-name="Code">{</text:p>
      <text:p text:style-name="Code"><text:tab/>int id;</text:p>
      <text:p text:style-name="Code"><text:tab/>char name[20];</text:p>
      <text:p text:style-name="Code">}record;</text:p>
      <text:p text:style-name="Code"/>
      <text:p text:style-name="Code">int main()</text:p>
      <text:p text:style-name="Code">{</text:p>
      <text:p text:style-name="Code"><text:tab/>record.id = 12;</text:p>
      <text:p text:style-name="Code"><text:soft-page-break/><text:tab/>strcpy(record.name, "Raju");</text:p>
      <text:p text:style-name="Code"><text:tab/>return(0);</text:p>
      <text:p text:style-name="Code">}</text:p>
      <text:p text:style-name="Standard"/>
      <text:list text:continue-numbering="true" text:style-name="Numbering_20_123">
        <text:list-item>
          <text:p text:style-name="Section"><text:bookmark-start text:name="__RefHeading___Toc12815_2206932868"/>typedef and struct<text:bookmark-end text:name="__RefHeading___Toc12815_2206932868"/></text:p>
        </text:list-item>
      </text:list>
      <text:p text:style-name="Code">typedef struct</text:p>
      <text:p text:style-name="Code">{</text:p>
      <text:p text:style-name="Code"><text:tab/>int x, y;</text:p>
      <text:p text:style-name="Code">}Point;</text:p>
      <text:p text:style-name="Code">Point point_new(int x, int y)</text:p>
      <text:p text:style-name="Code">{</text:p>
      <text:p text:style-name="Code"><text:tab/>Point a;</text:p>
      <text:p text:style-name="Code"><text:tab/>a.x = x;</text:p>
      <text:p text:style-name="Code"><text:tab/>a.y = y;</text:p>
      <text:p text:style-name="Code"><text:tab/>return a;</text:p>
      <text:p text:style-name="Code">}</text:p>
      <text:p text:style-name="Standard"/>
      <text:list xml:id="list224008292486700" text:continue-numbering="true" text:style-name="Numbering_20_123">
        <text:list-item>
          <text:p text:style-name="Section"><text:bookmark-start text:name="__RefHeading___Toc12813_2206932868"/>Passing structure to function<text:bookmark-end text:name="__RefHeading___Toc12813_2206932868"/></text:p>
        </text:list-item>
      </text:list>
      <text:p text:style-name="Standard">It can be done in below 3 ways.</text:p>
      <text:p text:style-name="Standard"/>
      <text:list text:style-name="L3">
        <text:list-item>
          <text:p text:style-name="P90">Passing structure to a function by value</text:p>
        </text:list-item>
        <text:list-item>
          <text:p text:style-name="P91">Passing structure to a function by address (reference)</text:p>
        </text:list-item>
        <text:list-item>
          <text:p text:style-name="P91"><text:span text:style-name="T9">De</text:span>clare structure variable as global</text:p>
        </text:list-item>
      </text:list>
      <text:p text:style-name="P54"/>
      <text:p text:style-name="P11">Example program – passing structure to function in C by value:</text:p>
      <text:p text:style-name="Standard"/>
      <text:p text:style-name="Standard">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p>
      <text:p text:style-name="Standard"/>
      <text:p text:style-name="Code">#include &lt;stdio.h&gt;</text:p>
      <text:p text:style-name="Code">#include &lt;string.h&gt;</text:p>
      <text:p text:style-name="Code"/>
      <text:p text:style-name="Code">struct student</text:p>
      <text:p text:style-name="Code">{</text:p>
      <text:p text:style-name="Code"><text:tab/>int id;</text:p>
      <text:p text:style-name="Code"><text:tab/>char name[20];</text:p>
      <text:p text:style-name="Code"><text:tab/>float percentage;</text:p>
      <text:p text:style-name="Code">};</text:p>
      <text:p text:style-name="Code"/>
      <text:p text:style-name="Code">void func(struct student record);</text:p>
      <text:p text:style-name="Code">int main()</text:p>
      <text:p text:style-name="Code">{</text:p>
      <text:p text:style-name="Code"><text:tab/>struct student record;</text:p>
      <text:p text:style-name="Code"><text:tab/>record.id = 1;</text:p>
      <text:p text:style-name="Code"><text:tab/>strcpy(record.name, "Raju");</text:p>
      <text:p text:style-name="Code"><text:tab/>record.percentage = 86.5;</text:p>
      <text:p text:style-name="Code"><text:tab/>func(record);</text:p>
      <text:p text:style-name="Code"><text:tab/>return 0;</text:p>
      <text:p text:style-name="Code">}</text:p>
      <text:p text:style-name="Code"><text:soft-page-break/>void func(struct student record)</text:p>
      <text:p text:style-name="Code">{</text:p>
      <text:p text:style-name="Code"><text:tab/>printf(" Id is: %d \n", record.id);</text:p>
      <text:p text:style-name="Code"><text:tab/>printf(" Name is: %s \n", record.name);</text:p>
      <text:p text:style-name="Code"><text:tab/>printf(" Percentage is: %f \n", record.percentage);</text:p>
      <text:p text:style-name="Code">}</text:p>
      <text:p text:style-name="Code"/>
      <text:p text:style-name="P11">Output</text:p>
      <text:p text:style-name="Standard"><text:span text:style-name="T4"/></text:p>
      <text:p text:style-name="Code">Id is: 1</text:p>
      <text:p text:style-name="Code">Name is: Raju</text:p>
      <text:p text:style-name="Code">Percentage is: 86.500000</text:p>
      <text:p text:style-name="Standard"/>
      <text:p text:style-name="P11">Example program – Passing structure to function in C by address:</text:p>
      <text:p text:style-name="P11"/>
      <text:p text:style-name="Standard">In this program, the whole structure is passed to another function by address. It means only the address of the structure is passed to another function. The whole structure is not passed to another function with all members and their values. So, this structure can be accessed from called function by its address.</text:p>
      <text:p text:style-name="Standard"/>
      <text:p text:style-name="Code">#include &lt;stdio.h&gt;</text:p>
      <text:p text:style-name="Code">#include &lt;string.h&gt;</text:p>
      <text:p text:style-name="Code"/>
      <text:p text:style-name="Code">struct student</text:p>
      <text:p text:style-name="Code">{</text:p>
      <text:p text:style-name="Code"><text:s text:c="4"/>int id;</text:p>
      <text:p text:style-name="Code"><text:s text:c="4"/>char name[20];</text:p>
      <text:p text:style-name="Code"><text:s text:c="4"/>float percentage;</text:p>
      <text:p text:style-name="Code">};</text:p>
      <text:p text:style-name="Code">void func(struct student *record);</text:p>
      <text:p text:style-name="Code">int main()</text:p>
      <text:p text:style-name="Code">{</text:p>
      <text:p text:style-name="Code"><text:s text:c="4"/>struct student record;</text:p>
      <text:p text:style-name="Code"><text:s text:c="4"/>record.id = 1;</text:p>
      <text:p text:style-name="Code"><text:s text:c="4"/>strcpy(record.name, "Raju");</text:p>
      <text:p text:style-name="Code"><text:s text:c="4"/>record.percentage = 86.5;</text:p>
      <text:p text:style-name="Code"><text:s text:c="4"/>func(&amp;record);</text:p>
      <text:p text:style-name="Code"><text:s text:c="4"/>return 0;</text:p>
      <text:p text:style-name="Code">}</text:p>
      <text:p text:style-name="Code">void func(struct student *record)</text:p>
      <text:p text:style-name="Code">{</text:p>
      <text:p text:style-name="Code"><text:s text:c="4"/>printf(" Id is: %d \n", record-&gt;id);</text:p>
      <text:p text:style-name="Code"><text:s text:c="4"/>printf(" Name is: %s \n", record-&gt;name);</text:p>
      <text:p text:style-name="Code"><text:s text:c="4"/>printf(" Percentage is: %f \n", record-&gt;percentage);</text:p>
      <text:p text:style-name="Code">}</text:p>
      <text:p text:style-name="Code"/>
      <text:p text:style-name="P11">Output</text:p>
      <text:p text:style-name="Standard"/>
      <text:p text:style-name="Code">Id is: 1</text:p>
      <text:p text:style-name="Code">Name is: Raju</text:p>
      <text:p text:style-name="Code"><text:soft-page-break/>Percentage is: 86.500000</text:p>
      <text:p text:style-name="Code"/>
      <text:p text:style-name="P19">Example program to declare a structure variable as global in C:</text:p>
      <text:p text:style-name="P19"/>
      <text:p text:style-name="Standard">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p>
      <text:p text:style-name="Standard"/>
      <text:p text:style-name="Code">#include &lt;stdio.h&gt;</text:p>
      <text:p text:style-name="Code">#include &lt;string.h&gt;</text:p>
      <text:p text:style-name="Code"/>
      <text:p text:style-name="Code">struct student</text:p>
      <text:p text:style-name="Code">{</text:p>
      <text:p text:style-name="Code"><text:s text:c="4"/>int id;</text:p>
      <text:p text:style-name="Code"><text:s text:c="4"/>char name[20];</text:p>
      <text:p text:style-name="Code"><text:s text:c="4"/>float percentage;</text:p>
      <text:p text:style-name="Code">};</text:p>
      <text:p text:style-name="Code">struct student record; // Global declaration of structure</text:p>
      <text:p text:style-name="Code">void structure_demo();</text:p>
      <text:p text:style-name="Code">int main()</text:p>
      <text:p text:style-name="Code">{</text:p>
      <text:p text:style-name="Code"><text:s text:c="4"/>record.id = 1;</text:p>
      <text:p text:style-name="Code"><text:s text:c="4"/>strcpy(record.name, "Raju");</text:p>
      <text:p text:style-name="Code"><text:s text:c="4"/>record.percentage = 86.5;</text:p>
      <text:p text:style-name="Code"><text:s text:c="4"/>structure_demo();</text:p>
      <text:p text:style-name="Code"><text:s text:c="4"/>return 0;</text:p>
      <text:p text:style-name="Code">}</text:p>
      <text:p text:style-name="Code">void structure_demo()</text:p>
      <text:p text:style-name="Code">{</text:p>
      <text:p text:style-name="Code"><text:s text:c="4"/>printf(" Id is: %d \n", record.id);</text:p>
      <text:p text:style-name="Code"><text:s text:c="4"/>printf(" Name is: %s \n", record.name);</text:p>
      <text:p text:style-name="Code"><text:s text:c="4"/>printf(" Percentage is: %f \n", record.percentage);</text:p>
      <text:p text:style-name="Code">}</text:p>
      <text:p text:style-name="P20"/>
      <text:p text:style-name="P20">Output</text:p>
      <text:p text:style-name="Standard"/>
      <text:p text:style-name="Code">Id is: 1</text:p>
      <text:p text:style-name="Code">Name is: Raju</text:p>
      <text:p text:style-name="Code">Percentage is: 86.500000</text:p>
      <text:p text:style-name="Standard"/>
      <text:list text:continue-list="list224008292486700" text:style-name="Numbering_20_123">
        <text:list-item>
          <text:p text:style-name="Section"><text:bookmark-start text:name="__RefHeading___Toc12811_2206932868"/>Static Function<text:bookmark-end text:name="__RefHeading___Toc12811_2206932868"/></text:p>
        </text:list-item>
      </text:list>
      <text:p text:style-name="Standard">In C, functions are global by default. The “<text:span text:style-name="T3">static</text:span>” keyword before a function name makes it <text:span text:style-name="T3">static</text:span>. For example, below function <text:span text:style-name="T3">fun()</text:span> is <text:span text:style-name="T3">static</text:span>.</text:p>
      <text:p text:style-name="Standard"/>
      <text:p text:style-name="Code">static int fun(void)</text:p>
      <text:p text:style-name="Code">{</text:p>
      <text:p text:style-name="Code"><text:s text:c="4"/>printf("I am a static function ");</text:p>
      <text:p text:style-name="Code">}</text:p>
      <text:p text:style-name="Standard"/>
      <text:p text:style-name="Standard"><text:soft-page-break/>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p>
      <text:p text:style-name="Standard">For example, if we store following program in one file file1.c</text:p>
      <text:p text:style-name="Standard"/>
      <text:p text:style-name="Code">/* Inside file1.c */</text:p>
      <text:p text:style-name="Code">static void fun1(void)</text:p>
      <text:p text:style-name="Code">{</text:p>
      <text:p text:style-name="Code"><text:s text:c="4"/>puts("fun1 called");</text:p>
      <text:p text:style-name="Code">}</text:p>
      <text:p text:style-name="Standard"/>
      <text:p text:style-name="Standard">And store following program in another file file2.c</text:p>
      <text:p text:style-name="Standard"/>
      <text:p text:style-name="Code">/* Inside file2.c <text:s/>*/</text:p>
      <text:p text:style-name="Code">int main(void)</text:p>
      <text:p text:style-name="Code">{</text:p>
      <text:p text:style-name="Code"><text:s text:c="4"/>fun1();</text:p>
      <text:p text:style-name="Code"><text:s text:c="4"/>getchar();</text:p>
      <text:p text:style-name="Code"><text:s text:c="4"/>return 0;</text:p>
      <text:p text:style-name="Code">}</text:p>
      <text:p text:style-name="Standard"/>
      <text:p text:style-name="Standard">Now, if we compile the above code with command “<text:span text:style-name="T3">gcc file2.c file1.c</text:span>”, we get the error “<text:span text:style-name="T3">undefined reference to “fun1”</text:span>”. This is because <text:span text:style-name="T3">fun1()</text:span> is declared <text:span text:style-name="T3">static</text:span> in file1.c and cannot be used in file2.c.</text:p>
      <text:p text:style-name="Standard"/>
      <text:list text:continue-numbering="true" text:style-name="Numbering_20_123">
        <text:list-item>
          <text:p text:style-name="Section"><text:bookmark-start text:name="__RefHeading___Toc12809_2206932868"/>Type casting<text:bookmark-end text:name="__RefHeading___Toc12809_2206932868"/></text:p>
        </text:list-item>
      </text:list>
      <text:p text:style-name="Standard">Type casting is a way to convert a variable from one data type to another data type. For example, if you want to store a '<text:span text:style-name="T3">long</text:span>' value into a simple integer then you can type cast '<text:span text:style-name="T3">long</text:span>' to '<text:span text:style-name="T3">int</text:span>'. You can convert the values from one type to another explicitly using the cast operator as follows.</text:p>
      <text:p text:style-name="Standard"/>
      <text:p text:style-name="Code">(type_name) expression</text:p>
      <text:p text:style-name="Standard"/>
      <text:p text:style-name="Standard">Consider the following example where the cast operator causes the division of one integer variable by another to be performed as a floating-point operation.</text:p>
      <text:p text:style-name="Standard"/>
      <text:p text:style-name="P11">Example:</text:p>
      <text:p text:style-name="Standard"/>
      <text:p text:style-name="Code">#include &lt;stdio.h&gt;</text:p>
      <text:p text:style-name="Code"/>
      <text:p text:style-name="Code">int main(void)</text:p>
      <text:p text:style-name="Code">{</text:p>
      <text:p text:style-name="Code"><text:s text:c="4"/>int sum = 17, count = 5;</text:p>
      <text:p text:style-name="Code"><text:s text:c="4"/>double mean;</text:p>
      <text:p text:style-name="Code"><text:s text:c="4"/>mean = (double)sum / count;</text:p>
      <text:p text:style-name="Code"><text:s text:c="4"/>printf("Value of mean : %f\n", mean);</text:p>
      <text:p text:style-name="Code"><text:s text:c="4"/>return (0);</text:p>
      <text:p text:style-name="Code">}</text:p>
      <text:p text:style-name="Standard"/>
      <text:p text:style-name="Standard">When the above code is compiled and executed, it produces the following result.</text:p>
      <text:p text:style-name="Standard"><text:soft-page-break/></text:p>
      <text:p text:style-name="Code">Value of mean : 3.400000</text:p>
      <text:p text:style-name="Standard"/>
      <text:p text:style-name="Standard">It should be noted here that the cast operator has precedence over division, so the value of <text:span text:style-name="T3">sum</text:span> is first converted to type double and finally it gets divided by count yielding a <text:span text:style-name="T3">double</text:span> value.</text:p>
      <text:p text:style-name="Standard">Type conversions can be implicit which is performed by the compiler automatically, or it can be specified explicitly through the use of the cast operator. It is considered good programming practice to use the cast operator whenever type conversions are necessary.</text:p>
      <text:p text:style-name="Standard"/>
      <text:list text:continue-numbering="true" text:style-name="Numbering_20_123">
        <text:list-item>
          <text:p text:style-name="Section"><text:bookmark-start text:name="__RefHeading___Toc12807_2206932868"/>Integer Promotion<text:bookmark-end text:name="__RefHeading___Toc12807_2206932868"/></text:p>
        </text:list-item>
      </text:list>
      <text:p text:style-name="P55">Integer promotion is the process by which values of integer type "smaller" than int or unsigned int are converted either to int or unsigned int. Consider an example of adding a character with an integer.</text:p>
      <text:p text:style-name="P55"/>
      <text:p text:style-name="P33">Example</text:p>
      <text:p text:style-name="P55"/>
      <text:p text:style-name="Code">#include &lt;stdio.h&gt;</text:p>
      <text:p text:style-name="Code"/>
      <text:p text:style-name="Code">int main()</text:p>
      <text:p text:style-name="Code">{</text:p>
      <text:p text:style-name="Code"><text:s text:c="4"/>int i = 17;</text:p>
      <text:p text:style-name="Code"><text:s text:c="4"/>char c = 'c'; /* ascii value is 99 */</text:p>
      <text:p text:style-name="Code"><text:s text:c="4"/>int sum;</text:p>
      <text:p text:style-name="Code"><text:s text:c="4"/>sum = i + c;</text:p>
      <text:p text:style-name="Code"><text:s text:c="4"/>printf("Value of sum : %d\n", sum);</text:p>
      <text:p text:style-name="Code">}</text:p>
      <text:p text:style-name="Standard"/>
      <text:p text:style-name="Standard">When the above code is compiled and executed, it produces the following result.</text:p>
      <text:p text:style-name="Standard"/>
      <text:p text:style-name="Code">Value of sum : 116</text:p>
      <text:p text:style-name="Code"/>
      <text:p text:style-name="Standard">Here, the value of <text:span text:style-name="T3">sum</text:span> is <text:span text:style-name="T3">116</text:span> because the compiler is doing integer promotion and converting the value of '<text:span text:style-name="T3">c</text:span>' to ASCII before performing the actual addition operation.</text:p>
      <text:p text:style-name="Standard">Usual Arithmetic Conversion</text:p>
      <text:p text:style-name="Standard">The usual arithmetic conversions are implicitly performed to cast their values to a common type. The compiler first performs integer promotion; if the operands still have different types, then they are converted to the type that appears highest in the following hierarchy –</text:p>
      <text:p text:style-name="Standard">The usual arithmetic conversions are not performed for the assignment operators, nor for the logical operators <text:span text:style-name="T3">&amp;&amp;</text:span> and <text:span text:style-name="T3">||</text:span>. Let us take the following example to understand the concept −</text:p>
      <text:p text:style-name="Standard"/>
      <text:p text:style-name="P11">Example</text:p>
      <text:p text:style-name="Standard"/>
      <text:p text:style-name="Code">#include &lt;stdio.h&gt;</text:p>
      <text:p text:style-name="Code"/>
      <text:p text:style-name="Code">void main()</text:p>
      <text:p text:style-name="Code">{</text:p>
      <text:p text:style-name="Code"><text:s text:c="4"/>int i = 17;</text:p>
      <text:p text:style-name="Code"><text:s text:c="4"/>char c = 'c'; /* ascii value is 99 */</text:p>
      <text:p text:style-name="Code"><text:s text:c="4"/>float sum;</text:p>
      <text:p text:style-name="Code"><text:soft-page-break/><text:s text:c="4"/>sum = i + c;</text:p>
      <text:p text:style-name="Code"><text:s text:c="4"/>printf("Value of sum : %f\n", sum);</text:p>
      <text:p text:style-name="Code">}</text:p>
      <text:p text:style-name="Standard"/>
      <text:p text:style-name="Standard">When the above code is compiled and executed, it produces the following result.</text:p>
      <text:p text:style-name="Standard"/>
      <text:p text:style-name="Code">Value of sum : 116.000000</text:p>
      <text:p text:style-name="Standard"/>
      <text:p text:style-name="Standard">Here, it is simple to understand that first <text:span text:style-name="T3">c</text:span> gets converted to integer, but as the final value is <text:span text:style-name="T3">double</text:span>, usual arithmetic conversion applies and the compiler converts <text:span text:style-name="T3">i</text:span> and <text:span text:style-name="T3">c</text:span> into '<text:span text:style-name="T3">float</text:span>' and adds them yielding a '<text:span text:style-name="T3">float</text:span>' result.</text:p>
      <text:p text:style-name="Standard"/>
      <text:list xml:id="list224009685295828" text:continue-numbering="true" text:style-name="Numbering_20_123">
        <text:list-item>
          <text:p text:style-name="Section"><text:bookmark-start text:name="__RefHeading___Toc12805_2206932868"/>Dynamic Memory Allocation<text:bookmark-end text:name="__RefHeading___Toc12805_2206932868"/></text:p>
        </text:list-item>
      </text:list>
      <text:p text:style-name="Standard">As you know, you have to declare the size of an array before you use it. Hence, the array you declared may be insufficient or more than required to hold data. To solve this issue, you can allocate memory dynamically.</text:p>
      <text:p text:style-name="Standard">Dynamic memory management refers to manual memory management. This allows you to obtain more memory when required and release it when not necessary.</text:p>
      <text:p text:style-name="Standard">Although C inherently does not have any technique to allocate memory dynamically, there are 4 library functions defined under <text:span text:style-name="T3">&lt;stdlib.h&gt;</text:span> for dynamic memory allocation.</text:p>
      <text:p text:style-name="Standard"/>
      <text:p text:style-name="P38">malloc()</text:p>
      <text:p text:style-name="Standard">Allocates requested size of bytes and returns a pointer first byte of allocated space</text:p>
      <text:p text:style-name="Standard"/>
      <text:p text:style-name="P38">calloc()</text:p>
      <text:p text:style-name="Standard">Allocates space for an array elements, initializes to zero and then returns a pointer to memory</text:p>
      <text:p text:style-name="Standard"/>
      <text:p text:style-name="P38">realloc()</text:p>
      <text:p text:style-name="P56">Change the size of previously allocated space</text:p>
      <text:p text:style-name="P56"/>
      <text:p text:style-name="P38">free()</text:p>
      <text:p text:style-name="Standard">Deallocate the previously allocated space</text:p>
      <text:p text:style-name="Standard"/>
      <text:p text:style-name="P11">Note</text:p>
      <text:p text:style-name="Standard">Dynamic Memory Allocation cannot be initialised as global.</text:p>
      <text:p text:style-name="Standard"/>
      <text:p text:style-name="Code">#include &lt;stdio.h&gt;</text:p>
      <text:p text:style-name="Code">#include &lt;stdlib.h&gt;</text:p>
      <text:p text:style-name="Code"/>
      <text:p text:style-name="Code">int num;</text:p>
      <text:p text:style-name="Code">int *p = &amp;num; <text:s text:c="24"/>// No Error.</text:p>
      <text:p text:style-name="Code">int *ptr = (int *)malloc(sizeof(int)); // Causes Error. This is because malloc() is a function.</text:p>
      <text:p text:style-name="Code"/>
      <text:p text:style-name="Code">int main(void)</text:p>
      <text:p text:style-name="Code">{</text:p>
      <text:p text:style-name="Code"><text:s text:c="4"/>int *pointer = (int *)malloc(sizeof(int)); // No Error.</text:p>
      <text:p text:style-name="Code"><text:s text:c="4"/>return (0);</text:p>
      <text:p text:style-name="Code">}</text:p>
      <text:p text:style-name="Standard"><text:soft-page-break/></text:p>
      <text:list text:style-name="L4">
        <text:list-item>
          <text:p text:style-name="P89">malloc()</text:p>
        </text:list-item>
      </text:list>
      <text:p text:style-name="Standard">The name <text:span text:style-name="T3">malloc</text:span> stands for "memory allocation".</text:p>
      <text:p text:style-name="Standard">The function <text:span text:style-name="T3">malloc()</text:span> reserves a block of memory of specified size and return a pointer of type void which can be casted into pointer of any form.</text:p>
      <text:p text:style-name="Standard"/>
      <text:p text:style-name="P11">Syntax of <text:span text:style-name="T2">malloc()</text:span></text:p>
      <text:p text:style-name="Standard"/>
      <text:p text:style-name="Code">&lt;pointer type&gt; *ptr = (cast-type*) malloc(byte-size);</text:p>
      <text:p text:style-name="Code"/>
      <text:p text:style-name="Standard">Here, ptr is pointer of cast-type. The <text:span text:style-name="T3">malloc()</text:span> function returns a pointer to an area of memory with size of byte size. If the space is insufficient, allocation fails and returns <text:span text:style-name="T3">NULL</text:span> pointer.</text:p>
      <text:p text:style-name="Standard"/>
      <text:p text:style-name="Code">int *ptr = (int*) malloc(100 * sizeof(int));</text:p>
      <text:p text:style-name="Code"/>
      <text:p text:style-name="Standard">This statement will allocate either 200 or 400 according to size of int 2 or 4 bytes respectively and the pointer points to the address of first byte of memory.</text:p>
      <text:p text:style-name="Standard"/>
      <text:list text:continue-numbering="true" text:style-name="L4">
        <text:list-item>
          <text:p text:style-name="P89">calloc()</text:p>
        </text:list-item>
      </text:list>
      <text:p text:style-name="Standard">The name <text:span text:style-name="T3">calloc</text:span> stands for "contiguous allocation".</text:p>
      <text:p text:style-name="Standard">The only difference between <text:span text:style-name="T3">malloc()</text:span> and <text:span text:style-name="T3">calloc()</text:span> is that, <text:span text:style-name="T3">malloc()</text:span> allocates single block of memory whereas <text:span text:style-name="T3">calloc()</text:span> allocates multiple blocks of memory each of same size and sets all bytes to zero.</text:p>
      <text:p text:style-name="Standard"/>
      <text:p text:style-name="Standard"><text:span text:style-name="T4">Syntax of </text:span><text:span text:style-name="T3">calloc()</text:span></text:p>
      <text:p text:style-name="Standard"/>
      <text:p text:style-name="Code">&lt;pointer type&gt; *ptr = (cast-type*)calloc(n, element-size);</text:p>
      <text:p text:style-name="Code"/>
      <text:p text:style-name="Standard">This statement will allocate contiguous space in memory for an array of n elements. For example:</text:p>
      <text:p text:style-name="Standard"/>
      <text:p text:style-name="Code">float *ptr = (float*) calloc(25, sizeof(float));</text:p>
      <text:p text:style-name="Code"/>
      <text:p text:style-name="Standard">This statement allocates contiguous space in memory for an array of 25 elements each of size of <text:span text:style-name="T3">float</text:span>, i.e, 4 bytes.</text:p>
      <text:p text:style-name="Standard"/>
      <text:list text:continue-numbering="true" text:style-name="L4">
        <text:list-item>
          <text:p text:style-name="P89">free()</text:p>
        </text:list-item>
      </text:list>
      <text:p text:style-name="Standard">Dynamically allocated memory created with either <text:span text:style-name="T3">calloc()</text:span> or <text:span text:style-name="T3">malloc()</text:span> doesn't get freed on its own. You must explicitly use <text:span text:style-name="T3">free()</text:span> to release the space.</text:p>
      <text:p text:style-name="Standard"/>
      <text:p text:style-name="Standard"><text:span text:style-name="T5">S</text:span><text:span text:style-name="T4">yntax of </text:span><text:span text:style-name="T3">free()</text:span></text:p>
      <text:p text:style-name="Standard"/>
      <text:p text:style-name="Code">free(ptr);</text:p>
      <text:p text:style-name="Code"/>
      <text:p text:style-name="Standard">This statement frees the space allocated in the memory pointed by ptr.</text:p>
      <text:p text:style-name="Standard"/>
      <text:p text:style-name="P57"><text:span text:style-name="T4">Example 1: Using C </text:span><text:span text:style-name="T3">malloc()</text:span><text:span text:style-name="T4"> and </text:span><text:span text:style-name="T3">free()</text:span></text:p>
      <text:p text:style-name="P21"/>
      <text:p text:style-name="Standard"><text:soft-page-break/>Write a C program to find sum of n elements entered by user. To perform this program, allocate memory dynamically using <text:span text:style-name="T3">malloc()</text:span> function.</text:p>
      <text:p text:style-name="Standard"/>
      <text:p text:style-name="Code">#include &lt;stdio.h&gt;</text:p>
      <text:p text:style-name="Code">#include &lt;stdlib.h&gt;</text:p>
      <text:p text:style-name="Code"/>
      <text:p text:style-name="Code">int main()</text:p>
      <text:p text:style-name="Code">{</text:p>
      <text:p text:style-name="Code"><text:s text:c="4"/>int num, i, *ptr, sum = 0;</text:p>
      <text:p text:style-name="Code"><text:s text:c="4"/>printf("Enter number of elements: ");</text:p>
      <text:p text:style-name="Code"><text:s text:c="4"/>scanf("%d", &amp;num);</text:p>
      <text:p text:style-name="Code"><text:s text:c="4"/>ptr = (int *)malloc(num * sizeof(int)); // memory allocated using malloc</text:p>
      <text:p text:style-name="Code"><text:s text:c="4"/>if (ptr == NULL)</text:p>
      <text:p text:style-name="Code"><text:s text:c="4"/>{</text:p>
      <text:p text:style-name="Code"><text:s text:c="8"/>printf("Error! memory not allocated.");</text:p>
      <text:p text:style-name="Code"><text:s text:c="8"/>exit(0);</text:p>
      <text:p text:style-name="Code"><text:s text:c="4"/>}</text:p>
      <text:p text:style-name="Code"><text:s text:c="4"/>printf("Enter elements of array: ");</text:p>
      <text:p text:style-name="Code"><text:s text:c="4"/>for (i = 0; i &lt; num; ++i)</text:p>
      <text:p text:style-name="Code"><text:s text:c="4"/>{</text:p>
      <text:p text:style-name="Code"><text:s text:c="8"/>scanf("%d", ptr + i);</text:p>
      <text:p text:style-name="Code"><text:s text:c="8"/>sum += *(ptr + i);</text:p>
      <text:p text:style-name="Code"><text:s text:c="4"/>}</text:p>
      <text:p text:style-name="Code"><text:s text:c="4"/>printf("Sum = %d", sum);</text:p>
      <text:p text:style-name="Code"><text:s text:c="4"/>free(ptr);</text:p>
      <text:p text:style-name="Code"><text:s text:c="4"/>return 0;</text:p>
      <text:p text:style-name="Code">}</text:p>
      <text:p text:style-name="Standard"/>
      <text:p text:style-name="P22">Example 2: Using calloc() and free()</text:p>
      <text:p text:style-name="P22"/>
      <text:p text:style-name="Standard">Write a C program to find sum of n elements entered by user. To perform this program, allocate memory dynamically using <text:span text:style-name="T3">calloc()</text:span> function.</text:p>
      <text:p text:style-name="Standard"/>
      <text:p text:style-name="Code">#include &lt;stdio.h&gt;</text:p>
      <text:p text:style-name="Code">#include &lt;stdlib.h&gt;</text:p>
      <text:p text:style-name="Code"/>
      <text:p text:style-name="Code">int main()</text:p>
      <text:p text:style-name="Code">{</text:p>
      <text:p text:style-name="Code"><text:s text:c="4"/>int num, i, *ptr, sum = 0;</text:p>
      <text:p text:style-name="Code"><text:s text:c="4"/>printf("Enter number of elements: ");</text:p>
      <text:p text:style-name="Code"><text:s text:c="4"/>scanf("%d", &amp;num);</text:p>
      <text:p text:style-name="Code"><text:s text:c="4"/>ptr = (int *)calloc(num, sizeof(int));</text:p>
      <text:p text:style-name="Code"><text:s text:c="4"/>if (ptr == NULL)</text:p>
      <text:p text:style-name="Code"><text:s text:c="4"/>{</text:p>
      <text:p text:style-name="Code"><text:s text:c="8"/>printf("Error! memory not allocated.");</text:p>
      <text:p text:style-name="Code"><text:s text:c="8"/>exit(0);</text:p>
      <text:p text:style-name="Code"><text:s text:c="4"/>}</text:p>
      <text:p text:style-name="Code"><text:s text:c="4"/>printf("Enter elements of array: ");</text:p>
      <text:p text:style-name="Code"><text:s text:c="4"/>for (i = 0; i &lt; num; ++i)</text:p>
      <text:p text:style-name="Code"><text:soft-page-break/><text:s text:c="4"/>{</text:p>
      <text:p text:style-name="Code"><text:s text:c="8"/>scanf("%d", ptr + i);</text:p>
      <text:p text:style-name="Code"><text:s text:c="8"/>sum += *(ptr + i);</text:p>
      <text:p text:style-name="Code"><text:s text:c="4"/>}</text:p>
      <text:p text:style-name="Code"><text:s text:c="4"/>printf("Sum = %d", sum);</text:p>
      <text:p text:style-name="Code"><text:s text:c="4"/>free(ptr);</text:p>
      <text:p text:style-name="Code"><text:s text:c="4"/>return 0;</text:p>
      <text:p text:style-name="Code">}</text:p>
      <text:p text:style-name="Standard"/>
      <text:list text:continue-numbering="true" text:style-name="L4">
        <text:list-item>
          <text:p text:style-name="P89">realloc()</text:p>
        </text:list-item>
      </text:list>
      <text:p text:style-name="Standard">If the previously allocated memory is insufficient or more than required, you can change the previously allocated memory size using realloc().</text:p>
      <text:p text:style-name="Standard"/>
      <text:p text:style-name="P11">Syntax of realloc()</text:p>
      <text:p text:style-name="Standard"/>
      <text:p text:style-name="Code">&lt;pointer&gt; = realloc(&lt;pointer&gt;, &lt;new size&gt;);</text:p>
      <text:p text:style-name="Code"/>
      <text:p text:style-name="Standard">Here, <text:span text:style-name="T3">ptr</text:span> is reallocated with size of <text:span text:style-name="T3">new-size</text:span>.</text:p>
      <text:p text:style-name="Standard"/>
      <text:p text:style-name="Standard"><text:span text:style-name="T4">Example 3: Using </text:span><text:span text:style-name="T3">realloc()</text:span></text:p>
      <text:p text:style-name="Standard"/>
      <text:p text:style-name="Code">#include &lt;stdio.h&gt;</text:p>
      <text:p text:style-name="Code">#include &lt;stdlib.h&gt;</text:p>
      <text:p text:style-name="Code"/>
      <text:p text:style-name="Code">int main()</text:p>
      <text:p text:style-name="Code">{</text:p>
      <text:p text:style-name="Code"><text:s text:c="4"/>int *ptr, i, n1, n2;</text:p>
      <text:p text:style-name="Code"><text:s text:c="4"/>printf("Enter size of array: ");</text:p>
      <text:p text:style-name="Code"><text:s text:c="4"/>scanf("%d", &amp;n1);</text:p>
      <text:p text:style-name="Code"><text:s text:c="4"/>ptr = (int *)malloc(n1 * sizeof(int));</text:p>
      <text:p text:style-name="Code"><text:s text:c="4"/>printf("Address of previously allocated memory: ");</text:p>
      <text:p text:style-name="Code"><text:s text:c="4"/>for (i = 0; i &lt; n1; ++i)</text:p>
      <text:p text:style-name="Code"><text:s text:c="4"/>{</text:p>
      <text:p text:style-name="Code"><text:s text:c="8"/>printf("%u\t", ptr + i);</text:p>
      <text:p text:style-name="Code"><text:s text:c="4"/>}</text:p>
      <text:p text:style-name="Code"><text:s text:c="4"/>printf("\nEnter new size of array: ");</text:p>
      <text:p text:style-name="Code"><text:s text:c="4"/>scanf("%d", &amp;n2);</text:p>
      <text:p text:style-name="Code"><text:s text:c="4"/>ptr = realloc(ptr, n2 * sizeof(int));</text:p>
      <text:p text:style-name="Code"><text:s text:c="4"/>for (i = 0; i &lt; n2; ++i)</text:p>
      <text:p text:style-name="Code"><text:s text:c="4"/>{</text:p>
      <text:p text:style-name="Code"><text:s text:c="8"/>printf("%u\t", ptr + i);</text:p>
      <text:p text:style-name="Code"><text:s text:c="4"/>}</text:p>
      <text:p text:style-name="Code"><text:s text:c="4"/>return 0;</text:p>
      <text:p text:style-name="Code">}</text:p>
      <text:p text:style-name="P11"/>
      <text:p text:style-name="P11">Output</text:p>
      <text:p text:style-name="Code"/>
      <text:p text:style-name="Code">Enter size of array: 2</text:p>
      <text:p text:style-name="Code">Addresses of previously allocated memory:26855472 26855476</text:p>
      <text:p text:style-name="Code">Enter new size of array: 4</text:p>
      <text:p text:style-name="Code"><text:soft-page-break/>Addresses of newly allocated memory:26855472 26855476 26855480</text:p>
      <text:p text:style-name="Code">26855484</text:p>
      <text:p text:style-name="Standard"/>
      <text:list text:continue-list="list224009685295828" text:style-name="Numbering_20_123">
        <text:list-item>
          <text:p text:style-name="Section"><text:bookmark-start text:name="__RefHeading___Toc12803_2206932868"/>Union<text:bookmark-end text:name="__RefHeading___Toc12803_2206932868"/></text:p>
        </text:list-item>
      </text:list>
      <text:p text:style-name="Standard">A <text:span text:style-name="T3">union</text:span> is a special data type available in C that allows to store different data types in the same memory location. You can define a <text:span text:style-name="T3">union</text:span> with many members, but only one member can contain a value at any given time. <text:span text:style-name="T3">union</text:span> provide an efficient way of using the same memory location for multiple-purpose.</text:p>
      <text:p text:style-name="Standard"/>
      <text:p text:style-name="Standard">To define a union, you must use the union statement in the same way as you did while defining a structure. The union statement defines a new data type with more than one member for your program. The format of the union statement is as follows.</text:p>
      <text:p text:style-name="Standard"/>
      <text:p text:style-name="Code">union &lt;union name&gt; { member definition; member definition; ... member definition;</text:p>
      <text:p text:style-name="Code">} &lt;one or more union variables separated by comma&gt;;</text:p>
      <text:p text:style-name="Code"/>
      <text:p text:style-name="Standard">The <text:span text:style-name="T3">union</text:span> tag is optional and each member definition is a normal variable definition, such as <text:span text:style-name="T3">int i;</text:span> or <text:span text:style-name="T3">float f;</text:span> or any other valid variable definition. At the end of the <text:span text:style-name="T3">union</text:span> definition, before the final semicolon, you can specify one or more union variables but it is optional. Here is the way you would define a <text:span text:style-name="T3">union</text:span> type named <text:span text:style-name="T3">Data</text:span> having three members <text:span text:style-name="T3">i</text:span>, <text:span text:style-name="T3">f</text:span>, and <text:span text:style-name="T3">str.</text:span></text:p>
      <text:p text:style-name="Standard"><text:span text:style-name="T3"/></text:p>
      <text:p text:style-name="Code">union Data</text:p>
      <text:p text:style-name="Code">{</text:p>
      <text:p text:style-name="Code"><text:tab/>int i;</text:p>
      <text:p text:style-name="Code"><text:tab/>float f;</text:p>
      <text:p text:style-name="Code"><text:tab/>char str[20];</text:p>
      <text:p text:style-name="P43">}data;</text:p>
      <text:p text:style-name="P44"/>
      <text:p text:style-name="Standard">Now, a variable of <text:span text:style-name="T3">Data</text:span> type can store an integer, a floating-point number, or a string of characters. It means a single variable, i.e., same memory location, can be used to store multiple types of data. You can use any built-in or user defined data types inside a union based on your requirement.</text:p>
      <text:p text:style-name="Standard"/>
      <text:p text:style-name="Standard">The memory occupied by a <text:span text:style-name="T3">union</text:span> will be large enough to hold the largest member of the <text:span text:style-name="T3">union</text:span>. For example, in the above example, <text:span text:style-name="T3">Data</text:span> type will occupy 20 bytes of memory space because this is the maximum space which can be occupied by a character string. The following example displays the total memory size occupied by the above <text:span text:style-name="T3">union</text:span>.</text:p>
      <text:p text:style-name="Standard"/>
      <text:p text:style-name="P11">Example</text:p>
      <text:p text:style-name="P11"/>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oft-page-break/><text:s text:c="4"/>char str[20];</text:p>
      <text:p text:style-name="Code">};</text:p>
      <text:p text:style-name="Code"/>
      <text:p text:style-name="Code">int main()</text:p>
      <text:p text:style-name="Code">{</text:p>
      <text:p text:style-name="Code"><text:s text:c="4"/>union Data data;</text:p>
      <text:p text:style-name="Code"><text:s text:c="4"/>printf("Memory size occupied by data : %d\n", sizeof(data));</text:p>
      <text:p text:style-name="Code"><text:s text:c="4"/>return 0;</text:p>
      <text:p text:style-name="Code">}</text:p>
      <text:p text:style-name="Code"/>
      <text:p text:style-name="Standard">When the above code is compiled and executed, it produces the following result.</text:p>
      <text:p text:style-name="Standard"/>
      <text:p text:style-name="Code">Memory size occupied by data : 20</text:p>
      <text:p text:style-name="Code"/>
      <text:p text:style-name="Standard">To access any member of a union, we use the member access operator (<text:span text:style-name="T3">.</text:span>). The member access operator is coded as a period between the <text:span text:style-name="T3">union</text:span> variable name and the <text:span text:style-name="T3">union</text:span> member that we wish to access. You would use the keyword <text:span text:style-name="T3">union</text:span> to define variables of <text:span text:style-name="T3">union</text:span> type. The following example shows how to use <text:span text:style-name="T3">union</text:span> in a program.</text:p>
      <text:p text:style-name="Standard"/>
      <text:p text:style-name="P11">Example</text:p>
      <text:p text:style-name="Standard"/>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 text:c="4"/>char str[20];</text:p>
      <text:p text:style-name="Code">};</text:p>
      <text:p text:style-name="Code"/>
      <text:p text:style-name="Code">int main()</text:p>
      <text:p text:style-name="Code">{</text:p>
      <text:p text:style-name="Code"><text:s text:c="4"/>union Data data;</text:p>
      <text:p text:style-name="Code"><text:s text:c="4"/>data.i = 10;</text:p>
      <text:p text:style-name="Code"><text:s text:c="4"/>data.f = 220.5;</text:p>
      <text:p text:style-name="Code"><text:s text:c="4"/>strcpy(data.str, "C Programming");</text:p>
      <text:p text:style-name="Code"><text:s text:c="4"/>printf("data.i : %d\n", data.i);</text:p>
      <text:p text:style-name="Code"><text:s text:c="4"/>printf("data.f : %f\n", data.f);</text:p>
      <text:p text:style-name="Code"><text:s text:c="4"/>printf("data.str : %s\n", data.str);</text:p>
      <text:p text:style-name="Code"><text:s text:c="4"/>return 0;</text:p>
      <text:p text:style-name="Code">}</text:p>
      <text:p text:style-name="Standard"/>
      <text:p text:style-name="P58">When the above code is compiled and executed, it produces the following result.</text:p>
      <text:p text:style-name="P58"/>
      <text:p text:style-name="Code">data.i : 1917853763</text:p>
      <text:p text:style-name="Code">data.f : 4122360580327794860452759994368.000000</text:p>
      <text:p text:style-name="Code">data.str : C Programming</text:p>
      <text:p text:style-name="Code"/>
      <text:p text:style-name="Standard"><text:soft-page-break/>Here, we can see that the values of <text:span text:style-name="T3">i</text:span> and <text:span text:style-name="T3">f</text:span> members of <text:span text:style-name="T3">union</text:span> got corrupted because the final value assigned to the variable has occupied the memory location and this is the reason that the value of str member is getting printed very well.</text:p>
      <text:p text:style-name="Standard"/>
      <text:p text:style-name="Standard">Now let's look into the same example once again where we will use one variable at a time which is the main purpose of having <text:span text:style-name="T3">union</text:span>.</text:p>
      <text:p text:style-name="Standard"/>
      <text:p text:style-name="P11">Example</text:p>
      <text:p text:style-name="Standard"/>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 text:c="4"/>char str[20];</text:p>
      <text:p text:style-name="Code">};</text:p>
      <text:p text:style-name="Code">int main()</text:p>
      <text:p text:style-name="Code">{</text:p>
      <text:p text:style-name="Code"><text:s text:c="4"/>union Data data;</text:p>
      <text:p text:style-name="Code"><text:s text:c="4"/>data.i = 10;</text:p>
      <text:p text:style-name="Code"><text:s text:c="4"/>printf("data.i : %d\n", data.i);</text:p>
      <text:p text:style-name="Code"><text:s text:c="4"/>data.f = 220.5;</text:p>
      <text:p text:style-name="Code"><text:s text:c="4"/>printf("data.f : %f\n", data.f);</text:p>
      <text:p text:style-name="Code"><text:s text:c="4"/>strcpy(data.str, "C Programming");</text:p>
      <text:p text:style-name="Code"><text:s text:c="4"/>printf("data.str : %s\n", data.str);</text:p>
      <text:p text:style-name="Code"><text:s text:c="4"/>return 0;</text:p>
      <text:p text:style-name="Code">}</text:p>
      <text:p text:style-name="Standard"/>
      <text:p text:style-name="P58">When the above code is compiled and executed, it produces the following result.</text:p>
      <text:p text:style-name="P58"/>
      <text:p text:style-name="Code">data.i : 10</text:p>
      <text:p text:style-name="Code">data.f : 220.500000</text:p>
      <text:p text:style-name="Code">data.str : C Programming</text:p>
      <text:p text:style-name="Code"/>
      <text:p text:style-name="Standard">Here, all the members are getting printed very well because one member is being used at a time.</text:p>
      <text:p text:style-name="Standard"/>
      <text:list text:continue-numbering="true" text:style-name="Numbering_20_123">
        <text:list-item>
          <text:p text:style-name="Section"><text:bookmark-start text:name="__RefHeading___Toc12801_2206932868"/>Linked List<text:bookmark-end text:name="__RefHeading___Toc12801_2206932868"/></text:p>
        </text:list-item>
      </text:list>
      <text:p text:style-name="Code">#include &lt;stdio.h&gt;</text:p>
      <text:p text:style-name="Code">#include &lt;string.h&gt;</text:p>
      <text:p text:style-name="Code">#include &lt;stdlib.h&gt;</text:p>
      <text:p text:style-name="Code"/>
      <text:p text:style-name="Code">struct node</text:p>
      <text:p text:style-name="Code">{</text:p>
      <text:p text:style-name="Code"><text:s text:c="4"/>int data;</text:p>
      <text:p text:style-name="Code"><text:s text:c="4"/>struct node *next;</text:p>
      <text:p text:style-name="Code">};</text:p>
      <text:p text:style-name="Code">struct node *head = NULL;</text:p>
      <text:p text:style-name="Code">// display the list</text:p>
      <text:p text:style-name="Code"><text:soft-page-break/>void printList()</text:p>
      <text:p text:style-name="Code">{</text:p>
      <text:p text:style-name="Code"><text:s text:c="4"/>struct node *p = head;</text:p>
      <text:p text:style-name="Code"><text:s text:c="4"/>printf("\n[");</text:p>
      <text:p text:style-name="Code"><text:s text:c="4"/>// start from the beginning</text:p>
      <text:p text:style-name="Code"><text:s text:c="4"/>while (p != NULL)</text:p>
      <text:p text:style-name="Code"><text:s text:c="4"/>{</text:p>
      <text:p text:style-name="Code"><text:s text:c="8"/>printf(" %d ", p-&gt;data);</text:p>
      <text:p text:style-name="Code"><text:s text:c="8"/>p = p-&gt;next;</text:p>
      <text:p text:style-name="Code"><text:s text:c="4"/>}</text:p>
      <text:p text:style-name="Code"><text:s text:c="4"/>printf("]");</text:p>
      <text:p text:style-name="Code">}</text:p>
      <text:p text:style-name="Code">// insertion at the beginning</text:p>
      <text:p text:style-name="Code">void insertatbegin(int data)</text:p>
      <text:p text:style-name="P45">{</text:p>
      <text:p text:style-name="P45"><text:s text:c="4"/>// create a link</text:p>
      <text:p text:style-name="Code"><text:s text:c="4"/>struct node *lk = (struct node *)malloc(sizeof(struct node));</text:p>
      <text:p text:style-name="Code"><text:s text:c="4"/>lk-&gt;data = data;</text:p>
      <text:p text:style-name="Code"><text:s text:c="4"/>// point it to old first node</text:p>
      <text:p text:style-name="Code"><text:s text:c="4"/>lk-&gt;next = head;</text:p>
      <text:p text:style-name="Code"><text:s text:c="4"/>// point first to new first node</text:p>
      <text:p text:style-name="Code"><text:s text:c="4"/>head = lk;</text:p>
      <text:p text:style-name="Code">}</text:p>
      <text:p text:style-name="Code">void insertatend(int data)</text:p>
      <text:p text:style-name="P45">{</text:p>
      <text:p text:style-name="P45"><text:s text:c="4"/>// create a link</text:p>
      <text:p text:style-name="Code"><text:s text:c="4"/>struct node *lk = (struct node *)malloc(sizeof(struct node));</text:p>
      <text:p text:style-name="Code"><text:s text:c="4"/>lk-&gt;data = data;</text:p>
      <text:p text:style-name="Code"><text:s text:c="4"/>lk-&gt;next = NULL;</text:p>
      <text:p text:style-name="Code"><text:s text:c="4"/>struct node *linkedlist = head;</text:p>
      <text:p text:style-name="Code"><text:s text:c="4"/>// point it to old first node</text:p>
      <text:p text:style-name="Code"><text:s text:c="4"/>while (linkedlist-&gt;next != NULL)</text:p>
      <text:p text:style-name="Code"><text:s text:c="4"/>{</text:p>
      <text:p text:style-name="Code"><text:s text:c="8"/>linkedlist = linkedlist-&gt;next;</text:p>
      <text:p text:style-name="Code"><text:s text:c="4"/>} // point first to new first node</text:p>
      <text:p text:style-name="Code"><text:s text:c="4"/>linkedlist-&gt;next = lk;</text:p>
      <text:p text:style-name="Code">}</text:p>
      <text:p text:style-name="Code">void insertafternode(struct node *list, int data)</text:p>
      <text:p text:style-name="Code">{</text:p>
      <text:p text:style-name="Code"><text:s text:c="4"/>struct node *lk = (struct node *)malloc(sizeof(struct node));</text:p>
      <text:p text:style-name="Code"><text:s text:c="4"/>lk-&gt;data = data;</text:p>
      <text:p text:style-name="Code"><text:s text:c="4"/>lk-&gt;next = list-&gt;next;</text:p>
      <text:p text:style-name="Code"><text:s text:c="4"/>list-&gt;next = lk;</text:p>
      <text:p text:style-name="Code">}</text:p>
      <text:p text:style-name="Code">void deleteatbegin()</text:p>
      <text:p text:style-name="Code">{</text:p>
      <text:p text:style-name="Code"><text:s text:c="4"/>head = head-&gt;next;</text:p>
      <text:p text:style-name="Code">}</text:p>
      <text:p text:style-name="Code">void deleteatend()</text:p>
      <text:p text:style-name="Code">{</text:p>
      <text:p text:style-name="Code"><text:s text:c="4"/>struct node *linkedlist = head;</text:p>
      <text:p text:style-name="Code"><text:soft-page-break/><text:s text:c="4"/>while (linkedlist-&gt;next-&gt;next != NULL)</text:p>
      <text:p text:style-name="Code"><text:s text:c="4"/>{</text:p>
      <text:p text:style-name="Code"><text:s text:c="8"/>linkedlist = linkedlist-&gt;next;</text:p>
      <text:p text:style-name="Code"><text:s text:c="4"/>}</text:p>
      <text:p text:style-name="Code"><text:s text:c="4"/>linkedlist-&gt;next = NULL;</text:p>
      <text:p text:style-name="Code">}</text:p>
      <text:p text:style-name="Code">void deletenode(int key)</text:p>
      <text:p text:style-name="Code">{</text:p>
      <text:p text:style-name="Code"><text:s text:c="4"/>struct node *temp = head, *prev = NULL;</text:p>
      <text:p text:style-name="Code"><text:s text:c="4"/>if (temp != NULL &amp;&amp; temp-&gt;data == key)</text:p>
      <text:p text:style-name="Code"><text:s text:c="4"/>{</text:p>
      <text:p text:style-name="Code"><text:s text:c="8"/>head = temp-&gt;next;</text:p>
      <text:p text:style-name="Code"><text:s text:c="8"/>return;</text:p>
      <text:p text:style-name="Code"><text:s text:c="4"/>}</text:p>
      <text:p text:style-name="Code"><text:s text:c="4"/>// Find the key to be deleted</text:p>
      <text:p text:style-name="Code"><text:s text:c="4"/>while (temp != NULL &amp;&amp; temp-&gt;data != key)</text:p>
      <text:p text:style-name="Code"><text:s text:c="4"/>{</text:p>
      <text:p text:style-name="Code"><text:s text:c="8"/>prev = temp;</text:p>
      <text:p text:style-name="Code"><text:s text:c="8"/>temp = temp-&gt;next;</text:p>
      <text:p text:style-name="Code"><text:s text:c="4"/>}</text:p>
      <text:p text:style-name="Code"><text:s text:c="4"/>// If the key is not present</text:p>
      <text:p text:style-name="Code"><text:s text:c="4"/>if (temp == NULL)</text:p>
      <text:p text:style-name="Code"><text:s text:c="4"/>{</text:p>
      <text:p text:style-name="Code"><text:s text:c="8"/>return;</text:p>
      <text:p text:style-name="Code"><text:s text:c="4"/>}</text:p>
      <text:p text:style-name="Code"><text:s text:c="4"/>// Remove the node</text:p>
      <text:p text:style-name="Code"><text:s text:c="4"/>prev-&gt;next = temp-&gt;next;</text:p>
      <text:p text:style-name="Code">}</text:p>
      <text:p text:style-name="Code">int searchlist(int key)</text:p>
      <text:p text:style-name="Code">{</text:p>
      <text:p text:style-name="Code"><text:s text:c="4"/>struct node *temp = head;</text:p>
      <text:p text:style-name="Code"><text:s text:c="4"/>while (temp != NULL)</text:p>
      <text:p text:style-name="Code"><text:s text:c="4"/>{</text:p>
      <text:p text:style-name="Code"><text:s text:c="8"/>if (temp-&gt;data == key)</text:p>
      <text:p text:style-name="Code"><text:s text:c="8"/>{</text:p>
      <text:p text:style-name="Code"><text:s text:c="12"/>return 1;</text:p>
      <text:p text:style-name="Code"><text:s text:c="8"/>}</text:p>
      <text:p text:style-name="Code"><text:s text:c="8"/>temp = temp-&gt;next;</text:p>
      <text:p text:style-name="Code"><text:s text:c="4"/>}</text:p>
      <text:p text:style-name="Code"><text:s text:c="4"/>return 0;</text:p>
      <text:p text:style-name="Code">}</text:p>
      <text:p text:style-name="Code"/>
      <text:p text:style-name="Code"><text:span text:style-name="T10">int</text:span> main()</text:p>
      <text:p text:style-name="Code">{</text:p>
      <text:p text:style-name="Code"><text:s text:c="4"/>int k = 0;</text:p>
      <text:p text:style-name="Code"><text:s text:c="4"/>insertatbegin(12);</text:p>
      <text:p text:style-name="Code"><text:s text:c="4"/>insertatbegin(22);</text:p>
      <text:p text:style-name="Code"><text:s text:c="4"/>insertatend(30);</text:p>
      <text:p text:style-name="Code"><text:s text:c="4"/>insertatend(44);</text:p>
      <text:p text:style-name="Code"><text:s text:c="4"/>insertatbegin(50);</text:p>
      <text:p text:style-name="Code"><text:s text:c="4"/>insertafternode(head-&gt;next-&gt;next, 33);</text:p>
      <text:p text:style-name="Code"><text:soft-page-break/><text:s text:c="4"/>printf("Linked List: ");</text:p>
      <text:p text:style-name="Code"><text:s text:c="4"/>// print list</text:p>
      <text:p text:style-name="Code"><text:s text:c="4"/>printList();</text:p>
      <text:p text:style-name="Code"><text:s text:c="4"/>deleteatbegin();</text:p>
      <text:p text:style-name="Code"><text:s text:c="4"/>deleteatend();</text:p>
      <text:p text:style-name="Code"><text:s text:c="4"/>deletenode(12);</text:p>
      <text:p text:style-name="Code"><text:s text:c="4"/>printf("\nLinked List after deletion: ");</text:p>
      <text:p text:style-name="Code"><text:s text:c="4"/>// print list</text:p>
      <text:p text:style-name="Code"><text:s text:c="4"/>printList();</text:p>
      <text:p text:style-name="Code"><text:s text:c="4"/>insertatbegin(4);</text:p>
      <text:p text:style-name="Code"><text:s text:c="4"/>insertatbegin(16);</text:p>
      <text:p text:style-name="Code"><text:s text:c="4"/>printf("\nUpdated Linked List: ");</text:p>
      <text:p text:style-name="Code"><text:s text:c="4"/>printList();</text:p>
      <text:p text:style-name="Code"><text:s text:c="4"/>k = searchlist(16);</text:p>
      <text:p text:style-name="Code"><text:s text:c="4"/>if (k == 1)</text:p>
      <text:p text:style-name="Code"><text:s text:c="4"/>{</text:p>
      <text:p text:style-name="Code"><text:s text:c="8"/>printf("\nElement is found");</text:p>
      <text:p text:style-name="Code"><text:s text:c="4"/>}</text:p>
      <text:p text:style-name="Code"><text:s text:c="4"/>else</text:p>
      <text:p text:style-name="Code"><text:s text:c="4"/>{</text:p>
      <text:p text:style-name="Code"><text:s text:c="8"/>printf("\nElement is not present in the list");</text:p>
      <text:p text:style-name="Code"><text:s text:c="4"/>}</text:p>
      <text:p text:style-name="Code"><text:s text:c="4"/>return 0;</text:p>
      <text:p text:style-name="Code">}</text:p>
      <text:p text:style-name="Code"/>
      <text:p text:style-name="Standard">If we compile and run the above program, it will produce the following result.</text:p>
      <text:p text:style-name="Standard"/>
      <text:p text:style-name="P11">Output</text:p>
      <text:p text:style-name="P11"/>
      <text:p text:style-name="Code">Linked List: [ 50 <text:s/>22 <text:s/>12 <text:s/>33 <text:s/>30 <text:s/>44 ]</text:p>
      <text:p text:style-name="Code">Linked List after deletion: [ 22 <text:s/>33 <text:s/>30 ]</text:p>
      <text:p text:style-name="Code">Updated Linked List: [ 16 <text:s/>4 <text:s/>22 <text:s/>33 <text:s/>30 ]</text:p>
      <text:p text:style-name="Code">Element is found</text:p>
      <text:p text:style-name="Standard"/>
      <text:list text:continue-numbering="true" text:style-name="Numbering_20_123">
        <text:list-item>
          <text:p text:style-name="Section"><text:bookmark-start text:name="__RefHeading___Toc12799_2206932868"/>Splitting a string using strtok()<text:bookmark-end text:name="__RefHeading___Toc12799_2206932868"/></text:p>
        </text:list-item>
      </text:list>
      <text:p text:style-name="Standard">Use <text:span text:style-name="T3">string.h</text:span> header file for getting access to <text:span text:style-name="T3">strtok()</text:span>.</text:p>
      <text:p text:style-name="Standard"><text:s text:c="2"/></text:p>
      <text:p text:style-name="Code">#include &lt;stdio.h&gt;</text:p>
      <text:p text:style-name="Code">#include &lt;string.h&gt;</text:p>
      <text:p text:style-name="Code"/>
      <text:p text:style-name="Code">int main()</text:p>
      <text:p text:style-name="Code">{</text:p>
      <text:p text:style-name="Code"><text:s text:c="4"/>char *token;</text:p>
      <text:p text:style-name="Code"><text:s text:c="4"/>char s[] = "This is a string";</text:p>
      <text:p text:style-name="Code"><text:s text:c="4"/>char copy[strlen(s) + 1]; // +1 for the null terminator</text:p>
      <text:p text:style-name="Code"><text:s text:c="4"/>strcpy(copy, s); <text:s text:c="9"/>// copy the string</text:p>
      <text:p text:style-name="Code"><text:s text:c="4"/>for(token = strtok(copy, " "); token != NULL; token = strtok(NULL, " "))</text:p>
      <text:p text:style-name="Code"><text:s text:c="4"/>{</text:p>
      <text:p text:style-name="Code"><text:s text:c="8"/>printf("%s\n", token); // added newline for clarity</text:p>
      <text:p text:style-name="Code"><text:soft-page-break/><text:s text:c="4"/>}</text:p>
      <text:p text:style-name="Code"><text:s text:c="4"/>return 0;</text:p>
      <text:p text:style-name="Code">}</text:p>
      <text:p text:style-name="Standard"/>
      <text:list text:continue-numbering="true" text:style-name="Numbering_20_123">
        <text:list-item>
          <text:p text:style-name="Section"><text:bookmark-start text:name="__RefHeading___Toc12797_2206932868"/>Pointer to Structure<text:bookmark-end text:name="__RefHeading___Toc12797_2206932868"/></text:p>
        </text:list-item>
      </text:list>
      <text:p text:style-name="Code">struct dog</text:p>
      <text:p text:style-name="Code">{</text:p>
      <text:p text:style-name="Code"><text:s text:c="4"/>char name[10];</text:p>
      <text:p text:style-name="Code"><text:s text:c="4"/>char breed[10];</text:p>
      <text:p text:style-name="Code"><text:s text:c="4"/>int age;</text:p>
      <text:p text:style-name="Code"><text:s text:c="4"/>char color[10];</text:p>
      <text:p text:style-name="Code">};</text:p>
      <text:p text:style-name="Code">/* declaring a pointer to a structure of type struct dog */</text:p>
      <text:p text:style-name="Code">struct dog spike; </text:p>
      <text:p text:style-name="Code">struct dog *ptr_dog;</text:p>
      <text:p text:style-name="Code">ptr_dog = &amp;spike;</text:p>
      <text:p text:style-name="Code">(*ptr_dog).name <text:s/>// refers to the name of dog </text:p>
      <text:p text:style-name="Code">(*ptr_dog).breed <text:s/>//refers to the breed of dog</text:p>
      <text:p text:style-name="Code">ptr_dog→name <text:s/>//refers to the name of dog</text:p>
      <text:p text:style-name="Code">ptr_dog→breed <text:s/>//refers to the breed of dog</text:p>
      <text:p text:style-name="Standard"/>
      <text:list text:continue-numbering="true" text:style-name="Numbering_20_123">
        <text:list-item>
          <text:p text:style-name="Section"><text:bookmark-start text:name="__RefHeading___Toc12795_2206932868"/>Easy way to find the number of elements in an array<text:bookmark-end text:name="__RefHeading___Toc12795_2206932868"/></text:p>
        </text:list-item>
      </text:list>
      <text:p text:style-name="Code">int arr[] = {10, 5, 15, 12, 90, 80};</text:p>
      <text:p text:style-name="Code">int n = sizeof(arr)/sizeof(arr[0]);</text:p>
      <text:p text:style-name="Standard"/>
      <text:list text:continue-numbering="true" text:style-name="Numbering_20_123">
        <text:list-item>
          <text:p text:style-name="Section"><text:bookmark-start text:name="__RefHeading___Toc12793_2206932868"/>Function Pointers<text:bookmark-end text:name="__RefHeading___Toc12793_2206932868"/></text:p>
        </text:list-item>
      </text:list>
      <text:p text:style-name="Standard">In C, like normal data pointers (<text:span text:style-name="T3">int *</text:span>, <text:span text:style-name="T3">char *</text:span>, etc), we can have pointers to functions. Following is a simple example that shows declaration and function call using function pointer.</text:p>
      <text:p text:style-name="Standard"/>
      <text:p text:style-name="Code">#include &lt;stdio.h&gt;</text:p>
      <text:p text:style-name="Code"/>
      <text:p text:style-name="Code">// A normal function with an int parameter and void return type</text:p>
      <text:p text:style-name="Code">void fun(int a)</text:p>
      <text:p text:style-name="Code">{</text:p>
      <text:p text:style-name="Code"><text:s text:c="4"/>printf("Value of a is %d\n", a);</text:p>
      <text:p text:style-name="Code">}</text:p>
      <text:p text:style-name="Code"/>
      <text:p text:style-name="Code">int main()</text:p>
      <text:p text:style-name="Code">{</text:p>
      <text:p text:style-name="Code"><text:s text:c="4"/>// fun_ptr is a pointer to function fun()</text:p>
      <text:p text:style-name="Code"><text:s text:c="4"/>void (*fun_ptr)(int) = &amp;fun;</text:p>
      <text:p text:style-name="Code"><text:s text:c="4"/></text:p>
      <text:p text:style-name="Code"><text:s text:c="4"/>/* The above line is equivalent of following two</text:p>
      <text:p text:style-name="Code"><text:s text:c="4"/>void (*fun_ptr)(int);</text:p>
      <text:p text:style-name="Code"><text:s text:c="4"/>fun_ptr = &amp;fun;</text:p>
      <text:p text:style-name="Code"><text:s text:c="4"/>*/</text:p>
      <text:p text:style-name="Code"><text:s text:c="4"/></text:p>
      <text:p text:style-name="Code"><text:s text:c="4"/>// Invoking fun() using fun_ptr</text:p>
      <text:p text:style-name="Code"><text:s text:c="4"/>(*fun_ptr)(10);</text:p>
      <text:p text:style-name="Code"><text:s text:c="4"/></text:p>
      <text:p text:style-name="Code"><text:soft-page-break/><text:s text:c="4"/>/* The above line is equivalent of following</text:p>
      <text:p text:style-name="Code"><text:s text:c="4"/>fun_ptr(10);</text:p>
      <text:p text:style-name="Code"><text:s text:c="4"/>*/</text:p>
      <text:p text:style-name="Code"><text:s text:c="4"/>return 0;</text:p>
      <text:p text:style-name="Code">}</text:p>
      <text:p text:style-name="Standard"/>
      <text:p text:style-name="P11">Output</text:p>
      <text:p text:style-name="Standard"/>
      <text:p text:style-name="Code">Value of a is 10</text:p>
      <text:p text:style-name="Standard"/>
      <text:p text:style-name="Standard">Why do we need an extra bracket around function pointers like fun_ptr in above example?</text:p>
      <text:p text:style-name="Standard">If we remove bracket, then the expression “<text:span text:style-name="T3">void (*fun_ptr)(int)</text:span>” becomes “<text:span text:style-name="T3">void *fun_ptr(int)</text:span>” which is declaration of a function that returns void pointer. See following post for details.</text:p>
      <text:p text:style-name="Standard"/>
      <text:p text:style-name="Standard">Following are some interesting facts about function pointers.</text:p>
      <text:p text:style-name="Standard"/>
      <text:p text:style-name="Standard"><text:span text:style-name="T11">1. </text:span>Unlike normal pointers, a function pointer points to code, not data. Typically, a function pointer stores the start of executable code.</text:p>
      <text:p text:style-name="Standard"/>
      <text:p text:style-name="Code">#include &lt;stdio.h&gt;</text:p>
      <text:p text:style-name="Code">int main(void)</text:p>
      <text:p text:style-name="Code">{</text:p>
      <text:p text:style-name="Code"><text:s text:c="4"/>void (*lets_jump)(void) = (void *)0x1233;</text:p>
      <text:p text:style-name="Code"><text:s text:c="4"/>lets_jump();</text:p>
      <text:p text:style-name="Code"><text:s text:c="4"/>return (0);</text:p>
      <text:p text:style-name="Code">}</text:p>
      <text:p text:style-name="Standard"/>
      <text:p text:style-name="P11">Output</text:p>
      <text:p text:style-name="Standard"/>
      <text:p text:style-name="Code">&lt;jumps to the memory location 0x1233 and executes the code present there&gt;</text:p>
      <text:p text:style-name="Standard"/>
      <text:p text:style-name="Standard"><text:span text:style-name="T12">2. </text:span>Unlike normal pointers, we do not allocate de-allocate memory using function pointers.</text:p>
      <text:p text:style-name="Standard"/>
      <text:p text:style-name="Standard"><text:span text:style-name="T12">3. </text:span>A function’s name can also be used to get functions’ address. For example, in the below program, we have removed address operator ‘<text:span text:style-name="T3">&amp;</text:span>’ in assignment. We have also changed function call by removing <text:span text:style-name="T3">*</text:span>, the program still works.</text:p>
      <text:p text:style-name="Standard"/>
      <text:p text:style-name="Code">#include &lt;stdio.h&gt;</text:p>
      <text:p text:style-name="Code"/>
      <text:p text:style-name="Code">// A normal function with an int parameter and void return type</text:p>
      <text:p text:style-name="Code">void fun(int a)</text:p>
      <text:p text:style-name="Code">{</text:p>
      <text:p text:style-name="Code"><text:s text:c="4"/>printf("Value of a is %d\n", a);</text:p>
      <text:p text:style-name="Code">}</text:p>
      <text:p text:style-name="Code">int main()</text:p>
      <text:p text:style-name="Code">{</text:p>
      <text:p text:style-name="Code"><text:s text:c="4"/>void (*fun_ptr)(int) = fun; // &amp; removed</text:p>
      <text:p text:style-name="Code"><text:soft-page-break/><text:s text:c="4"/>fun_ptr(10); <text:s text:c="15"/>// * removed</text:p>
      <text:p text:style-name="Code"><text:s text:c="4"/>return 0;</text:p>
      <text:p text:style-name="Code">}</text:p>
      <text:p text:style-name="Code"/>
      <text:p text:style-name="P11">Output</text:p>
      <text:p text:style-name="Standard"/>
      <text:p text:style-name="Code">Value of a is 10</text:p>
      <text:p text:style-name="Standard"/>
      <text:p text:style-name="Standard"><text:span text:style-name="T13">4. </text:span>Like normal pointers, we can have an array of function pointers. Below example in point 5 shows syntax for array of pointers.</text:p>
      <text:p text:style-name="Standard"/>
      <text:p text:style-name="Standard"><text:span text:style-name="T13">5. </text:span>Function pointer can be used in place of switch case. For example, in below program, user is asked for a <text:span text:style-name="T3">choice</text:span> between <text:span text:style-name="T3">0</text:span> and <text:span text:style-name="T3">2</text:span> to do different tasks.</text:p>
      <text:p text:style-name="Standard"/>
      <text:p text:style-name="Code">#include &lt;stdio.h&gt;</text:p>
      <text:p text:style-name="Code"/>
      <text:p text:style-name="Code">void add(int a, int b)</text:p>
      <text:p text:style-name="Code">{</text:p>
      <text:p text:style-name="Code"><text:s text:c="4"/>printf("Addition is %d\n", a + b);</text:p>
      <text:p text:style-name="Code">}</text:p>
      <text:p text:style-name="Code">void subtract(int a, int b)</text:p>
      <text:p text:style-name="Code">{</text:p>
      <text:p text:style-name="Code"><text:s text:c="4"/>printf("Subtraction is %d\n", a - b);</text:p>
      <text:p text:style-name="Code">}</text:p>
      <text:p text:style-name="Code">void multiply(int a, int b)</text:p>
      <text:p text:style-name="Code">{</text:p>
      <text:p text:style-name="Code"><text:s text:c="4"/>printf("Multiplication is %d\n", a * b);</text:p>
      <text:p text:style-name="Code">}</text:p>
      <text:p text:style-name="Code">int main()</text:p>
      <text:p text:style-name="Code">{</text:p>
      <text:p text:style-name="Code"><text:s text:c="4"/>// fun_ptr_arr is an array of function pointers</text:p>
      <text:p text:style-name="Code"><text:s text:c="4"/>void (*fun_ptr_arr[])(int, int) = {add, subtract, multiply};</text:p>
      <text:p text:style-name="Code"><text:s text:c="4"/>unsigned int ch, a = 15, b = 10;</text:p>
      <text:p text:style-name="Code"><text:s text:c="4"/>printf("Enter Choice: 0 for add, 1 for subtract and 2 for multiply\n");</text:p>
      <text:p text:style-name="Code"><text:s text:c="4"/>scanf("%d", &amp;ch);</text:p>
      <text:p text:style-name="Code"><text:s text:c="4"/>if (ch &gt; 2)</text:p>
      <text:p text:style-name="Code"><text:s text:c="4"/>{</text:p>
      <text:p text:style-name="Code"><text:s text:c="8"/>return 0;</text:p>
      <text:p text:style-name="Code"><text:s text:c="4"/>} <text:s text:c="3"/></text:p>
      <text:p text:style-name="Code"><text:s text:c="4"/>(*fun_ptr_arr[ch])(a, b);</text:p>
      <text:p text:style-name="Code"><text:s text:c="4"/>return 0;</text:p>
      <text:p text:style-name="Code">}</text:p>
      <text:p text:style-name="Code"/>
      <text:p text:style-name="P34">Output</text:p>
      <text:p text:style-name="P59"><text:span text:style-name="T4"/></text:p>
      <text:p text:style-name="Code">Enter Choice: 0 for add, 1 for subtract and 2 for multiply</text:p>
      <text:p text:style-name="Code">2</text:p>
      <text:p text:style-name="Code">Multiplication is 150</text:p>
      <text:p text:style-name="Code"/>
      <text:p text:style-name="Standard"><text:soft-page-break/><text:span text:style-name="T13">6. </text:span>Like normal data pointers, a function pointer can be passed as an argument and can also be returned from a function.</text:p>
      <text:p text:style-name="Standard"/>
      <text:p text:style-name="Standard">For example, consider the following C program where <text:span text:style-name="T3">wrapper()</text:span> receives a <text:span text:style-name="T3">void fun()</text:span> as parameter and calls the passed function.</text:p>
      <text:p text:style-name="Standard"/>
      <text:p text:style-name="Code">// A simple C program to show function pointers as parameter</text:p>
      <text:p text:style-name="Code">#include &lt;stdio.h&gt;</text:p>
      <text:p text:style-name="Code"/>
      <text:p text:style-name="Code">// Two simple functions</text:p>
      <text:p text:style-name="Code">void fun1()</text:p>
      <text:p text:style-name="Code">{</text:p>
      <text:p text:style-name="Code"><text:s text:c="4"/>printf("Fun1\n");</text:p>
      <text:p text:style-name="Code">}</text:p>
      <text:p text:style-name="Code"/>
      <text:p text:style-name="Code">void fun2()</text:p>
      <text:p text:style-name="Code">{</text:p>
      <text:p text:style-name="Code"><text:s text:c="4"/>printf("Fun2\n");</text:p>
      <text:p text:style-name="Code">}</text:p>
      <text:p text:style-name="Code"/>
      <text:p text:style-name="Code">// A function that receives a simple function as parameter and calls the function</text:p>
      <text:p text:style-name="Code"/>
      <text:p text:style-name="Code">void wrapper(void (*fun)())</text:p>
      <text:p text:style-name="Code">{</text:p>
      <text:p text:style-name="Code"><text:s text:c="4"/>fun();</text:p>
      <text:p text:style-name="Code">}</text:p>
      <text:p text:style-name="Code"/>
      <text:p text:style-name="Code">int main()</text:p>
      <text:p text:style-name="Code">{</text:p>
      <text:p text:style-name="Code"><text:s text:c="4"/>wrapper(fun1);</text:p>
      <text:p text:style-name="Code"><text:s text:c="4"/>wrapper(fun2);</text:p>
      <text:p text:style-name="Code"><text:s text:c="4"/>return 0;</text:p>
      <text:p text:style-name="Code">}</text:p>
      <text:p text:style-name="Standard">This point in particular is very useful in C. In C, we can use function pointers to avoid code redundancy. For example a simple <text:span text:style-name="T3">qsort()</text:span> function can be used to sort arrays in ascending order or descending or by any other order in case of array of structures. Not only this, with function pointers and void pointers, it is possible to use <text:span text:style-name="T3">qsort</text:span> for any data type.</text:p>
      <text:p text:style-name="Standard"/>
      <text:p text:style-name="Code">// An example for qsort and comparator</text:p>
      <text:p text:style-name="Code">#include &lt;stdio.h&gt;</text:p>
      <text:p text:style-name="Code">#include &lt;stdlib.h&gt;</text:p>
      <text:p text:style-name="Code"/>
      <text:p text:style-name="Code">// A sample comparator function that is used for sorting an integer array in ascending order.</text:p>
      <text:p text:style-name="Code">// To sort any array for any other data type and/or criteria, all we need to do is write more compare functions.</text:p>
      <text:p text:style-name="Code">// And we can use the same qsort()</text:p>
      <text:p text:style-name="Code">int compare(const void *a, const void *b)</text:p>
      <text:p text:style-name="Code">{</text:p>
      <text:p text:style-name="Code"><text:soft-page-break/><text:s text:c="4"/>return (*(int *)a - *(int *)b);</text:p>
      <text:p text:style-name="Code">}</text:p>
      <text:p text:style-name="Code">int main()</text:p>
      <text:p text:style-name="Code">{</text:p>
      <text:p text:style-name="Code"><text:s text:c="4"/>int arr[] = {10, 5, 15, 12, 90, 80};</text:p>
      <text:p text:style-name="Code"><text:s text:c="4"/>int n = sizeof(arr) / sizeof(arr[0]), i;</text:p>
      <text:p text:style-name="Code"><text:s text:c="4"/>qsort(arr, n, sizeof(int), compare);</text:p>
      <text:p text:style-name="Code"><text:s text:c="4"/>for (i = 0; i &lt; n; i++)</text:p>
      <text:p text:style-name="Code"><text:s text:c="4"/>{</text:p>
      <text:p text:style-name="Code"><text:s text:c="8"/>printf("%d ", arr[i]);</text:p>
      <text:p text:style-name="Code"><text:s text:c="4"/>}</text:p>
      <text:p text:style-name="Code"><text:s text:c="4"/>return 0;</text:p>
      <text:p text:style-name="Code">}</text:p>
      <text:p text:style-name="Code"/>
      <text:p text:style-name="P11">Output</text:p>
      <text:p text:style-name="Standard"/>
      <text:p text:style-name="Code">5 10 12 15 80 90</text:p>
      <text:p text:style-name="Code"/>
      <text:p text:style-name="Standard">Similar to <text:span text:style-name="T3">qsort()</text:span>,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p>
      <text:p text:style-name="Standard"/>
      <text:p text:style-name="Code">#include &lt;stdio.h&gt;</text:p>
      <text:p text:style-name="Code">#include &lt;stdbool.h&gt;</text:p>
      <text:p text:style-name="Code"/>
      <text:p text:style-name="Code">// A compare function that is used for searching an integer array</text:p>
      <text:p text:style-name="Code">bool compare(const void *a, const void *b)</text:p>
      <text:p text:style-name="Code">{</text:p>
      <text:p text:style-name="Code"><text:s text:c="4"/>return (*(int *)a == *(int *)b);</text:p>
      <text:p text:style-name="Code">}</text:p>
      <text:p text:style-name="Code">// General purpose search() function that can be used</text:p>
      <text:p text:style-name="Code">// for searching an element *x in an array arr[] of</text:p>
      <text:p text:style-name="Code">// arr_size. Note that void pointers are used so that</text:p>
      <text:p text:style-name="Code">// the function can be called by passing a pointer of</text:p>
      <text:p text:style-name="Code">// any type. ele_size is size of an array element</text:p>
      <text:p text:style-name="Code">int search(void *arr, int arr_size, int ele_size, void *x, bool compare(const void *, const void *))</text:p>
      <text:p text:style-name="Code">{</text:p>
      <text:p text:style-name="Code"><text:s text:c="4"/>// Since char takes one byte, we can use char pointer for any type</text:p>
      <text:p text:style-name="Code"><text:s text:c="4"/>// To get pointer arithmetic correct, // we need to multiply index with size of an array element ele_size</text:p>
      <text:p text:style-name="Code"><text:s text:c="4"/>char *ptr = (char *)arr;</text:p>
      <text:p text:style-name="Code"><text:s text:c="4"/>int i;</text:p>
      <text:p text:style-name="Code"><text:s text:c="4"/>for (i = 0; i &lt; arr_size; i++)</text:p>
      <text:p text:style-name="Code"><text:s text:c="4"/>{</text:p>
      <text:p text:style-name="Code"><text:s text:c="8"/>if (compare(ptr + i * ele_size, x))</text:p>
      <text:p text:style-name="Code"><text:s text:c="8"/>{</text:p>
      <text:p text:style-name="Code"><text:s text:c="12"/>return i;</text:p>
      <text:p text:style-name="Code"><text:soft-page-break/><text:s text:c="8"/>}</text:p>
      <text:p text:style-name="Code"><text:s text:c="8"/>// If element not found</text:p>
      <text:p text:style-name="Code"><text:s text:c="8"/>return -1;</text:p>
      <text:p text:style-name="Code"><text:s text:c="4"/>}</text:p>
      <text:p text:style-name="Code">}</text:p>
      <text:p text:style-name="Code">int main()</text:p>
      <text:p text:style-name="Code">{</text:p>
      <text:p text:style-name="Code"><text:s text:c="4"/>int arr[] = {2, 5, 7, 90, 70};</text:p>
      <text:p text:style-name="Code"><text:s text:c="4"/>int n = sizeof(arr) / sizeof(arr[0]);</text:p>
      <text:p text:style-name="Code"><text:s text:c="4"/>int x = 7;</text:p>
      <text:p text:style-name="Code"><text:s text:c="4"/>printf("Returned index is %d ", search(arr, n, sizeof(int), &amp;x, compare));</text:p>
      <text:p text:style-name="Code"><text:s text:c="4"/>return 0;</text:p>
      <text:p text:style-name="Code">}</text:p>
      <text:p text:style-name="Code"/>
      <text:p text:style-name="P11">Output</text:p>
      <text:p text:style-name="Standard"/>
      <text:p text:style-name="Code">Returned index is 2</text:p>
      <text:p text:style-name="Code"/>
      <text:p text:style-name="Standard">The above search function can be used for any data type by writing a separate customized <text:span text:style-name="T3">compare()</text:span>.</text:p>
      <text:p text:style-name="Standard"><text:s/></text:p>
      <text:p text:style-name="Standard"><text:span text:style-name="T14">7. </text:span>Many object-oriented features in C++ are implemented using function pointers in C.</text:p>
      <text:p text:style-name="Standard"/>
      <text:list text:continue-numbering="true" text:style-name="Numbering_20_123">
        <text:list-item>
          <text:p text:style-name="Section"><text:bookmark-start text:name="__RefHeading___Toc12791_2206932868"/>Call back function using function pointer – Example<text:bookmark-end text:name="__RefHeading___Toc12791_2206932868"/></text:p>
        </text:list-item>
      </text:list>
      <text:p text:style-name="Code">#include &lt;stdio.h&gt;</text:p>
      <text:p text:style-name="Code"/>
      <text:p text:style-name="Code">int call_back_function(int a)</text:p>
      <text:p text:style-name="Code">{</text:p>
      <text:p text:style-name="Code"><text:s text:c="4"/>printf("Hello: %d\n", a);</text:p>
      <text:p text:style-name="Code"><text:s text:c="4"/>return (0);</text:p>
      <text:p text:style-name="Code">}</text:p>
      <text:p text:style-name="Code"/>
      <text:p text:style-name="Code">int foo(int (*ptr)(int), int num)</text:p>
      <text:p text:style-name="Code">{</text:p>
      <text:p text:style-name="Code"><text:s text:c="4"/>printf("Processing Complete - Calling Call Back Function\n");</text:p>
      <text:p text:style-name="Code"><text:s text:c="4"/>ptr(num);</text:p>
      <text:p text:style-name="Code"><text:s text:c="4"/>return (0);</text:p>
      <text:p text:style-name="Code">}</text:p>
      <text:p text:style-name="Code"/>
      <text:p text:style-name="Code">int main(void)</text:p>
      <text:p text:style-name="Code">{</text:p>
      <text:p text:style-name="Code"><text:s text:c="4"/>int b = 789;</text:p>
      <text:p text:style-name="Code"><text:s text:c="4"/>int (*hello)(int);</text:p>
      <text:p text:style-name="Code"><text:s text:c="4"/>hello = call_back_function;</text:p>
      <text:p text:style-name="Code"><text:s text:c="4"/>foo(hello, b);</text:p>
      <text:p text:style-name="Code"><text:s text:c="4"/>return (0);</text:p>
      <text:p text:style-name="Code">}</text:p>
      <text:p text:style-name="Standard"/>
      <text:list text:continue-numbering="true" text:style-name="Numbering_20_123">
        <text:list-item>
          <text:p text:style-name="Section"><text:bookmark-start text:name="__RefHeading___Toc12789_2206932868"/>Function pointer without a name in C<text:bookmark-end text:name="__RefHeading___Toc12789_2206932868"/></text:p>
        </text:list-item>
      </text:list>
      <text:p text:style-name="Standard"><text:soft-page-break/>A normal function pointer would look like this:</text:p>
      <text:p text:style-name="Standard"/>
      <text:p text:style-name="Code">void (*fun_ptr)(void);</text:p>
      <text:p text:style-name="Code"/>
      <text:p text:style-name="Standard">However, I have seen this syntax used to cast something to a void function pointer:</text:p>
      <text:p text:style-name="Standard"/>
      <text:p text:style-name="Code">(void (*)(void *))</text:p>
      <text:p text:style-name="Code"/>
      <text:p text:style-name="Standard">As you can see it has no name and only has (<text:span text:style-name="T3">*</text:span>) in place of a name. What does this mean? Is it only used for casting?</text:p>
      <text:p text:style-name="Standard">The syntax <text:span text:style-name="T3">(void (*)(void *))</text:span> is a cast.</text:p>
      <text:p text:style-name="Standard">The destination type of the cast is a function pointer that takes a single parameter of type <text:span text:style-name="T3">void *</text:span> and returns <text:span text:style-name="T3">void</text:span>. An example of a function whose type matches this cast is:</text:p>
      <text:p text:style-name="Standard"/>
      <text:p text:style-name="Code">void abc(void *param);</text:p>
      <text:p text:style-name="Standard"/>
      <text:list text:continue-numbering="true" text:style-name="Numbering_20_123">
        <text:list-item>
          <text:p text:style-name="Section"><text:bookmark-start text:name="__RefHeading___Toc12787_2206932868"/>C program to check Endianness<text:bookmark-end text:name="__RefHeading___Toc12787_2206932868"/></text:p>
        </text:list-item>
      </text:list>
      <text:p text:style-name="Code">unsigned int x = 0x7654;</text:p>
      <text:p text:style-name="Code">char *c = (char*) &amp;x;</text:p>
      <text:p text:style-name="Standard"/>
      <text:p text:style-name="P11">Big endian format</text:p>
      <text:p text:style-name="P11"/>
      <text:p text:style-name="Standard">Byte address <text:s/>| <text:s/>0x01 <text:s text:c="2"/>| <text:s/>0x02 <text:s/>|</text:p>
      <text:p text:style-name="P60">Byte content <text:s/>| 0x76 | 0x54 |</text:p>
      <text:p text:style-name="P60"/>
      <text:p text:style-name="P23">Little endian format</text:p>
      <text:p text:style-name="P23"/>
      <text:p text:style-name="Standard">Byte address <text:s/>| 0x01 | 0x02 | </text:p>
      <text:p text:style-name="Standard">Byte content <text:s/>| 0x54 | 0x76 |</text:p>
      <text:p text:style-name="Standard"/>
      <text:p text:style-name="P11">Quick way to remember</text:p>
      <text:p text:style-name="P11"/>
      <text:p text:style-name="Standard"><text:span text:style-name="T4">LLL</text:span> – <text:span text:style-name="T4">L</text:span>east significant byte in <text:span text:style-name="T6">L</text:span>east address, it means <text:span text:style-name="T4">L</text:span>ittle endian.</text:p>
      <text:p text:style-name="Standard">C program to find out if the underlying architecture is little endian or big endian. </text:p>
      <text:p text:style-name="Standard"><text:s/></text:p>
      <text:p text:style-name="Code">#include &lt;stdio.h&gt;</text:p>
      <text:p text:style-name="Code"/>
      <text:p text:style-name="Code">int main()</text:p>
      <text:p text:style-name="Code">{</text:p>
      <text:p text:style-name="Code"><text:s text:c="4"/>unsigned int x = 0x7654;</text:p>
      <text:p text:style-name="Code"><text:s text:c="4"/>char *c = (char *)&amp;x;</text:p>
      <text:p text:style-name="Code"><text:s text:c="4"/>printf("*c is: 0x%x\n", *c);</text:p>
      <text:p text:style-name="Code"><text:s text:c="4"/>if (*c == 0x54)</text:p>
      <text:p text:style-name="Code"><text:s text:c="4"/>{</text:p>
      <text:p text:style-name="Code"><text:s text:c="8"/>printf("Underlying architecture is little endian. \n");</text:p>
      <text:p text:style-name="Code"><text:s text:c="4"/>}</text:p>
      <text:p text:style-name="Code"><text:s text:c="4"/>else</text:p>
      <text:p text:style-name="Code"><text:s text:c="4"/>{</text:p>
      <text:p text:style-name="Code"><text:s text:c="8"/>printf("Underlying architecture is big endian. \n");</text:p>
      <text:p text:style-name="Code"><text:soft-page-break/><text:s text:c="4"/>}</text:p>
      <text:p text:style-name="Code"><text:s text:c="4"/>return (0);</text:p>
      <text:p text:style-name="Code">}</text:p>
      <text:p text:style-name="Standard"/>
      <text:list text:continue-numbering="true" text:style-name="Numbering_20_123">
        <text:list-item>
          <text:p text:style-name="Section"><text:bookmark-start text:name="__RefHeading___Toc12785_2206932868"/>Initializing multi-dimensional array pointer<text:bookmark-end text:name="__RefHeading___Toc12785_2206932868"/></text:p>
        </text:list-item>
      </text:list>
      <text:p text:style-name="Code">int a[3][4][5];</text:p>
      <text:p text:style-name="Code">int (*b)[3][4][5] = &amp;a;</text:p>
      <text:p text:style-name="Code">printf("%d", (*b)[1][2][3]);</text:p>
      <text:p text:style-name="Code">printf("%d", *(*(*(a + 1) + 2) + 3));</text:p>
      <text:p text:style-name="Code">printf("%d", *(*(*(b + 1) + 2) + 3));</text:p>
      <text:p text:style-name="Standard"/>
      <text:list text:continue-numbering="true" text:style-name="Numbering_20_123">
        <text:list-item>
          <text:p text:style-name="Section"><text:bookmark-start text:name="__RefHeading___Toc12783_2206932868"/>Bit-Shift and Bitwise operators<text:bookmark-end text:name="__RefHeading___Toc12783_2206932868"/></text:p>
        </text:list-item>
      </text:list>
      <text:p text:style-name="Standard">Let, the initial value of REGISTER be <text:span text:style-name="T3">0bXXXX XXXX</text:span> (0 otherwise 1, we really “Don’t Care”). The code given below:</text:p>
      <text:p text:style-name="Standard"/>
      <text:p text:style-name="Code">REGISTER = REGISTER &lt;&lt; 3;</text:p>
      <text:p text:style-name="Code"/>
      <text:p text:style-name="Standard">Otherwise,</text:p>
      <text:p text:style-name="Standard"/>
      <text:p text:style-name="Code">REGISTER &lt;&lt;= 3;</text:p>
      <text:p text:style-name="Code"/>
      <text:p text:style-name="Standard">Shifts contents in the <text:span text:style-name="T3">REGISTER</text:span> to <text:span text:style-name="T3">3</text:span> places towards left. So, the final value of <text:span text:style-name="T3">REGISTER</text:span> would be </text:p>
      <text:p text:style-name="Code">0bXXXX X000</text:p>
      <text:p text:style-name="Standard">Similarly, let the initial value of <text:span text:style-name="T3">REGISTER</text:span> be <text:span text:style-name="T3">0bXXXX XXXX</text:span> (0 otherwise 1, we really “Don’t Care”). The code given below:</text:p>
      <text:p text:style-name="Standard"/>
      <text:p text:style-name="Code">REGISTER = REGISTER &gt;&gt; 3;</text:p>
      <text:p text:style-name="Code"/>
      <text:p text:style-name="Standard">Otherwise,</text:p>
      <text:p text:style-name="Standard"/>
      <text:p text:style-name="Code">REGISTER &gt;&gt;= 3;</text:p>
      <text:p text:style-name="Standard"/>
      <text:p text:style-name="Standard">Shifts contents in the <text:span text:style-name="T3">REGISTER</text:span> to <text:span text:style-name="T3">3</text:span> places towards right. So, the final value of <text:span text:style-name="T3">REGISTER</text:span> would be <text:span text:style-name="T3">0b000X XXXX</text:span></text:p>
      <text:p text:style-name="Standard"><text:span text:style-name="T3"/></text:p>
      <text:p text:style-name="Standard">Let, the initial value of <text:span text:style-name="T3">REGISTER</text:span> be <text:span text:style-name="T3">0bXXXX XXXX</text:span> (0 otherwise 1, we really “Don’t Care”). If we want to change the 3rd bit from right (i.e., bit 2, also called as 2nd place, hereafter), we can do something like below.</text:p>
      <text:p text:style-name="Standard"/>
      <text:p text:style-name="Code">REGISTER = REGISTER | (1 &lt;&lt; 2);</text:p>
      <text:p text:style-name="Standard"/>
      <text:p text:style-name="Standard">Otherwise,</text:p>
      <text:p text:style-name="Standard"/>
      <text:p text:style-name="Code">REGISTER |= (1 &lt;&lt; 2);</text:p>
      <text:p text:style-name="Code"/>
      <text:p text:style-name="P61">This will change the <text:span text:style-name="T3">REGISTER</text:span> value to <text:span text:style-name="T3">0bXXXX X1XX</text:span>. Here, <text:span text:style-name="T3">1&lt;&lt;2</text:span> means, shift, binary digit 1 from right to 2nd place. When 1 is OR-ed with 1 or 0 (Depicted by X, i.e. “Don’t Care”), the result is always 1.</text:p>
      <text:p text:style-name="P61"><text:soft-page-break/></text:p>
      <text:p text:style-name="P61">Similar is the case if we want to make the 2nd place to 0. But, here, we use AND. Remember 0 when AND-ed with 1 or 0 always results in 0. Below is the code.</text:p>
      <text:p text:style-name="P61"/>
      <text:p text:style-name="Code">REGISTER = REGISTER &amp; ~(1 &lt;&lt; 2);</text:p>
      <text:p text:style-name="Code"/>
      <text:p text:style-name="Standard">Otherwise,</text:p>
      <text:p text:style-name="Standard"/>
      <text:p text:style-name="Code">REGISTER &amp;= ~(1 &lt;&lt; 2);</text:p>
      <text:p text:style-name="Code"/>
      <text:p text:style-name="Standard">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 31 bits in it?), which is inefficient. There is a much easier way to this. Say for instance, if we want to change, 2nd place to 1, 5th place to 0 and 6th place to 1. We can write the below 2 lines of code for that.</text:p>
      <text:p text:style-name="Standard"/>
      <text:p text:style-name="Code">REGISTER &amp;= 0b1001 1011;</text:p>
      <text:p text:style-name="Code">REGISTER |= 0b0100 0100;</text:p>
      <text:p text:style-name="Standard"/>
      <text:p text:style-name="P61">Final, <text:span text:style-name="T3">REGISTER</text:span> value will be <text:span text:style-name="T3">0bX10X X1XX</text:span>. Just, as we wanted.</text:p>
      <text:p text:style-name="Standard">If we want to compliment a particular bit without affecting other bits of the register, we could do an XOR operation like below. This will, compliment the 2nd bit. Remember, <text:span text:style-name="T3">X^1 = ~X</text:span>, and, <text:span text:style-name="T3">X^0 = X</text:span>.</text:p>
      <text:p text:style-name="Standard"/>
      <text:p text:style-name="Code">REGISTER = REGISTER ^ (1 &lt;&lt; 2);</text:p>
      <text:p text:style-name="Standard"/>
      <text:p text:style-name="Standard">Otherwise,</text:p>
      <text:p text:style-name="Standard"/>
      <text:p text:style-name="Code">REGISTER ^= (1 &lt;&lt; 2);</text:p>
      <text:p text:style-name="Standard"/>
      <text:p text:style-name="Standard">On several occasions, we might want to compliment few bits in a register but not affect the other bits in the same register. Say for instance, if we want to compliment, 2nd place, 5th place and 6th place. We can write the below single line of code for that.</text:p>
      <text:p text:style-name="Standard"/>
      <text:p text:style-name="Code">REGISTER ^= 0b0110 0100</text:p>
      <text:p text:style-name="Standard"/>
      <text:list text:continue-numbering="true" text:style-name="Numbering_20_123">
        <text:list-item>
          <text:p text:style-name="Section"><text:bookmark-start text:name="__RefHeading___Toc12781_2206932868"/>Pointer Arithmetic<text:bookmark-end text:name="__RefHeading___Toc12781_2206932868"/></text:p>
        </text:list-item>
      </text:list>
      <text:p text:style-name="Code">int* p = (int *) 0x1F4; <text:s/>//Decimal value is 500. int* q = (int *) 0x226; <text:s/>//Decimal value is 550.</text:p>
      <text:p text:style-name="Code">int i;</text:p>
      <text:p text:style-name="Code">i = q – p; <text:s/>//Gives the number of integer blocks between 500 and 550, which is, (550-500)/2, i.e. 25. Assuming size of int is 2 bytes. So, the value of i will be 25.</text:p>
      <text:p text:style-name="Code">p++; <text:s/>//Increments p by 2 bytes, assuming size of int is 2 bytes. p--; <text:s/>//Decrements p by 2 bytes, assuming size of int is 2 bytes.</text:p>
      <text:p text:style-name="Code">p = p + 3; <text:s/>//Increments p by 6 bytes, assuming size of int is 2 bytes.</text:p>
      <text:p text:style-name="Code"><text:soft-page-break/>p = p – 3; <text:s/>//Decrements p by 6 bytes, assuming size of int is 2 bytes.</text:p>
      <text:p text:style-name="Code">Always read from right to left in these below scenarios as they are unary operators.</text:p>
      <text:p text:style-name="Code">++(*p) <text:s/>//Read data and increment data.</text:p>
      <text:p text:style-name="Code">++*p <text:s/>//Read data and increment data.</text:p>
      <text:p text:style-name="Code">*++p <text:s/>//Increment pointer and read data.</text:p>
      <text:p text:style-name="Code">*p++ <text:s/>//Read data and increment pointer. Here, although ++ has higher priority it is executed after * because it is postfix.</text:p>
      <text:p text:style-name="Code">(*p)++ <text:s/>//Read data and increment data.</text:p>
      <text:p text:style-name="Standard"/>
      <text:list text:continue-numbering="true" text:style-name="Numbering_20_123">
        <text:list-item>
          <text:p text:style-name="Section"><text:bookmark-start text:name="__RefHeading___Toc12779_2206932868"/>enum<text:bookmark-end text:name="__RefHeading___Toc12779_2206932868"/></text:p>
        </text:list-item>
      </text:list>
      <text:p text:style-name="P24">Example 1</text:p>
      <text:p text:style-name="P24"/>
      <text:p text:style-name="Code">#include &lt;stdio.h&gt;</text:p>
      <text:p text:style-name="Code"/>
      <text:p text:style-name="Code">enum week</text:p>
      <text:p text:style-name="Code">{</text:p>
      <text:p text:style-name="Code"><text:s text:c="4"/>Mon, Tue, Wed, Thur, Fri, Sat, Sun</text:p>
      <text:p text:style-name="Code">};</text:p>
      <text:p text:style-name="Code"/>
      <text:p text:style-name="Code">int main()</text:p>
      <text:p text:style-name="Code">{</text:p>
      <text:p text:style-name="Code"><text:s text:c="4"/>enum week day;</text:p>
      <text:p text:style-name="Code"><text:s text:c="4"/>day = Wed;</text:p>
      <text:p text:style-name="Code"><text:s text:c="4"/>printf("%d", day);</text:p>
      <text:p text:style-name="Code"><text:s text:c="4"/>return (0);</text:p>
      <text:p text:style-name="Code">}</text:p>
      <text:p text:style-name="Standard"/>
      <text:p text:style-name="P11">Output</text:p>
      <text:p text:style-name="P11"/>
      <text:p text:style-name="Code">2</text:p>
      <text:p text:style-name="Code"/>
      <text:p text:style-name="P11">Example 2</text:p>
      <text:p text:style-name="P11"/>
      <text:p text:style-name="Code">#include &lt;stdio.h&gt;</text:p>
      <text:p text:style-name="Code"/>
      <text:p text:style-name="Code">enum year</text:p>
      <text:p text:style-name="Code">{</text:p>
      <text:p text:style-name="Code"><text:s text:c="4"/>Jan, Feb, Mar, Apr, May, Jun, Jul, Aug, Sep, Oct, Nov, Dec</text:p>
      <text:p text:style-name="Code">};</text:p>
      <text:p text:style-name="Code"/>
      <text:p text:style-name="Code">int main()</text:p>
      <text:p text:style-name="Code">{</text:p>
      <text:p text:style-name="Code"><text:s text:c="4"/>int i;</text:p>
      <text:p text:style-name="Code"><text:s text:c="4"/>for (i = Jan; i &lt;= Dec; i++)</text:p>
      <text:p text:style-name="Code"><text:s text:c="4"/>{</text:p>
      <text:p text:style-name="Code"><text:s text:c="8"/>printf("%d ", i);</text:p>
      <text:p text:style-name="Code"><text:s text:c="4"/>}</text:p>
      <text:p text:style-name="Code"><text:s text:c="4"/>return 0;</text:p>
      <text:p text:style-name="Code"><text:soft-page-break/>}</text:p>
      <text:p text:style-name="Code"/>
      <text:p text:style-name="P24">Output</text:p>
      <text:p text:style-name="Standard"/>
      <text:p text:style-name="Code">0 1 2 3 4 5 6 7 8 9 10 11</text:p>
      <text:p text:style-name="Standard"/>
      <text:p text:style-name="P25">Example 3</text:p>
      <text:p text:style-name="Standard"/>
      <text:p text:style-name="Code">#include &lt;stdio.h&gt;</text:p>
      <text:p text:style-name="Code"/>
      <text:p text:style-name="Code">enum day</text:p>
      <text:p text:style-name="Code">{</text:p>
      <text:p text:style-name="Code"><text:s text:c="4"/>sunday = 1,</text:p>
      <text:p text:style-name="Code"><text:s text:c="4"/>monday,</text:p>
      <text:p text:style-name="Code"><text:s text:c="4"/>tuesday = 5,</text:p>
      <text:p text:style-name="Code"><text:s text:c="4"/>wednesday,</text:p>
      <text:p text:style-name="Code"><text:s text:c="4"/>thursday = 10,</text:p>
      <text:p text:style-name="Code"><text:s text:c="4"/>friday,</text:p>
      <text:p text:style-name="Code"><text:s text:c="4"/>saturday</text:p>
      <text:p text:style-name="Code">};</text:p>
      <text:p text:style-name="Code"/>
      <text:p text:style-name="Code">int main()</text:p>
      <text:p text:style-name="Code">{</text:p>
      <text:p text:style-name="Code"><text:s text:c="4"/>printf("%d %d %d %d %d %d %d", sunday, monday, tuesday, wednesday, thursday, friday, saturday);</text:p>
      <text:p text:style-name="Code"><text:s text:c="4"/>return 0;</text:p>
      <text:p text:style-name="Code">}</text:p>
      <text:p text:style-name="Code"/>
      <text:p text:style-name="P25">Output</text:p>
      <text:p text:style-name="Standard"/>
      <text:p text:style-name="Code">1 2 5 6 10 11 12</text:p>
      <text:p text:style-name="Standard"/>
      <text:p text:style-name="P11">Example 4</text:p>
      <text:p text:style-name="Standard"/>
      <text:p text:style-name="Code">#include &lt;stdio.h&gt;</text:p>
      <text:p text:style-name="Code"/>
      <text:p text:style-name="Code">enum state</text:p>
      <text:p text:style-name="Code">{</text:p>
      <text:p text:style-name="Code"><text:s text:c="4"/>working,</text:p>
      <text:p text:style-name="Code"><text:s text:c="4"/>failed</text:p>
      <text:p text:style-name="Code">};</text:p>
      <text:p text:style-name="Code"/>
      <text:p text:style-name="Code">enum result</text:p>
      <text:p text:style-name="Code">{</text:p>
      <text:p text:style-name="Code"><text:s text:c="4"/>failed,</text:p>
      <text:p text:style-name="Code"><text:s text:c="4"/>passed</text:p>
      <text:p text:style-name="Code">};</text:p>
      <text:p text:style-name="Code"/>
      <text:p text:style-name="Code">int main()</text:p>
      <text:p text:style-name="Code">{</text:p>
      <text:p text:style-name="Code"><text:soft-page-break/><text:s text:c="4"/>return 0;</text:p>
      <text:p text:style-name="Code">}</text:p>
      <text:p text:style-name="Code"/>
      <text:p text:style-name="P26">Output</text:p>
      <text:p text:style-name="P26"/>
      <text:p text:style-name="P46">main.c:4:14: error: redeclaration of enumerator 'failed' <text:s/>enum result {failed, passed};</text:p>
      <text:p text:style-name="P46"><text:s text:c="8"/>^~~~~~</text:p>
      <text:p text:style-name="P46">main.c:3:23: note: previous definition of 'failed' was here <text:s/>enum state <text:s/>{working, failed};</text:p>
      <text:p text:style-name="Code"><text:s text:c="17"/>^~~~~~</text:p>
      <text:p text:style-name="Standard"/>
      <text:list text:continue-numbering="true" text:style-name="Numbering_20_123">
        <text:list-item>
          <text:p text:style-name="Section"><text:bookmark-start text:name="__RefHeading___Toc12777_2206932868"/>Bit Fields<text:bookmark-end text:name="__RefHeading___Toc12777_2206932868"/></text:p>
        </text:list-item>
      </text:list>
      <text:p text:style-name="Standard">Suppose your C program contains a number of TRUE/FALSE variables grouped in a structure called status, as follows.</text:p>
      <text:p text:style-name="Standard"/>
      <text:p text:style-name="Code">struct</text:p>
      <text:p text:style-name="Code">{</text:p>
      <text:p text:style-name="Code"><text:tab/>unsigned int widthValidated;</text:p>
      <text:p text:style-name="Code"><text:tab/>unsigned int heightValidated;</text:p>
      <text:p text:style-name="Code">}status;</text:p>
      <text:p text:style-name="Code"/>
      <text:p text:style-name="Standard">This structure requires 8 bytes of memory space but in actual, we are going to store either 0 or 1 in each of the variables. The C programming language offers a better way to utilize the memory space in such situations.</text:p>
      <text:p text:style-name="Standard"/>
      <text:p text:style-name="Standard">If you are using such variables inside a structure then you can define the width of a variable which tells the C compiler that you are going to use only those number of bytes. For example, the above structure can be re-written as follows.</text:p>
      <text:p text:style-name="Standard"/>
      <text:p text:style-name="Code">struct</text:p>
      <text:p text:style-name="Code">{</text:p>
      <text:p text:style-name="Code"><text:tab/>unsigned int widthValidated : 1;</text:p>
      <text:p text:style-name="Code"><text:tab/>unsigned int heightValidated : 1;</text:p>
      <text:p text:style-name="Code">}status;</text:p>
      <text:p text:style-name="Standard"/>
      <text:p text:style-name="Standard">The above structure requires 4 bytes of memory space for status variable, but only 2 bits will be used to store the values.</text:p>
      <text:p text:style-name="Standard"/>
      <text:p text:style-name="Standard">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text:p>
      <text:p text:style-name="Standard"/>
      <text:p text:style-name="Code">#include &lt;stdio.h&gt;</text:p>
      <text:p text:style-name="Code">#include &lt;string.h&gt; /* define simple structure */</text:p>
      <text:p text:style-name="Code"/>
      <text:p text:style-name="Code">struct</text:p>
      <text:p text:style-name="Code">{</text:p>
      <text:p text:style-name="Code"><text:s text:c="4"/>unsigned int widthValidated;</text:p>
      <text:p text:style-name="Code"><text:soft-page-break/><text:s text:c="4"/>unsigned int heightValidated;</text:p>
      <text:p text:style-name="Code">} status1; /* define a structure with bit fields */</text:p>
      <text:p text:style-name="Code">struct</text:p>
      <text:p text:style-name="Code">{</text:p>
      <text:p text:style-name="Code"><text:s text:c="4"/>unsigned int widthValidated : 1;</text:p>
      <text:p text:style-name="Code"><text:s text:c="4"/>unsigned int heightValidated : 1;</text:p>
      <text:p text:style-name="Code">} status2;</text:p>
      <text:p text:style-name="Code">int main(void)</text:p>
      <text:p text:style-name="Code">{</text:p>
      <text:p text:style-name="Code"><text:s text:c="4"/>printf("Memory size occupied by status1 : %d\n", sizeof(status1));</text:p>
      <text:p text:style-name="Code"><text:s text:c="4"/>printf("Memory size occupied by status2 : %d\n", sizeof(status2));</text:p>
      <text:p text:style-name="Code"><text:s text:c="4"/>return 0;</text:p>
      <text:p text:style-name="Code">}</text:p>
      <text:p text:style-name="Code"/>
      <text:p text:style-name="Standard">When the above code is compiled and executed, it produces the following result.</text:p>
      <text:p text:style-name="Standard"/>
      <text:p text:style-name="Code">Memory size occupied by status1 : 8</text:p>
      <text:p text:style-name="Code">Memory size occupied by status2 : 4</text:p>
      <text:p text:style-name="P62"/>
      <text:p text:style-name="P11">Bit Field Declaration</text:p>
      <text:p text:style-name="Standard"/>
      <text:p text:style-name="Standard">The declaration of a bit-field has the following form inside a structure.</text:p>
      <text:p text:style-name="Standard"/>
      <text:p text:style-name="Code">struct</text:p>
      <text:p text:style-name="Code">{</text:p>
      <text:p text:style-name="Code"><text:tab/>&lt;data type&gt; &lt;member name&gt; : &lt;width&gt;;</text:p>
      <text:p text:style-name="Code">};</text:p>
      <text:p text:style-name="Standard"/>
      <text:p text:style-name="P11">Example</text:p>
      <text:p text:style-name="Standard"/>
      <text:p text:style-name="Code">#include &lt;stdio.h&gt;</text:p>
      <text:p text:style-name="Code">#include &lt;string.h&gt;</text:p>
      <text:p text:style-name="Code"/>
      <text:p text:style-name="Code">struct</text:p>
      <text:p text:style-name="Code">{</text:p>
      <text:p text:style-name="Code"><text:s text:c="4"/>unsigned int age : 3;</text:p>
      <text:p text:style-name="Code">} Age;</text:p>
      <text:p text:style-name="Code">int main()</text:p>
      <text:p text:style-name="Code">{</text:p>
      <text:p text:style-name="Code"><text:s text:c="4"/>Age.age = 4;</text:p>
      <text:p text:style-name="Code"><text:s text:c="4"/>printf("Sizeof( Age ) : %d\n", sizeof(Age));</text:p>
      <text:p text:style-name="Code"><text:s text:c="4"/>printf("Age.age : %d\n", Age.age);</text:p>
      <text:p text:style-name="Code"><text:s text:c="4"/>Age.age = 7;</text:p>
      <text:p text:style-name="Code"><text:s text:c="4"/>printf("Age.age : %d\n", Age.age);</text:p>
      <text:p text:style-name="Code"><text:s text:c="4"/>Age.age = 8;</text:p>
      <text:p text:style-name="Code"><text:s text:c="4"/>printf("Age.age : %d\n", Age.age);</text:p>
      <text:p text:style-name="Code"><text:s text:c="4"/>return 0;</text:p>
      <text:p text:style-name="Code">}</text:p>
      <text:p text:style-name="Code"><text:soft-page-break/></text:p>
      <text:p text:style-name="P11">Output</text:p>
      <text:p text:style-name="Standard"/>
      <text:p text:style-name="Code">Sizeof( Age ) : 4</text:p>
      <text:p text:style-name="Code">Age.age : 4</text:p>
      <text:p text:style-name="Code">Age.age : 7</text:p>
      <text:p text:style-name="Code">Age.age : 0</text:p>
      <text:p text:style-name="Standard"/>
      <text:list text:continue-numbering="true" text:style-name="Numbering_20_123">
        <text:list-item>
          <text:p text:style-name="Section"><text:bookmark-start text:name="__RefHeading___Toc12775_2206932868"/>Assigning Pointer address manually<text:bookmark-end text:name="__RefHeading___Toc12775_2206932868"/></text:p>
        </text:list-item>
      </text:list>
      <text:p text:style-name="Code">void * p = (void *)0x28FF44;</text:p>
      <text:p text:style-name="Code"/>
      <text:p text:style-name="Standard">Or if you want it as a <text:span text:style-name="T3">char *</text:span></text:p>
      <text:p text:style-name="Standard"><text:span text:style-name="T3"/></text:p>
      <text:p text:style-name="Code">char * p = (char *)0x28FF44;</text:p>
      <text:p text:style-name="Code"/>
      <text:p text:style-name="Standard">If you're pointing to something you really, really aren't meant to change, add a <text:span text:style-name="T3">const</text:span>.</text:p>
      <text:p text:style-name="Standard"/>
      <text:p text:style-name="Code">const void * p = (const void *)0x28FF44;</text:p>
      <text:p text:style-name="Code">const char * p = (const char *)0x28FF44;</text:p>
      <text:p text:style-name="Standard"/>
      <text:p text:style-name="Standard">Defining memory location of Memory Mapped Registers using Pointers</text:p>
      <text:p text:style-name="Standard"/>
      <text:p text:style-name="Code">#define REGISTER *((uint8_t*) 0x123456)</text:p>
      <text:p text:style-name="Standard"/>
      <text:p text:style-name="Standard">Note: Accessing Non-Memory Mapped Registers, is possible only by using Assembly Language.</text:p>
      <text:p text:style-name="Standard"/>
      <text:list text:continue-numbering="true" text:style-name="Numbering_20_123">
        <text:list-item>
          <text:p text:style-name="Section"><text:bookmark-start text:name="__RefHeading___Toc12773_2206932868"/>Format Specifiers<text:bookmark-end text:name="__RefHeading___Toc12773_2206932868"/></text:p>
        </text:list-item>
      </text:list>
      <text:p text:style-name="Standard"><text:span text:style-name="T3">%c</text:span><text:tab/><text:tab/><text:tab/>Character</text:p>
      <text:p text:style-name="Standard"><text:span text:style-name="T3">%d</text:span><text:tab/><text:tab/><text:tab/>Signed integer</text:p>
      <text:p text:style-name="Standard"><text:span text:style-name="T3">%e</text:span> or <text:span text:style-name="T3">%E</text:span><text:tab/><text:tab/>Scientific notation of floats</text:p>
      <text:p text:style-name="Standard"><text:span text:style-name="T3">%f</text:span><text:tab/><text:tab/><text:tab/>Float values</text:p>
      <text:p text:style-name="Standard"><text:span text:style-name="T3">%.2f</text:span><text:tab/><text:tab/><text:tab/>Float values by rounding to 2 decimal places</text:p>
      <text:p text:style-name="Standard"><text:span text:style-name="T3">%g</text:span> or <text:span text:style-name="T3">%G</text:span><text:tab/><text:tab/>Similar as %e or %E</text:p>
      <text:p text:style-name="Standard"><text:span text:style-name="T3">%hi</text:span><text:tab/><text:tab/><text:tab/>Signed integer (short)</text:p>
      <text:p text:style-name="Standard"><text:span text:style-name="T3">%hu</text:span><text:tab/><text:tab/><text:tab/>Unsigned Integer (short)</text:p>
      <text:p text:style-name="Standard"><text:span text:style-name="T3">%i</text:span><text:tab/><text:tab/><text:tab/>Unsigned integer</text:p>
      <text:p text:style-name="Standard"><text:span text:style-name="T3">%l</text:span> or <text:span text:style-name="T3">%ld</text:span> or <text:span text:style-name="T3">%li</text:span><text:tab/>Long</text:p>
      <text:p text:style-name="Standard"><text:span text:style-name="T3">%lf</text:span><text:tab/><text:tab/><text:tab/>Double</text:p>
      <text:p text:style-name="Standard"><text:span text:style-name="T3">%Lf</text:span><text:tab/><text:tab/><text:tab/>Long double</text:p>
      <text:p text:style-name="Standard"><text:span text:style-name="T3">%lu</text:span><text:tab/><text:tab/><text:tab/>Unsigned int or unsigned long</text:p>
      <text:p text:style-name="Standard"><text:span text:style-name="T3">%lli</text:span> or <text:span text:style-name="T3">%lld</text:span><text:tab/>Long long</text:p>
      <text:p text:style-name="Standard"><text:span text:style-name="T3">%llu</text:span><text:tab/><text:tab/><text:tab/>Unsigned long long</text:p>
      <text:p text:style-name="Standard"><text:span text:style-name="T3">%o</text:span><text:tab/><text:tab/><text:tab/>Octal representation</text:p>
      <text:p text:style-name="Standard"><text:span text:style-name="T3">%p</text:span><text:tab/><text:tab/><text:tab/>Pointer</text:p>
      <text:p text:style-name="Standard"><text:span text:style-name="T3">%s</text:span><text:tab/><text:tab/><text:tab/>String</text:p>
      <text:p text:style-name="Standard"><text:span text:style-name="T3">%u</text:span><text:tab/><text:tab/><text:tab/>Unsigned int</text:p>
      <text:p text:style-name="Standard"><text:span text:style-name="T3">%x</text:span> or <text:span text:style-name="T3">%X</text:span><text:tab/><text:tab/>Hexadecimal representation</text:p>
      <text:p text:style-name="Standard"><text:span text:style-name="T3">%n</text:span><text:tab/><text:tab/><text:tab/>Prints nothing</text:p>
      <text:p text:style-name="Standard"><text:soft-page-break/><text:span text:style-name="T3">%%</text:span><text:tab/><text:tab/><text:tab/>Prints % character</text:p>
      <text:p text:style-name="Standard"/>
      <text:list text:continue-numbering="true" text:style-name="Numbering_20_123">
        <text:list-item>
          <text:p text:style-name="Section"><text:bookmark-start text:name="__RefHeading___Toc12771_2206932868"/>Bootloader, Bootstrap Loader and Start-up Code<text:bookmark-end text:name="__RefHeading___Toc12771_2206932868"/></text:p>
        </text:list-item>
      </text:list>
      <text:p text:style-name="Standard">A bootloader is responsible for moving, and in some cases decompressing, the operating system kernel from long term storage (i.e., flash or hard disk) into main memory (RAM) for execution by the CPU. A bootstrap loader is another term for bootloader.</text:p>
      <text:p text:style-name="Standard"/>
      <text:p text:style-name="Standard">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text:span text:style-name="T3">main</text:span>’ for higher level system initialization such as the instantiation of device drivers and system periphery. In other words,</text:p>
      <text:p text:style-name="P11"/>
      <text:p text:style-name="P11">Bootloader</text:p>
      <text:p text:style-name="P11"/>
      <text:p text:style-name="Standard">Is not part of your application software. It is a piece of code to load your application code into the controller/processor. It is used only when you want to load a new software (version) onto the controller.</text:p>
      <text:p text:style-name="Standard"/>
      <text:p text:style-name="Standard">Example: a bootloader may communicate with the PC (using USB or UART) to load your application software from PC into the microcontroller's program memory. After that it can be executed.</text:p>
      <text:p text:style-name="Standard"/>
      <text:p text:style-name="P11">Start-up code</text:p>
      <text:p text:style-name="Standard"/>
      <text:p text:style-name="Standard">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p>
      <text:p text:style-name="Standard"/>
      <text:list text:continue-numbering="true" text:style-name="Numbering_20_123">
        <text:list-item>
          <text:p text:style-name="Section"><text:bookmark-start text:name="__RefHeading___Toc12769_2206932868"/>Header Include Guard<text:bookmark-end text:name="__RefHeading___Toc12769_2206932868"/></text:p>
        </text:list-item>
      </text:list>
      <text:p text:style-name="Standard">Header Include Guard is used to disable multiple inclusion of header file into a C project. Typical syntax is as below, my-header-file.h</text:p>
      <text:p text:style-name="Standard"/>
      <text:p text:style-name="Code">#ifndef MY_HEADER_FILE_H</text:p>
      <text:p text:style-name="Code">#define MY_HEADER_FILE_H</text:p>
      <text:p text:style-name="Code"/>
      <text:p text:style-name="Code">// Code body for header file</text:p>
      <text:p text:style-name="Code"/>
      <text:p text:style-name="Code">#endif</text:p>
      <text:p text:style-name="Standard"/>
      <text:p text:style-name="Standard">An example to illustrate the issue of multiple file/header inclusion is given below.</text:p>
      <text:p text:style-name="Standard"/>
      <text:p text:style-name="P27">header-1.h</text:p>
      <text:p text:style-name="P27"><text:soft-page-break/></text:p>
      <text:p text:style-name="Code">typedef struct</text:p>
      <text:p text:style-name="Code">{</text:p>
      <text:p text:style-name="Code">…</text:p>
      <text:p text:style-name="Code">}</text:p>
      <text:p text:style-name="Code">MyStruct;</text:p>
      <text:p text:style-name="Code"/>
      <text:p text:style-name="Code">int myFunction(MyStruct *value);</text:p>
      <text:p text:style-name="Code"/>
      <text:p text:style-name="P27">header-2.h</text:p>
      <text:p text:style-name="P27"/>
      <text:p text:style-name="Code">#include "header-1.h"</text:p>
      <text:p text:style-name="Code"/>
      <text:p text:style-name="Code">int myFunction2(MyStruct *value);</text:p>
      <text:p text:style-name="Standard"/>
      <text:p text:style-name="P11">main.c</text:p>
      <text:p text:style-name="Standard"/>
      <text:p text:style-name="Code">#include "header-1.h"</text:p>
      <text:p text:style-name="P47">#include "header-2.h"</text:p>
      <text:p text:style-name="P47"/>
      <text:p text:style-name="P47">int main()</text:p>
      <text:p text:style-name="Code">{</text:p>
      <text:p text:style-name="Code"><text:tab/>// do something</text:p>
      <text:p text:style-name="Code">}</text:p>
      <text:p text:style-name="Code"/>
      <text:p text:style-name="Standard">This code has a serious problem: the detailed contents of <text:span text:style-name="T3">MyStruct</text:span> is defined twice, which is not allowed. This would result in a compilation error that can be difficult to track down, since one header file includes another. If you instead, did it with header guards:</text:p>
      <text:p text:style-name="Standard"/>
      <text:p text:style-name="P11">header-1.h</text:p>
      <text:p text:style-name="Standard"/>
      <text:p text:style-name="Code">#ifndef HEADER_1_H</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Standard"/>
      <text:p text:style-name="P11">header-2.h</text:p>
      <text:p text:style-name="Standard"/>
      <text:p text:style-name="Code">#ifndef HEADER_2_H</text:p>
      <text:p text:style-name="Code">#define HEADER_2_H</text:p>
      <text:p text:style-name="Code"/>
      <text:p text:style-name="Code">#include "header-1.h"</text:p>
      <text:p text:style-name="Code"/>
      <text:p text:style-name="Code"><text:soft-page-break/>int myFunction2(MyStruct *value);</text:p>
      <text:p text:style-name="Code"/>
      <text:p text:style-name="Code">#endif</text:p>
      <text:p text:style-name="P63"/>
      <text:p text:style-name="P28">main.c</text:p>
      <text:p text:style-name="Standard"/>
      <text:p text:style-name="Code">#include "header-1.h"</text:p>
      <text:p text:style-name="Code">#include "header-2.h"</text:p>
      <text:p text:style-name="Code"/>
      <text:p text:style-name="Code">int main()</text:p>
      <text:p text:style-name="Code">{</text:p>
      <text:p text:style-name="Code"><text:tab/>// do something</text:p>
      <text:p text:style-name="Code">}</text:p>
      <text:p text:style-name="Standard"/>
      <text:p text:style-name="Standard">This would then expand to:</text:p>
      <text:p text:style-name="Standard"/>
      <text:p text:style-name="Code">#ifndef HEADER_1_H</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Code"/>
      <text:p text:style-name="Code">#ifndef HEADER_2_H</text:p>
      <text:p text:style-name="Code">#define HEADER_2_H</text:p>
      <text:p text:style-name="Code">#ifndef HEADER_1_H // Safe, since HEADER_1_H was #define-ed before.</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Code"/>
      <text:p text:style-name="Code">int myFunction2(MyStruct *value);</text:p>
      <text:p text:style-name="Code"/>
      <text:p text:style-name="Code">#endif</text:p>
      <text:p text:style-name="Code"/>
      <text:p text:style-name="Code">int main()</text:p>
      <text:p text:style-name="Code">{</text:p>
      <text:p text:style-name="Code"><text:tab/>// do something</text:p>
      <text:p text:style-name="Code"><text:soft-page-break/>}</text:p>
      <text:p text:style-name="Code"/>
      <text:p text:style-name="Standard">When the compiler reaches the second inclusion of header-1.h, <text:span text:style-name="T3">HEADER_1_H</text:span> was already defined by the previous inclusion. So, now everything boils down to:</text:p>
      <text:p text:style-name="Standard"/>
      <text:p text:style-name="Code">#define HEADER_1_H</text:p>
      <text:p text:style-name="Code">typedef struct</text:p>
      <text:p text:style-name="Code">{</text:p>
      <text:p text:style-name="Code">…</text:p>
      <text:p text:style-name="Code">} MyStruct;</text:p>
      <text:p text:style-name="Code"/>
      <text:p text:style-name="Code">int myFunction(MyStruct *value);</text:p>
      <text:p text:style-name="Code"/>
      <text:p text:style-name="Code">#define HEADER_2_H</text:p>
      <text:p text:style-name="Code"/>
      <text:p text:style-name="Code">int myFunction2(MyStruct *value);</text:p>
      <text:p text:style-name="Code"/>
      <text:p text:style-name="Code">int main()</text:p>
      <text:p text:style-name="Code">{</text:p>
      <text:p text:style-name="Code"><text:tab/>// do something</text:p>
      <text:p text:style-name="Code">}</text:p>
      <text:p text:style-name="Standard"/>
      <text:p text:style-name="Standard">And thus, there is no compilation error.</text:p>
      <text:p text:style-name="Standard"/>
      <text:p text:style-name="Standard"><text:span text:style-name="T4">Note: </text:span>There are multiple different conventions for naming the header guards. Some people like to name it <text:span text:style-name="T3">HEADER_2_H_</text:span>, some include the project name like<text:span text:style-name="T3"> MY_PROJECT_HEADER_2_H</text:span>. The important thing is to ensure that the convention you follow makes it so that each file in your project has a unique header guard.</text:p>
      <text:p text:style-name="Standard"/>
      <text:list xml:id="list224009076568765" text:continue-numbering="true" text:style-name="Numbering_20_123">
        <text:list-item>
          <text:p text:style-name="Section"><text:bookmark-start text:name="__RefHeading___Toc12767_2206932868"/>Memory Layout in C<text:bookmark-end text:name="__RefHeading___Toc12767_2206932868"/></text:p>
        </text:list-item>
      </text:list>
      <text:p text:style-name="Standard">When a C program is executed, the operating system allocates a specific chunk of memory for it. This allocated space is structured into a standard layout known as the Memory Map (or process address space).</text:p>
      <text:p text:style-name="Standard"/>
      <text:p text:style-name="Standard">The memory layout of a running C program is traditionally divided into five primary segments, organized from the lowest memory address to the highest memory address.</text:p>
      <text:p text:style-name="Standard"/>
      <text:list text:style-name="L5">
        <text:list-item>
          <text:p text:style-name="P92">Text Segment (Code Segment)</text:p>
        </text:list-item>
      </text:list>
      <text:p text:style-name="Standard">What it stores: The compiled machine code (binary instructions) of your program.</text:p>
      <text:p text:style-name="Standard">Characteristics: It is usually read-only to prevent a program from accidentally modifying its own instructions. It is also shareable so that multiple instances of the same program can use the same memory space.</text:p>
      <text:p text:style-name="Standard"/>
      <text:list text:continue-numbering="true" text:style-name="L5">
        <text:list-item>
          <text:p text:style-name="P92">Data Segment (Initialized Data)</text:p>
        </text:list-item>
      </text:list>
      <text:p text:style-name="Standard">What it stores: Global, static, and external variables that are explicitly initialized by the programmer with a non-zero value.</text:p>
      <text:p text:style-name="Standard">Example: <text:span text:style-name="T3">int global_var = 10;</text:span></text:p>
      <text:p text:style-name="Standard"/>
      <text:list text:continue-numbering="true" text:style-name="L5">
        <text:list-item>
          <text:p text:style-name="P92"><text:soft-page-break/>BSS Segment (Block Started by Symbol)</text:p>
        </text:list-item>
      </text:list>
      <text:p text:style-name="Standard">What it stores: Global and static variables that are uninitialized or initialized to zero.</text:p>
      <text:p text:style-name="Standard">Characteristics: The OS automatically initializes all memory in this segment to arithmetic 0 or NULL pointers before the program starts running.</text:p>
      <text:p text:style-name="Standard">Example: <text:span text:style-name="T3">int global_var; or static int static_var = 0;</text:span></text:p>
      <text:p text:style-name="Standard"/>
      <text:list text:continue-numbering="true" text:style-name="L5">
        <text:list-item>
          <text:p text:style-name="P92">The Heap</text:p>
        </text:list-item>
      </text:list>
      <text:p text:style-name="Standard">What it stores: Dynamically allocated memory during runtime.</text:p>
      <text:p text:style-name="Standard">Characteristics: Managed manually by the programmer using functions like malloc(), calloc(), realloc(), and free(). The heap typically grows upward (from lower to higher memory addresses).</text:p>
      <text:p text:style-name="Standard"/>
      <text:list text:continue-numbering="true" text:style-name="L5">
        <text:list-item>
          <text:p text:style-name="P92">The Stack</text:p>
        </text:list-item>
      </text:list>
      <text:p text:style-name="Standard">What it stores: Local variables, function parameters, return addresses, and frame pointers.</text:p>
      <text:p text:style-name="Standard">Characteristics: Managed automatically by the CPU using a Last-In, First-Out (LIFO) structure. A new stack frame is added whenever a function is called and popped off when the function returns. The stack typically grows downward (from higher to lower memory addresses) toward the heap.</text:p>
      <text:p text:style-name="Standard"/>
      <text:p text:style-name="Standard">Is .bss contained inside .data?</text:p>
      <text:p text:style-name="Standard">No, .bss is not contained inside .data. They are separate, distinct segments in the memory map, though they both deal with global and static variables.</text:p>
      <text:p text:style-name="Standard"/>
      <text:p text:style-name="Standard">The core reason they are separated is file size optimization:</text:p>
      <text:p text:style-name="Standard"/>
      <text:p text:style-name="Standard">The .data segment must store both the variable's name/type and its initial value in the compiled binary executable file.</text:p>
      <text:p text:style-name="Standard"/>
      <text:p text:style-name="Standard">The .bss segment doesn't need to waste space storing a bunch of zeros in the executable file. It simply records how many bytes of zero-initialized memory the program will need. When the program loads into RAM, the OS allocates that block and fills it with zeros.</text:p>
      <text:p text:style-name="Standard"/>
      <text:p text:style-name="Standard">Where are .rodata and .rwdata stored?</text:p>
      <text:p text:style-name="Standard">These terms refer to Read-Only Data and Read-Write Data. They are sub-sections of the broader data categories:</text:p>
      <text:p text:style-name="Standard"/>
      <text:list text:style-name="L6">
        <text:list-item>
          <text:p text:style-name="P93">.rodata (Read-Only Data)</text:p>
        </text:list-item>
      </text:list>
      <text:p text:style-name="Standard">Where it is stored: It is typically placed in the Text Segment (or right next to it) because both require read-only permissions.</text:p>
      <text:p text:style-name="Standard"/>
      <text:p text:style-name="Standard">What it holds: Constant values that cannot be modified at runtime, such as:</text:p>
      <text:p text:style-name="Standard"/>
      <text:p text:style-name="Standard">Hardcoded string literals (e.g., <text:span text:style-name="T3">printf("Hello, World!");</text:span> stores "<text:span text:style-name="T3">Hello, World!</text:span>" in .rodata).</text:p>
      <text:p text:style-name="Standard"/>
      <text:p text:style-name="Standard">Variables explicitly declared with the const keyword (e.g., <text:span text:style-name="T3">const int MAX_USERS = 100;</text:span>).</text:p>
      <text:p text:style-name="Standard"/>
      <text:list text:continue-numbering="true" text:style-name="L6">
        <text:list-item>
          <text:p text:style-name="P93">.rwdata (Read-Write Data)</text:p>
        </text:list-item>
      </text:list>
      <text:p text:style-name="Standard">Where it is stored: This is literally just another name for the standard .data segment.</text:p>
      <text:p text:style-name="Standard"><text:soft-page-break/></text:p>
      <text:p text:style-name="Standard">What it holds: Initialized global and static variables that can be altered throughout the lifecycle of the program.</text:p>
      <text:p text:style-name="Standard"/>
      <text:p text:style-name="P36">Example</text:p>
      <text:p text:style-name="P36"/>
      <text:p text:style-name="Code">#include &lt;stdio.h&gt;</text:p>
      <text:p text:style-name="Code"/>
      <text:p text:style-name="P74">int a = 10; <text:s/>// Stored in .rwdata <text:span text:style-name="T26">also known as</text:span> .data.</text:p>
      <text:p text:style-name="P74">const int b <text:span text:style-name="T27">= 20</text:span>; <text:s/>// Stored in .rodata.</text:p>
      <text:p text:style-name="P74">int c; <text:s/>// Stored in .bss.</text:p>
      <text:p text:style-name="P74"/>
      <text:p text:style-name="Code">int main(void)</text:p>
      <text:p text:style-name="Code"/>
      <text:p text:style-name="Code">{</text:p>
      <text:p text:style-name="Code"><text:s text:c="4"/><text:span text:style-name="T22">const int d = 10; <text:s/>// d is stored in .stack, 10 in .text </text:span><text:span text:style-name="T24">during compile time</text:span><text:span text:style-name="T22">. </text:span><text:span text:style-name="T24">10 is copied to .stack in runtime.</text:span></text:p>
      <text:p text:style-name="P76"><text:s text:c="4"/>int <text:span text:style-name="T22">e</text:span> = 3; <text:s/>// <text:span text:style-name="T22">e is stored in .stack and 3 in .text during compile time. During runtime, 3 is copied to .stack </text:span><text:span text:style-name="T23">from .text</text:span><text:span text:style-name="T22">.</text:span></text:p>
      <text:p text:style-name="P76"><text:span text:style-name="T22"><text:s text:c="4"/></text:span>int <text:span text:style-name="T22">f</text:span>; <text:s/>// <text:span text:style-name="T22">Stored in stack.</text:span></text:p>
      <text:p text:style-name="P76"><text:s text:c="4"/><text:span text:style-name="T22">int *g = (int*)malloc(10*sizeof(int)); <text:s/>// g is stored in .stack, 10 in .text memory and the 10 memory locations are allocated in .heap.</text:span></text:p>
      <text:p text:style-name="P77"><text:s text:c="4"/><text:span text:style-name="T25">const volatile h = 10;</text:span><text:span text:style-name="T22"> <text:s/>// </text:span><text:span text:style-name="T25">h</text:span><text:span text:style-name="T22"> is stored in .stack, 10 in .text </text:span><text:span text:style-name="T24">during compile time</text:span><text:span text:style-name="T22">. </text:span><text:span text:style-name="T24">10 is copied to .stack in runtime.</text:span></text:p>
      <text:p text:style-name="P77"><text:s text:c="4"/><text:span text:style-name="T25">const volatile i;</text:span><text:span text:style-name="T22"> <text:s/>// </text:span><text:span text:style-name="T25">i</text:span><text:span text:style-name="T22"> is stored in .stack.</text:span></text:p>
      <text:p text:style-name="Code">}</text:p>
      <text:p text:style-name="Standard"/>
      <text:list text:continue-list="list224009076568765" text:style-name="Numbering_20_123">
        <text:list-item>
          <text:p text:style-name="Section"><text:bookmark-start text:name="__RefHeading___Toc12765_2206932868"/>Passing an array to a function<text:bookmark-end text:name="__RefHeading___Toc12765_2206932868"/></text:p>
        </text:list-item>
      </text:list>
      <text:p text:style-name="Code">#include &lt;stdio.h&gt;</text:p>
      <text:p text:style-name="Code"/>
      <text:p text:style-name="Code">void helper_1(int arr[], int element) // int arr[] creates a pointer to the first element of the array. Array is always passed by reference.</text:p>
      <text:p text:style-name="Code">{</text:p>
      <text:p text:style-name="Code"><text:s text:c="4"/>printf("Size of arr inside helper_1: %d\n", sizeof(arr)); // arr is just a pointer pointing to the first element of the array. Size of arr is just a word, irrespective of what it points to. 8 bytes in 64 bit architecture.</text:p>
      <text:p text:style-name="Code"><text:s text:c="4"/>for (int i = 0; i &lt; element; i++)</text:p>
      <text:p text:style-name="Code"><text:s text:c="4"/>{</text:p>
      <text:p text:style-name="Code"><text:s text:c="8"/>printf("%d ", arr[i]);</text:p>
      <text:p text:style-name="Code"><text:s text:c="4"/>}</text:p>
      <text:p text:style-name="Code"><text:s text:c="4"/>printf("\n");</text:p>
      <text:p text:style-name="Code">}</text:p>
      <text:p text:style-name="Code">void helper_2(int *arr, int element) // Array is always passed by reference.</text:p>
      <text:p text:style-name="Code">{</text:p>
      <text:p text:style-name="Code"><text:s text:c="4"/>printf("Size of arr inside helper_2: %d\n", sizeof(arr)); // arr is just a pointer pointing to the first element of the array. <text:soft-page-break/>Size of arr is just a word, irrespective of what it points to. 8 bytes in 64 bit architecture.</text:p>
      <text:p text:style-name="Code"><text:s text:c="4"/>for (int i = 0; i &lt; element; i++)</text:p>
      <text:p text:style-name="Code"><text:s text:c="4"/>{</text:p>
      <text:p text:style-name="Code"><text:s text:c="8"/>printf("%d ", arr[i]);</text:p>
      <text:p text:style-name="Code"><text:s text:c="4"/>}</text:p>
      <text:p text:style-name="Code"><text:s text:c="4"/>printf("\n");</text:p>
      <text:p text:style-name="Code">}</text:p>
      <text:p text:style-name="Code">int main(void)</text:p>
      <text:p text:style-name="Code">{</text:p>
      <text:p text:style-name="Code"><text:s text:c="4"/>int arr[] = {1, 2, 3, 4};</text:p>
      <text:p text:style-name="Code"><text:s text:c="4"/>int element = sizeof(arr) / sizeof(arr[0]); // Finding the number of elements in the array.</text:p>
      <text:p text:style-name="Code"><text:s text:c="4"/>printf("Size of int: %d\n", sizeof(int));</text:p>
      <text:p text:style-name="Code"><text:s text:c="4"/>printf("Size of arr: %d\n", sizeof(arr));</text:p>
      <text:p text:style-name="Code"><text:s text:c="4"/>helper_1(arr, element); // Passing arr to the function.</text:p>
      <text:p text:style-name="Code"><text:s text:c="4"/>helper_2(arr, element); // Passing arr to the function.</text:p>
      <text:p text:style-name="Code"><text:s text:c="4"/>return (0);</text:p>
      <text:p text:style-name="Code">}</text:p>
      <text:p text:style-name="Code"/>
      <text:p text:style-name="P11">Output</text:p>
      <text:p text:style-name="P11"/>
      <text:p text:style-name="Code">Size of int: 4</text:p>
      <text:p text:style-name="Code">Size of arr: 16</text:p>
      <text:p text:style-name="Code">Size of arr inside helper_1: 8</text:p>
      <text:p text:style-name="Code">1 2 3 4</text:p>
      <text:p text:style-name="Code">Size of arr inside helper_2: 8</text:p>
      <text:p text:style-name="Code">1 2 3 4</text:p>
      <text:p text:style-name="Standard"/>
      <text:list text:continue-numbering="true" text:style-name="Numbering_20_123">
        <text:list-item>
          <text:p text:style-name="Section"><text:bookmark-start text:name="__RefHeading___Toc12763_2206932868"/>Normal declaration of array of pointers vs. array allocated with malloc()<text:bookmark-end text:name="__RefHeading___Toc12763_2206932868"/></text:p>
        </text:list-item>
      </text:list>
      <text:p text:style-name="Standard">The first is the difference between declaring pointer to an array as</text:p>
      <text:p text:style-name="Standard"/>
      <text:p text:style-name="Code">int num[n];</text:p>
      <text:p text:style-name="Code">int (*array)[n]; array = &amp;num;</text:p>
      <text:p text:style-name="Code">int* array = malloc(n * sizeof(int));</text:p>
      <text:p text:style-name="Code"/>
      <text:p text:style-name="Standard">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 text:style-name="T3">free()</text:span>.</text:p>
      <text:p text:style-name="Standard">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 MB. As a result, if you try to allocate a huge array with:</text:p>
      <text:p text:style-name="Standard"/>
      <text:p text:style-name="Code">int num[n];</text:p>
      <text:p text:style-name="Code">int (*array)[n]; array = &amp;num;</text:p>
      <text:p text:style-name="Code"/>
      <text:p text:style-name="Standard"><text:soft-page-break/>Then you might exceed the stack's storage space, causing the segmentation fault. On the other hand, the heap usually has a huge size (say, as much space as is free on the system), and so mallocing a large object won't cause an out-of-memory error.</text:p>
      <text:p text:style-name="Standard">In general, be careful with variable-length arrays in C. They can easily exceed stack size. Prefer malloc unless you know the size is small or that you really only do want the array for a short period of time.</text:p>
      <text:p text:style-name="Standard"/>
      <text:list text:continue-numbering="true" text:style-name="Numbering_20_123">
        <text:list-item>
          <text:p text:style-name="Section"><text:bookmark-start text:name="__RefHeading___Toc12761_2206932868"/>Token-pasting operator (##)<text:bookmark-end text:name="__RefHeading___Toc12761_2206932868"/></text:p>
        </text:list-item>
      </text:list>
      <text:p text:style-name="Standard">The token-pasting operator <text:span text:style-name="T3">##</text:span> defined by ANSI enables us to combine two tokens within a macro definition to form a single token.</text:p>
      <text:p text:style-name="Standard"/>
      <text:p text:style-name="P11">Example 1</text:p>
      <text:p text:style-name="Standard"/>
      <text:p text:style-name="Code">#include &lt;stdio.h&gt;</text:p>
      <text:p text:style-name="Code"/>
      <text:p text:style-name="Code">#define PASTE(arg1, arg2) \</text:p>
      <text:p text:style-name="Code"><text:s text:c="4"/>arg1##arg2</text:p>
      <text:p text:style-name="Code">int main()</text:p>
      <text:p text:style-name="Code">{</text:p>
      <text:p text:style-name="Code"><text:s text:c="4"/>int value_1 = 1000;</text:p>
      <text:p text:style-name="Code"><text:s text:c="4"/>printf("value_1 = %d\n", PASTE(value_, 1));</text:p>
      <text:p text:style-name="Code">}</text:p>
      <text:p text:style-name="Code"/>
      <text:p text:style-name="P11">Output</text:p>
      <text:p text:style-name="Standard"/>
      <text:p text:style-name="Code">value_1 = 1000</text:p>
      <text:p text:style-name="Standard"/>
      <text:p text:style-name="P11">Example 2</text:p>
      <text:p text:style-name="Standard"/>
      <text:p text:style-name="Code">#include &lt;stdio.h&gt;</text:p>
      <text:p text:style-name="Code"/>
      <text:p text:style-name="Code">#define CONCAT(A, B) \</text:p>
      <text:p text:style-name="Code"><text:s text:c="4"/>A##B</text:p>
      <text:p text:style-name="Code">int main()</text:p>
      <text:p text:style-name="Code">{</text:p>
      <text:p text:style-name="Code"><text:s text:c="4"/>printf("value1: %d\n", CONCAT(12, 20));</text:p>
      <text:p text:style-name="Code"><text:s text:c="4"/>printf("value2: %d\n", CONCAT(12, 20) + 10);</text:p>
      <text:p text:style-name="Code"><text:s text:c="4"/>return 0;</text:p>
      <text:p text:style-name="Code">}</text:p>
      <text:p text:style-name="Code"/>
      <text:p text:style-name="P11">Output</text:p>
      <text:p text:style-name="Code">value1: 1220</text:p>
      <text:p text:style-name="Code">value2: 1230</text:p>
      <text:p text:style-name="Standard"/>
      <text:p text:style-name="P11">Example 3</text:p>
      <text:p text:style-name="Standard"/>
      <text:p text:style-name="Code">#include &lt;stdio.h&gt;</text:p>
      <text:p text:style-name="Code"/>
      <text:p text:style-name="Code">#define MY_DEVICE_BASE_ADDR <text:s/>0x40004000</text:p>
      <text:p text:style-name="Code"><text:soft-page-break/>#define MY_DEVICE_REG_CTRL_OFS <text:s/>0x20</text:p>
      <text:p text:style-name="Code">#define MY_DEVICE_REG_STATUS_OFS 0x30</text:p>
      <text:p text:style-name="Code">#define MY_DEVICE_REG_INTR_OFS <text:s/>0x40</text:p>
      <text:p text:style-name="Code">#define REG(name) ((unsigned int)(MY_DEVICE_BASE_ADDR) + </text:p>
      <text:p text:style-name="Code"/>
      <text:p text:style-name="Code">MY_DEVICE_REG_##name##_OFS) int main()</text:p>
      <text:p text:style-name="Code">{</text:p>
      <text:p text:style-name="P48"><text:tab/>printf("Example to use ## Pre-Processor!\n");</text:p>
      <text:p text:style-name="P48"><text:tab/>printf("*** My-Device Register ***\n");</text:p>
      <text:p text:style-name="P48"><text:tab/>printf("Control-Register Addr = 0x%x\n", REG(CTRL));</text:p>
      <text:p text:style-name="Code"><text:tab/>printf("Status-Register Addr = 0x%x\n", REG(STATUS)); <text:tab/>printf("Interrupt-Register Addr = 0x%x\n", REG(INTR));</text:p>
      <text:p text:style-name="Code"><text:tab/>return 0;</text:p>
      <text:p text:style-name="Code">}</text:p>
      <text:p text:style-name="Standard"/>
      <text:p text:style-name="P11">Output</text:p>
      <text:p text:style-name="Standard"/>
      <text:p text:style-name="Code">Example to use ## Pre-Processor!</text:p>
      <text:p text:style-name="Code">*** My-Device Register ***</text:p>
      <text:p text:style-name="Code">Control-Register Addr = 0x40004020</text:p>
      <text:p text:style-name="P49">Status-Register Addr = 0x40004030</text:p>
      <text:p text:style-name="P49">Interrupt-Register Addr = 0x40004040</text:p>
      <text:p text:style-name="Standard"/>
      <text:p text:style-name="P35">Example 4</text:p>
      <text:p text:style-name="P64"/>
      <text:p text:style-name="Code">#include &lt;stdio.h&gt;</text:p>
      <text:p text:style-name="Code"/>
      <text:p text:style-name="Code">#define LINKED_LIST(A) <text:s text:c="8"/>\</text:p>
      <text:p text:style-name="Code"><text:s text:c="4"/>struct list_##A <text:s text:c="11"/>\</text:p>
      <text:p text:style-name="Code"><text:s text:c="4"/>{ <text:s text:c="25"/>\</text:p>
      <text:p text:style-name="Code"><text:s text:c="8"/>A value; <text:s text:c="14"/>\</text:p>
      <text:p text:style-name="Code"><text:s text:c="8"/>struct list_##A *next; \</text:p>
      <text:p text:style-name="Code"><text:s text:c="4"/>}</text:p>
      <text:p text:style-name="Code"/>
      <text:p text:style-name="Code">int main(void)</text:p>
      <text:p text:style-name="Code">{</text:p>
      <text:p text:style-name="Code"><text:s text:c="4"/>LINKED_LIST(int);</text:p>
      <text:p text:style-name="Code"><text:s text:c="4"/>return (0);</text:p>
      <text:p text:style-name="Code">}</text:p>
      <text:p text:style-name="Standard"/>
      <text:p text:style-name="Standard">When compiled and stopped after the preprocessing stage with the below command:</text:p>
      <text:p text:style-name="Standard"/>
      <text:p text:style-name="Code">gcc -E main.c -o main.i</text:p>
      <text:p text:style-name="Code"/>
      <text:p text:style-name="P29">Output</text:p>
      <text:p text:style-name="P29"/>
      <text:p text:style-name="Code">int main(void)</text:p>
      <text:p text:style-name="Code">{</text:p>
      <text:p text:style-name="Code"><text:tab/>struct list_int</text:p>
      <text:p text:style-name="Code"><text:tab/>{</text:p>
      <text:p text:style-name="Code"><text:soft-page-break/><text:tab/><text:tab/>int value; struct list_int *next;</text:p>
      <text:p text:style-name="Code"><text:tab/>};</text:p>
      <text:p text:style-name="Code"><text:tab/>return(0);</text:p>
      <text:p text:style-name="Code">}</text:p>
      <text:p text:style-name="Standard"/>
      <text:list text:continue-numbering="true" text:style-name="Numbering_20_123">
        <text:list-item>
          <text:p text:style-name="Section"><text:bookmark-start text:name="__RefHeading___Toc12759_2206932868"/>Macro with variable arguments<text:bookmark-end text:name="__RefHeading___Toc12759_2206932868"/></text:p>
        </text:list-item>
      </text:list>
      <text:p text:style-name="Code">#define dbg_print(fmt,args...) printf("Debug: "fmt ,##args)</text:p>
      <text:p text:style-name="Standard"/>
      <text:p text:style-name="Standard">This is a GCC-specific variadic macro, which allows you to pass a variable number of arguments. </text:p>
      <text:p text:style-name="Standard"/>
      <text:p text:style-name="Standard">Here's how it works:</text:p>
      <text:p text:style-name="Standard">fmt is the first fixed parameter (the format string). <text:span text:style-name="T3">args...</text:span> captures the rest of the arguments.</text:p>
      <text:p text:style-name="Standard">The <text:span text:style-name="T3">##</text:span> part is a GCC extension that removes the preceding comma if <text:span text:style-name="T3">args</text:span> is empty, making the macro safe to use even if you pass no variable arguments.</text:p>
      <text:p text:style-name="Standard"/>
      <text:p text:style-name="P11">Example 1</text:p>
      <text:p text:style-name="Standard"/>
      <text:p text:style-name="Code">dbg_print("Value is %d\n", 42);</text:p>
      <text:p text:style-name="Code"/>
      <text:p text:style-name="Standard">Expands to:</text:p>
      <text:p text:style-name="Standard"/>
      <text:p text:style-name="Code">printf("Debug: Value is %d\n", 42);</text:p>
      <text:p text:style-name="Code"/>
      <text:p text:style-name="P30">Example <text:span text:style-name="T15">2</text:span></text:p>
      <text:p text:style-name="P30"/>
      <text:p text:style-name="Code">dbg_print("Just a message\n");</text:p>
      <text:p text:style-name="Standard"/>
      <text:p text:style-name="Standard">Expands to:</text:p>
      <text:p text:style-name="Standard"/>
      <text:p text:style-name="Code">printf("Debug: Just a message\n");</text:p>
      <text:p text:style-name="Standard"/>
      <text:p text:style-name="Standard">What if <text:span text:style-name="T3">##args</text:span> wasn’t used?</text:p>
      <text:p text:style-name="Standard"/>
      <text:p text:style-name="Code">dbg_print("Just a message\n");<text:span text:style-name="T15">s</text:span></text:p>
      <text:p text:style-name="Standard"/>
      <text:p text:style-name="Standard">Expands to:</text:p>
      <text:p text:style-name="Standard"/>
      <text:p text:style-name="Code">printf("Debug: Just a message\n", );</text:p>
      <text:p text:style-name="Standard"/>
      <text:p text:style-name="Standard">Syntax error: Trailing comma before the closing parenthesis when no args are provided.</text:p>
      <text:p text:style-name="Standard"/>
      <text:list text:continue-numbering="true" text:style-name="Numbering_20_123">
        <text:list-item>
          <text:p text:style-name="Section"><text:bookmark-start text:name="__RefHeading___Toc12757_2206932868"/>Stringizing operator (#)<text:bookmark-end text:name="__RefHeading___Toc12757_2206932868"/></text:p>
        </text:list-item>
      </text:list>
      <text:p text:style-name="Standard">Sometimes you may need to convert a macro’s argument to a string. Parameters are not replaced inside string constants, but you can use the ‘<text:span text:style-name="T3">#</text:span>’ preprocessing operator instead. When a macro parameter is used with a leading ‘<text:span text:style-name="T3">#</text:span>’, the preprocessor replaces it with the literal text of the actual argument, converted to a string constant. Unlike normal parameter replacement, the argument is not macro-expanded first. This is called stringizing.</text:p>
      <text:p text:style-name="Standard"/>
      <text:p text:style-name="Code"><text:soft-page-break/>#define print_string(y) #y</text:p>
      <text:p text:style-name="Standard"/>
      <text:p text:style-name="Standard">This will convert whatever is passed as a parameter <text:span text:style-name="T3">y</text:span> into a string.</text:p>
      <text:p text:style-name="Standard"/>
      <text:p text:style-name="Standard">This will delete leading and trailing white space.</text:p>
      <text:p text:style-name="Standard">If we pass the macro, it won’t expand. It will print the string.</text:p>
      <text:p text:style-name="Standard"><text:span text:style-name="T3">\</text:span> will convert into <text:span text:style-name="T3">\\</text:span> and <text:span text:style-name="T3">"</text:span> is converted into <text:span text:style-name="T3">\"</text:span></text:p>
      <text:p text:style-name="Standard"/>
      <text:p text:style-name="Standard">Some characters cannot be stringized – notably, the “<text:span text:style-name="T3">,</text:span>” , because it is used to delimit parameters and the right parenthesis “<text:span text:style-name="T3">)</text:span>” because it marks the end of the parameter list.</text:p>
      <text:p text:style-name="Standard"/>
      <text:p text:style-name="P11">Example 1</text:p>
      <text:p text:style-name="Standard"/>
      <text:p text:style-name="Code">#define print_string(y) #y</text:p>
      <text:p text:style-name="Code">#define DEF welcome</text:p>
      <text:p text:style-name="Code"/>
      <text:p text:style-name="Code">// I’m using the print_string macro like below.</text:p>
      <text:p text:style-name="Code"/>
      <text:p text:style-name="Code">print_string(Testing);</text:p>
      <text:p text:style-name="Code">print_string( Testing <text:s/>Program );</text:p>
      <text:p text:style-name="Code">print_string("Testing" "Program");</text:p>
      <text:p text:style-name="Code">print_string(Testing DEF Program); <text:s/>// Here DEF is a macro</text:p>
      <text:p text:style-name="Code"/>
      <text:p text:style-name="Standard">This macro will expand like below.</text:p>
      <text:p text:style-name="Standard"/>
      <text:p text:style-name="Standard">"<text:span text:style-name="T3">Testing</text:span>"</text:p>
      <text:p text:style-name="Standard">"<text:span text:style-name="T3">Testing Program</text:span>" (leading and trailing spaces were trimmed and space between words was compressed to a single space character)</text:p>
      <text:p text:style-name="Standard">"<text:span text:style-name="T3">\"Testing\" \"Program\"</text:span>" (the quotes were automatically converted)</text:p>
      <text:p text:style-name="Standard">"<text:span text:style-name="T3">Testing DEF Program</text:span>" (<text:span text:style-name="T3">DEF</text:span> macro won’t expand)</text:p>
      <text:p text:style-name="Standard"/>
      <text:p text:style-name="P11">Example 2</text:p>
      <text:p text:style-name="Standard"/>
      <text:p text:style-name="Code">#define print_string(y) y</text:p>
      <text:p text:style-name="Code">#define DEF welcome</text:p>
      <text:p text:style-name="Code"/>
      <text:p text:style-name="Code">// I’m using the print_string macro like below.</text:p>
      <text:p text:style-name="Code"/>
      <text:p text:style-name="Code">print_string(Testing DEF Program); <text:s/>// Here DEF is a macro</text:p>
      <text:p text:style-name="Standard"/>
      <text:p text:style-name="Standard">This macro will expand like below.</text:p>
      <text:p text:style-name="Standard"/>
      <text:p text:style-name="Standard">"<text:span text:style-name="T3">Testing welcome Program</text:span>" (<text:span text:style-name="T3">DEF</text:span> macro won’t expand)</text:p>
      <text:p text:style-name="Standard"/>
      <text:list text:continue-numbering="true" text:style-name="Numbering_20_123">
        <text:list-item>
          <text:p text:style-name="Section"><text:bookmark-start text:name="__RefHeading___Toc12755_2206932868"/>Both Stringize and the Token-pasting operators in a single macro<text:bookmark-end text:name="__RefHeading___Toc12755_2206932868"/></text:p>
        </text:list-item>
      </text:list>
      <text:p text:style-name="Code">#define tokenpaster(n) printf ("token" #n " = %d", token##n) tokenpaster(34);</text:p>
      <text:p text:style-name="Code"/>
      <text:p text:style-name="Standard"><text:soft-page-break/>This example results in the following actual output from the preprocessor:</text:p>
      <text:p text:style-name="Standard"/>
      <text:p text:style-name="Code">printf ("token34 = %d", token34);</text:p>
      <text:p text:style-name="Code"/>
      <text:p text:style-name="Standard">Both the stringize and the token-pasting operators are used in this example.</text:p>
      <text:p text:style-name="Standard"/>
      <text:list text:continue-numbering="true" text:style-name="Numbering_20_123">
        <text:list-item>
          <text:p text:style-name="Section"><text:bookmark-start text:name="__RefHeading___Toc12753_2206932868"/>Const and Pointer<text:bookmark-end text:name="__RefHeading___Toc12753_2206932868"/></text:p>
        </text:list-item>
      </text:list>
      <text:p text:style-name="Code">int *const ptr = &amp;a; // Pointer can't change, value can.</text:p>
      <text:p text:style-name="Code"/>
      <text:p text:style-name="Code">const int *ptr = &amp;a; // Pointer can change, value can't.</text:p>
      <text:p text:style-name="Code"/>
      <text:p text:style-name="Code">int const *ptr = &amp;a; // Same as above.</text:p>
      <text:p text:style-name="Code"/>
      <text:p text:style-name="Code">const int *const ptr = &amp;a; // Neither pointer nor value can change.</text:p>
      <text:p text:style-name="Code"/>
      <text:p text:style-name="Code">int const *const ptr = &amp;a; // Same as above.</text:p>
      <text:p text:style-name="Standard"/>
      <text:p text:style-name="Standard">Note: <text:span text:style-name="T3">const</text:span> cannot move to the left if there is an immediate <text:span text:style-name="T3">*</text:span> at its left. In other words, when there is no <text:span text:style-name="T3">*</text:span> between <text:span text:style-name="T3">const</text:span> and <text:span text:style-name="T3">ptr</text:span>, the pointer is a constant.</text:p>
      <text:p text:style-name="Standard"/>
      <text:list text:continue-numbering="true" text:style-name="Numbering_20_123">
        <text:list-item>
          <text:p text:style-name="Section"><text:bookmark-start text:name="__RefHeading___Toc12751_2206932868"/>Swapping without using Third variable<text:bookmark-end text:name="__RefHeading___Toc12751_2206932868"/></text:p>
        </text:list-item>
      </text:list>
      <text:p text:style-name="Code">a = a + b;</text:p>
      <text:p text:style-name="Code">b = a - b;</text:p>
      <text:p text:style-name="Code">a = a - b;</text:p>
      <text:p text:style-name="Standard"/>
      <text:list text:continue-numbering="true" text:style-name="Numbering_20_123">
        <text:list-item>
          <text:p text:style-name="Section"><text:bookmark-start text:name="__RefHeading___Toc12749_2206932868"/>Swapping using Bitwise operator<text:bookmark-end text:name="__RefHeading___Toc12749_2206932868"/></text:p>
        </text:list-item>
      </text:list>
      <text:p text:style-name="Code">a = a ^ b;</text:p>
      <text:p text:style-name="Code">b = a ^ b;</text:p>
      <text:p text:style-name="Code">a = a ^ b;</text:p>
      <text:p text:style-name="Standard"/>
      <text:list text:continue-numbering="true" text:style-name="Numbering_20_123">
        <text:list-item>
          <text:p text:style-name="Section"><text:bookmark-start text:name="__RefHeading___Toc12747_2206932868"/>Application of union<text:bookmark-end text:name="__RefHeading___Toc12747_2206932868"/></text:p>
        </text:list-item>
      </text:list>
      <text:p text:style-name="Code">#include &lt;stdio.h&gt;</text:p>
      <text:p text:style-name="Code"/>
      <text:p text:style-name="Code">typedef union {</text:p>
      <text:p text:style-name="Code"><text:s text:c="4"/>unsigned char byte;</text:p>
      <text:p text:style-name="Code"><text:s text:c="4"/>struct {</text:p>
      <text:p text:style-name="Code"><text:s text:c="8"/>unsigned char bit0 : 1;</text:p>
      <text:p text:style-name="Code"><text:s text:c="8"/>unsigned char bit1 : 1;</text:p>
      <text:p text:style-name="Code"><text:s text:c="8"/>unsigned char bit2 : 1;</text:p>
      <text:p text:style-name="Code"><text:s text:c="8"/>unsigned char bit3 : 1;</text:p>
      <text:p text:style-name="Code"><text:s text:c="8"/>unsigned char bit4 : 1;</text:p>
      <text:p text:style-name="Code"><text:s text:c="8"/>unsigned char bit5 : 1;</text:p>
      <text:p text:style-name="Code"><text:s text:c="8"/>unsigned char bit6 : 1;</text:p>
      <text:p text:style-name="Code"><text:s text:c="8"/>unsigned char bit7 : 1;</text:p>
      <text:p text:style-name="Code"><text:s text:c="4"/>};</text:p>
      <text:p text:style-name="Code">} RegisterTemplate;</text:p>
      <text:p text:style-name="Code"/>
      <text:p text:style-name="Code">int main() {</text:p>
      <text:p text:style-name="Code"><text:s text:c="4"/>RegisterTemplate reg;</text:p>
      <text:p text:style-name="Code"><text:soft-page-break/></text:p>
      <text:p text:style-name="Code"><text:s text:c="4"/>// Assign a value to byte (you can set it to any 8-bit value)</text:p>
      <text:p text:style-name="Code"><text:s text:c="4"/>reg.byte = 0xAB; <text:s/>// 0xAB in binary is 10101011</text:p>
      <text:p text:style-name="Code"/>
      <text:p text:style-name="Code"><text:s text:c="4"/>// Print the byte as individual bits</text:p>
      <text:p text:style-name="Code"><text:s text:c="4"/>printf("Byte (individual bits): ");</text:p>
      <text:p text:style-name="Code"><text:s text:c="4"/>printf("%d%d%d%d%d%d%d%d\n", </text:p>
      <text:p text:style-name="Code"><text:s text:c="11"/>reg.bit7, reg.bit6, reg.bit5, reg.bit4, </text:p>
      <text:p text:style-name="Code"><text:s text:c="11"/>reg.bit3, reg.bit2, reg.bit1, reg.bit0);</text:p>
      <text:p text:style-name="Code"/>
      <text:p text:style-name="Code"><text:s text:c="4"/>return 0;</text:p>
      <text:p text:style-name="Code">}</text:p>
      <text:p text:style-name="Standard"/>
      <text:p text:style-name="P11">Output</text:p>
      <text:p text:style-name="Standard"/>
      <text:p text:style-name="Code">Byte (individual bits): 10101011</text:p>
      <text:p text:style-name="Standard"/>
      <text:p text:style-name="Standard"/>
      <text:list text:continue-numbering="true" text:style-name="Numbering_20_123">
        <text:list-item>
          <text:p text:style-name="Section"><text:bookmark-start text:name="__RefHeading___Toc12745_2206932868"/>Acesss a variable in another file without making it global<text:bookmark-end text:name="__RefHeading___Toc12745_2206932868"/></text:p>
        </text:list-item>
      </text:list>
      <text:p text:style-name="P11">main.c:</text:p>
      <text:p text:style-name="Standard"/>
      <text:p text:style-name="Code">#include &lt;stdio.h&gt;</text:p>
      <text:p text:style-name="Code">#include "data.h"</text:p>
      <text:p text:style-name="Code"/>
      <text:p text:style-name="P50">int main(void)</text:p>
      <text:p text:style-name="P50">{</text:p>
      <text:p text:style-name="Code"><text:s text:c="4"/>// Print the initial value</text:p>
      <text:p text:style-name="Code"><text:s text:c="4"/>printf("Initial value: %d\n", get_hidden_variable());</text:p>
      <text:p text:style-name="Code"/>
      <text:p text:style-name="Code"><text:s text:c="4"/>// Modify the value safely</text:p>
      <text:p text:style-name="Code"><text:s text:c="4"/>set_hidden_variable(100);</text:p>
      <text:p text:style-name="Code"><text:s text:c="4"/>printf("Updated value: %d\n", get_hidden_variable());</text:p>
      <text:p text:style-name="Code"/>
      <text:p text:style-name="Code"><text:s text:c="4"/>return 0;</text:p>
      <text:p text:style-name="Code">}</text:p>
      <text:p text:style-name="Standard"/>
      <text:p text:style-name="P11">data.c:</text:p>
      <text:p text:style-name="Standard"/>
      <text:p text:style-name="Code">#include &lt;stdio.h&gt;</text:p>
      <text:p text:style-name="Code"/>
      <text:p text:style-name="Code">// 'static' makes this variable invisible to other files</text:p>
      <text:p text:style-name="Code">static int hidden_variable = 42; </text:p>
      <text:p text:style-name="Code"/>
      <text:p text:style-name="Code">// Getter function to read the value</text:p>
      <text:p text:style-name="P50">int get_hidden_variable(void)</text:p>
      <text:p text:style-name="P50">{</text:p>
      <text:p text:style-name="Code"><text:s text:c="4"/>return hidden_variable;</text:p>
      <text:p text:style-name="Code">}</text:p>
      <text:p text:style-name="Code"/>
      <text:p text:style-name="Code">// Setter function to modify the value (optional)</text:p>
      <text:p text:style-name="P50"><text:soft-page-break/>void set_hidden_variable(int new_value)</text:p>
      <text:p text:style-name="P50">{</text:p>
      <text:p text:style-name="P50"><text:s text:c="4"/>if (new_value &gt;= 0)</text:p>
      <text:p text:style-name="P50"><text:s text:c="4"/>{ // You can even add validation!</text:p>
      <text:p text:style-name="Code"><text:s text:c="8"/>hidden_variable = new_value;</text:p>
      <text:p text:style-name="Code"><text:s text:c="4"/>}</text:p>
      <text:p text:style-name="Code">}</text:p>
      <text:p text:style-name="Standard"/>
      <text:p text:style-name="P11">data.h:</text:p>
      <text:p text:style-name="Standard"/>
      <text:p text:style-name="Code">#ifndef DATA_H</text:p>
      <text:p text:style-name="Code">#define DATA_H</text:p>
      <text:p text:style-name="Code"/>
      <text:p text:style-name="Code">// Public interface to access the variable</text:p>
      <text:p text:style-name="Code">int get_hidden_variable(void);</text:p>
      <text:p text:style-name="Code">void set_hidden_variable(int new_value);</text:p>
      <text:p text:style-name="Code"/>
      <text:p text:style-name="Code">#endif</text:p>
      <text:p text:style-name="Standard"/>
      <text:p text:style-name="P11">Compilation command</text:p>
      <text:p text:style-name="P11"/>
      <text:p text:style-name="P51">gcc main.c data.c -o my_program</text:p>
      <text:p text:style-name="Standard"/>
      <text:p text:style-name="P31">Output</text:p>
      <text:p text:style-name="P31"/>
      <text:p text:style-name="Code">Initial value: 42</text:p>
      <text:p text:style-name="Code">Updated value: 100</text:p>
      <text:p text:style-name="Standard"/>
      <text:list text:continue-numbering="true" text:style-name="Numbering_20_123">
        <text:list-item>
          <text:p text:style-name="Section"><text:bookmark-start text:name="__RefHeading___Toc12743_2206932868"/>Reversing of register<text:bookmark-end text:name="__RefHeading___Toc12743_2206932868"/></text:p>
        </text:list-item>
      </text:list>
      <text:p text:style-name="Code">#include &lt;stdio.h&gt;</text:p>
      <text:p text:style-name="Code">#include &lt;stdint.h&gt;</text:p>
      <text:p text:style-name="Code"/>
      <text:p text:style-name="Code">uint8_t reverseBits(uint8_t reg)</text:p>
      <text:p text:style-name="Code">{</text:p>
      <text:p text:style-name="Code"><text:s text:c="4"/>uint8_t reversed = 0;</text:p>
      <text:p text:style-name="Code"><text:s text:c="4"/>int num_bits = 8; // Size of the register in bits</text:p>
      <text:p text:style-name="Code"/>
      <text:p text:style-name="Code"><text:s text:c="4"/>for (int i = 0; i &lt; num_bits; i++)</text:p>
      <text:p text:style-name="Code"><text:tab/><text:tab/>{</text:p>
      <text:p text:style-name="Code"><text:s text:c="8"/>// 1. Shift the reversed result to the left to make room for the next bit</text:p>
      <text:p text:style-name="Code"><text:s text:c="8"/>reversed &lt;&lt;= 1;</text:p>
      <text:p text:style-name="Code"><text:s text:c="8"/></text:p>
      <text:p text:style-name="Code"><text:s text:c="8"/>// 2. Grab the lowest bit of the original register using bitwise AND (&amp; 1)</text:p>
      <text:p text:style-name="Code"><text:s text:c="8"/>// 3. Add it to our reversed result using bitwise OR (|)</text:p>
      <text:p text:style-name="Code"><text:s text:c="8"/>reversed |= (reg &amp; 1);</text:p>
      <text:p text:style-name="Code"><text:s text:c="8"/></text:p>
      <text:p text:style-name="Code"><text:s text:c="8"/>// 4. Shift the original register to the right to process the next bit</text:p>
      <text:p text:style-name="Code"><text:soft-page-break/><text:s text:c="8"/>reg &gt;&gt;= 1;</text:p>
      <text:p text:style-name="Code"><text:s text:c="4"/>}</text:p>
      <text:p text:style-name="Code"><text:s text:c="4"/></text:p>
      <text:p text:style-name="Code"><text:s text:c="4"/>return reversed;</text:p>
      <text:p text:style-name="Code">}</text:p>
      <text:p text:style-name="Code"/>
      <text:p text:style-name="Code">int main()</text:p>
      <text:p text:style-name="Code">{</text:p>
      <text:p text:style-name="Code"><text:s text:c="4"/>// Example: 0b11010010 (Decimal 210)</text:p>
      <text:p text:style-name="Code"><text:s text:c="4"/>// Reversed should be: 0b01001011 (Decimal 75)</text:p>
      <text:p text:style-name="Code"><text:s text:c="4"/>uint8_t original = 0xD2; </text:p>
      <text:p text:style-name="Code"><text:s text:c="4"/>uint8_t result = reverseBits(original);</text:p>
      <text:p text:style-name="Code"/>
      <text:p text:style-name="Code"><text:s text:c="4"/>printf("Original: 0x%02X\n", original);</text:p>
      <text:p text:style-name="Code"><text:s text:c="4"/>printf("Reversed: 0x%02X\n", result);</text:p>
      <text:p text:style-name="Code"/>
      <text:p text:style-name="Code"><text:s text:c="4"/>return 0;</text:p>
      <text:p text:style-name="Code">}</text:p>
      <text:p text:style-name="Standard"/>
      <text:p text:style-name="Standard"/>
      <text:p text:style-name="P11">Optimal Solution</text:p>
      <text:p text:style-name="Standard"/>
      <text:p text:style-name="Code">#include &lt;stdint.h&gt;</text:p>
      <text:p text:style-name="Code"/>
      <text:p text:style-name="Code">uint32_t reverse_bits(uint32_t n)</text:p>
      <text:p text:style-name="Code">{</text:p>
      <text:p text:style-name="Code"><text:s text:c="4"/>// Step 1: Swap adjacent bits</text:p>
      <text:p text:style-name="Code"><text:s text:c="4"/>n = ((n &gt;&gt; 1) &amp; 0x55555555) | ((n &amp; 0x55555555) &lt;&lt; 1);</text:p>
      <text:p text:style-name="Code"/>
      <text:p text:style-name="Code"><text:s text:c="4"/>// Step 2: Swap pairs of bits (4-bit groups)</text:p>
      <text:p text:style-name="Code"><text:s text:c="4"/>n = ((n &gt;&gt; 2) &amp; 0x33333333) | ((n &amp; 0x33333333) &lt;&lt; 2);</text:p>
      <text:p text:style-name="Code"/>
      <text:p text:style-name="Code"><text:s text:c="4"/>// Step 3: Swap nibbles (8-bit groups)</text:p>
      <text:p text:style-name="Code"><text:s text:c="4"/>n = ((n &gt;&gt; 4) &amp; 0x0F0F0F0F) | ((n &amp; 0x0F0F0F0F) &lt;&lt; 4);</text:p>
      <text:p text:style-name="Code"/>
      <text:p text:style-name="Code"><text:s text:c="4"/>// Step 4: Swap bytes</text:p>
      <text:p text:style-name="Code"><text:s text:c="4"/>n = ((n &gt;&gt; 8) &amp; 0x00FF00FF) | ((n &amp; 0x00FF00FF) &lt;&lt; 8);</text:p>
      <text:p text:style-name="Code"/>
      <text:p text:style-name="Code"><text:s text:c="4"/>// Step 5: Swap 16-bit halves</text:p>
      <text:p text:style-name="Code"><text:s text:c="4"/>n = (n &gt;&gt; 16) | (n &lt;&lt; 16);</text:p>
      <text:p text:style-name="Code"/>
      <text:p text:style-name="Code"><text:s text:c="4"/>return n;</text:p>
      <text:p text:style-name="Code">}</text:p>
      <text:p text:style-name="Standard"/>
      <text:list xml:id="list224008887387752" text:continue-numbering="true" text:style-name="Numbering_20_123">
        <text:list-item>
          <text:p text:style-name="Section"><text:bookmark-start text:name="__RefHeading___Toc12741_2206932868"/>scanf() to read until new line<text:bookmark-end text:name="__RefHeading___Toc12741_2206932868"/></text:p>
        </text:list-item>
      </text:list>
      <text:p text:style-name="Standard">To read everything until a newline character (<text:span text:style-name="T3">\n</text:span>), you use the format specifier:</text:p>
      <text:p text:style-name="P38">%[^\n]</text:p>
      <text:list text:style-name="L7">
        <text:list-item>
          <text:p text:style-name="P94"><text:span text:style-name="T3">[</text:span> Starts the scanset.</text:p>
        </text:list-item>
        <text:list-item>
          <text:p text:style-name="P94"><text:span text:style-name="T3">^</text:span> This is a "not" operator. It tells scanf to keep reading as long as it does not encounter the following character.</text:p>
        </text:list-item>
        <text:list-item>
          <text:p text:style-name="P94"><text:soft-page-break/><text:span text:style-name="T3">\n</text:span> The terminating character.</text:p>
        </text:list-item>
        <text:list-item>
          <text:p text:style-name="P94"><text:span text:style-name="T3">]</text:span> Ends the scanset.</text:p>
        </text:list-item>
      </text:list>
      <text:p text:style-name="Standard"/>
      <text:p text:style-name="Code">#include &lt;stdio.h&gt;</text:p>
      <text:p text:style-name="Code"/>
      <text:p text:style-name="Code">int main()</text:p>
      <text:p text:style-name="Code">{</text:p>
      <text:p text:style-name="Code"><text:s text:c="4"/>char str[100];</text:p>
      <text:p text:style-name="Code"/>
      <text:p text:style-name="Code"><text:s text:c="4"/>printf("Enter a full sentence: ");</text:p>
      <text:p text:style-name="Code"><text:s text:c="4"/>// Reads up to 99 chars or until a newline, whichever comes first.</text:p>
      <text:p text:style-name="Code"><text:s text:c="4"/>scanf("%99[^\n]", str);</text:p>
      <text:p text:style-name="Code"><text:s text:c="4"/></text:p>
      <text:p text:style-name="Code"><text:s text:c="4"/>// Reads until the user hits Enter (ie, new line).</text:p>
      <text:p text:style-name="Code"><text:s text:c="4"/>scanf("%[^\n]", str);</text:p>
      <text:p text:style-name="Code"/>
      <text:p text:style-name="Code"><text:s text:c="4"/>printf("You entered: %s\n", str);</text:p>
      <text:p text:style-name="Code"/>
      <text:p text:style-name="Code"><text:s text:c="4"/>return 0;</text:p>
      <text:p text:style-name="Code">}</text:p>
      <text:p text:style-name="Standard"/>
      <text:list text:continue-list="list224008887387752" text:style-name="Numbering_20_123">
        <text:list-item>
          <text:p text:style-name="Section"><text:bookmark-start text:name="__RefHeading___Toc12739_2206932868"/>Fall-through<text:bookmark-end text:name="__RefHeading___Toc12739_2206932868"/></text:p>
        </text:list-item>
      </text:list>
      <text:p text:style-name="Code">#include &lt;stdio.h&gt;</text:p>
      <text:p text:style-name="Code"/>
      <text:p text:style-name="Code">int main() {</text:p>
      <text:p text:style-name="Code"><text:s text:c="4"/>int x = 2;</text:p>
      <text:p text:style-name="Code"/>
      <text:p text:style-name="Code"><text:s text:c="4"/>switch(x) {</text:p>
      <text:p text:style-name="Code"><text:s text:c="8"/>case 1:</text:p>
      <text:p text:style-name="Code"><text:s text:c="12"/>printf("Case 1\n");</text:p>
      <text:p text:style-name="Code"><text:s text:c="12"/>break;</text:p>
      <text:p text:style-name="Code"/>
      <text:p text:style-name="Code"><text:s text:c="8"/>case 2:</text:p>
      <text:p text:style-name="Code"><text:s text:c="12"/>printf("Case 2\n"); <text:s text:c="2"/>// No break here.</text:p>
      <text:p text:style-name="Code"/>
      <text:p text:style-name="Code"><text:s text:c="8"/>case 3:</text:p>
      <text:p text:style-name="Code"><text:s text:c="12"/>printf("Case 3\n");</text:p>
      <text:p text:style-name="Code"><text:s text:c="12"/>break;</text:p>
      <text:p text:style-name="Code"/>
      <text:p text:style-name="Code"><text:s text:c="8"/>case 4:</text:p>
      <text:p text:style-name="Code"><text:s text:c="12"/>printf("Case 4\n");</text:p>
      <text:p text:style-name="Code"><text:s text:c="12"/>break;</text:p>
      <text:p text:style-name="Code"/>
      <text:p text:style-name="Code"><text:s text:c="8"/>default:</text:p>
      <text:p text:style-name="Code"><text:s text:c="12"/>printf("Default\n");</text:p>
      <text:p text:style-name="Code"><text:s text:c="4"/>}</text:p>
      <text:p text:style-name="Code"/>
      <text:p text:style-name="Code"><text:s text:c="4"/>return 0;</text:p>
      <text:p text:style-name="Code">}</text:p>
      <text:p text:style-name="Standard"><text:soft-page-break/></text:p>
      <text:p text:style-name="P11">Output</text:p>
      <text:p text:style-name="P11"/>
      <text:p text:style-name="Code">Case 2</text:p>
      <text:p text:style-name="Code">Case 3</text:p>
      <text:p text:style-name="Standard"/>
      <text:list text:continue-numbering="true" text:style-name="Numbering_20_123">
        <text:list-item>
          <text:p text:style-name="Section"><text:bookmark-start text:name="__RefHeading___Toc12737_2206932868"/>Driver library<text:bookmark-end text:name="__RefHeading___Toc12737_2206932868"/></text:p>
        </text:list-item>
      </text:list>
      <text:p text:style-name="Code">#include &lt;stdio.h&gt;</text:p>
      <text:p text:style-name="Code"/>
      <text:p text:style-name="Code">typedef union</text:p>
      <text:p text:style-name="Code">{</text:p>
      <text:p text:style-name="Code"><text:s text:c="4"/>unsigned char byte;</text:p>
      <text:p text:style-name="Code"><text:s text:c="4"/>struct</text:p>
      <text:p text:style-name="Code"><text:s text:c="4"/>{</text:p>
      <text:p text:style-name="Code"><text:s text:c="8"/>unsigned char:1;</text:p>
      <text:p text:style-name="Code"><text:s text:c="8"/>unsigned char ENABLE:2;</text:p>
      <text:p text:style-name="Code"><text:s text:c="8"/>unsigned char CONFIG:3;</text:p>
      <text:p text:style-name="Code"><text:s text:c="8"/>unsigned char STATUS:2;</text:p>
      <text:p text:style-name="Code"><text:s text:c="4"/>};</text:p>
      <text:p text:style-name="Code">} reg;</text:p>
      <text:p text:style-name="Code"/>
      <text:p text:style-name="Code">volatile reg* const temp = (volatile reg*)0x123;</text:p>
      <text:p text:style-name="Code">#define ABC (*temp)</text:p>
      <text:p text:style-name="Code"/>
      <text:p text:style-name="Code">int main()</text:p>
      <text:p text:style-name="Code">{</text:p>
      <text:p text:style-name="Code"><text:s text:c="4"/>ABC.ENABLE = 1;</text:p>
      <text:p text:style-name="Code"><text:s text:c="4"/>int var = ABC.STATUS;</text:p>
      <text:p text:style-name="Code"/>
      <text:p text:style-name="Code"><text:s text:c="4"/>printf("%x\n", ABC.ENABLE);</text:p>
      <text:p text:style-name="Code"><text:s text:c="4"/></text:p>
      <text:p text:style-name="Code"><text:s text:c="4"/>return 0;</text:p>
      <text:p text:style-name="Code">}</text:p>
      <text:p text:style-name="Standard"/>
      <text:p text:style-name="P32">Output</text:p>
      <text:p text:style-name="P32"/>
      <text:p text:style-name="Standard">1</text:p>
      <text:p text:style-name="Standard"/>
      <text:list text:continue-numbering="true" text:style-name="Numbering_20_123">
        <text:list-item>
          <text:p text:style-name="Section"><text:bookmark-start text:name="__RefHeading___Toc12735_2206932868"/>Number of bits to convert integer a to integer b<text:bookmark-end text:name="__RefHeading___Toc12735_2206932868"/></text:p>
        </text:list-item>
      </text:list>
      <text:p text:style-name="Code">#include &lt;stdio.h&gt;</text:p>
      <text:p text:style-name="Code"/>
      <text:p text:style-name="Code">// Function to find the number of bits to convert integer a to integer b</text:p>
      <text:p text:style-name="Code">int find_bits(int a, int b)</text:p>
      <text:p text:style-name="Code">{</text:p>
      <text:p text:style-name="Code"><text:s text:c="4"/>// a ^ b sets bits to 1 where a and b differ</text:p>
      <text:p text:style-name="Code"><text:s text:c="4"/>int xor_result = a ^ b;</text:p>
      <text:p text:style-name="Code"><text:s text:c="4"/>int count = 0;</text:p>
      <text:p text:style-name="Code"/>
      <text:p text:style-name="Code"><text:s text:c="4"/>// Count the number of set bits (1s) in xor_result</text:p>
      <text:p text:style-name="Code"><text:soft-page-break/><text:s text:c="4"/>while (xor_result &gt; 0)</text:p>
      <text:p text:style-name="Code"><text:s text:c="4"/>{</text:p>
      <text:p text:style-name="Code"><text:s text:c="8"/>count += (xor_result &amp; 1); // Check if the last bit is 1</text:p>
      <text:p text:style-name="Code"><text:s text:c="8"/>xor_result &gt;&gt;= 1; <text:s text:c="9"/>// Shift right to check the next bit</text:p>
      <text:p text:style-name="Code"><text:s text:c="4"/>}</text:p>
      <text:p text:style-name="Code"/>
      <text:p text:style-name="Code"><text:s text:c="4"/>return count;</text:p>
      <text:p text:style-name="Code">}</text:p>
      <text:p text:style-name="Code"/>
      <text:p text:style-name="Code">int main(void)</text:p>
      <text:p text:style-name="Code">{</text:p>
      <text:p text:style-name="Code"><text:s text:c="4"/>int a = 2; // Binary: 010</text:p>
      <text:p text:style-name="Code"><text:s text:c="4"/>int b = 5; // Binary: 101</text:p>
      <text:p text:style-name="Code"><text:s text:c="4"/>// Differing bits: <text:s text:c="2"/>111 <text:s/>-&gt; 3 bits need to change</text:p>
      <text:p text:style-name="Code"/>
      <text:p text:style-name="Code"><text:s text:c="4"/>printf("Number of bits to convert: %d\n", find_bits(a, b));</text:p>
      <text:p text:style-name="Code"/>
      <text:p text:style-name="Code"><text:s text:c="4"/>return 0;</text:p>
      <text:p text:style-name="Code">}</text:p>
      <text:p text:style-name="Standard"/>
      <text:p text:style-name="P11">Output</text:p>
      <text:p text:style-name="P11"/>
      <text:p text:style-name="Code">3</text:p>
      <text:p text:style-name="Code"/>
      <text:list text:continue-numbering="true" text:style-name="Numbering_20_123">
        <text:list-item>
          <text:p text:style-name="Section"><text:bookmark-start text:name="__RefHeading___Toc20583_1961033176"/>Fibonacci series <text:span text:style-name="T16">without using recursion</text:span><text:bookmark-end text:name="__RefHeading___Toc20583_1961033176"/></text:p>
        </text:list-item>
      </text:list>
      <text:p text:style-name="Code">#include &lt;stdio.h&gt;</text:p>
      <text:p text:style-name="Code"/>
      <text:p text:style-name="P65">int main()</text:p>
      <text:p text:style-name="P65">{</text:p>
      <text:p text:style-name="Code"><text:s text:c="4"/>int terms, i;</text:p>
      <text:p text:style-name="Code"><text:s text:c="4"/>long long int t1 = 0, t2 = 1, nextTerm;</text:p>
      <text:p text:style-name="Code"/>
      <text:p text:style-name="Code"><text:s text:c="4"/>// Ask the user for the number of terms</text:p>
      <text:p text:style-name="Code"><text:s text:c="4"/>printf("Enter the number of terms: ");</text:p>
      <text:p text:style-name="Code"><text:s text:c="4"/>scanf("%d", &amp;terms);</text:p>
      <text:p text:style-name="Code"/>
      <text:p text:style-name="Code"><text:s text:c="4"/>printf("Fibonacci Series: ");</text:p>
      <text:p text:style-name="Code"/>
      <text:p text:style-name="P65"><text:s text:c="4"/>for (i = 1; i &lt;= terms; ++i)</text:p>
      <text:p text:style-name="P65"><text:s text:c="4"/>{</text:p>
      <text:p text:style-name="Code"><text:s text:c="8"/>printf("%lld", t1);</text:p>
      <text:p text:style-name="Code"><text:s text:c="8"/></text:p>
      <text:p text:style-name="Code"><text:s text:c="8"/>// Add a comma after numbers, except for the last one</text:p>
      <text:p text:style-name="P65"><text:s text:c="8"/>if (i &lt; terms)</text:p>
      <text:p text:style-name="P65"><text:s text:c="8"/>{</text:p>
      <text:p text:style-name="Code"><text:s text:c="12"/>printf(", ");</text:p>
      <text:p text:style-name="Code"><text:s text:c="8"/>}</text:p>
      <text:p text:style-name="Code"/>
      <text:p text:style-name="Code"><text:s text:c="8"/>// Calculate the next term in the sequence</text:p>
      <text:p text:style-name="Code"><text:s text:c="8"/>nextTerm = t1 + t2;</text:p>
      <text:p text:style-name="Code"><text:soft-page-break/><text:s text:c="8"/>t1 = t2;</text:p>
      <text:p text:style-name="Code"><text:s text:c="8"/>t2 = nextTerm;</text:p>
      <text:p text:style-name="Code"><text:s text:c="4"/>}</text:p>
      <text:p text:style-name="Code"/>
      <text:p text:style-name="Code"><text:s text:c="4"/>printf("\n");</text:p>
      <text:p text:style-name="Code"><text:s text:c="4"/>return 0;</text:p>
      <text:p text:style-name="Code">}</text:p>
      <text:p text:style-name="Code"/>
      <text:list text:continue-numbering="true" text:style-name="Numbering_20_123">
        <text:list-item>
          <text:p text:style-name="P81"><text:bookmark-start text:name="__RefHeading___Toc20577_1961033176"/>Fibonacci <text:span text:style-name="T16">s</text:span>eries using recursion<text:bookmark-end text:name="__RefHeading___Toc20577_1961033176"/></text:p>
        </text:list-item>
      </text:list>
      <text:p text:style-name="P67">#include &lt;stdio.h&gt;</text:p>
      <text:p text:style-name="P67"/>
      <text:p text:style-name="P67">// Recursive function to find the nth Fibonacci number</text:p>
      <text:p text:style-name="P67">long long int fibonacci(int n)</text:p>
      <text:p text:style-name="P67">{</text:p>
      <text:p text:style-name="P67"><text:s text:c="4"/>// <text:span text:style-name="T18">Base case</text:span></text:p>
      <text:p text:style-name="P67"><text:s text:c="4"/>if (n == 0)</text:p>
      <text:p text:style-name="P67"><text:s text:c="4"/>{</text:p>
      <text:p text:style-name="P67"><text:s text:c="8"/>return 0;</text:p>
      <text:p text:style-name="P67"><text:s text:c="4"/>}</text:p>
      <text:p text:style-name="P67"><text:s text:c="4"/>else if (n == 1)</text:p>
      <text:p text:style-name="P67"><text:s text:c="4"/>{</text:p>
      <text:p text:style-name="P67"><text:s text:c="8"/>return 1;</text:p>
      <text:p text:style-name="P67"><text:s text:c="4"/>}</text:p>
      <text:p text:style-name="P67"><text:s text:c="4"/>// <text:span text:style-name="T18">General case / </text:span><text:span text:style-name="T19">Recursive </text:span><text:span text:style-name="T21">case</text:span></text:p>
      <text:p text:style-name="P67"><text:s text:c="4"/>else</text:p>
      <text:p text:style-name="P67"><text:s text:c="4"/>{</text:p>
      <text:p text:style-name="P67"><text:s text:c="8"/>return fibonacci(n - 1) + fibonacci(n - 2);</text:p>
      <text:p text:style-name="P67"><text:s text:c="4"/>}</text:p>
      <text:p text:style-name="P67">}</text:p>
      <text:p text:style-name="P67"/>
      <text:p text:style-name="P67">int main()</text:p>
      <text:p text:style-name="P67">{</text:p>
      <text:p text:style-name="P67"><text:s text:c="4"/>int terms, i;</text:p>
      <text:p text:style-name="P67"/>
      <text:p text:style-name="P67"><text:s text:c="4"/>// Ask the user for the number of terms</text:p>
      <text:p text:style-name="P67"><text:s text:c="4"/>printf("Enter the number of terms: ");</text:p>
      <text:p text:style-name="P67"><text:s text:c="4"/>scanf("%d", &amp;terms);</text:p>
      <text:p text:style-name="P67"/>
      <text:p text:style-name="P67"><text:s text:c="4"/>printf("Fibonacci Series: ");</text:p>
      <text:p text:style-name="P67"/>
      <text:p text:style-name="P67"><text:s text:c="4"/>// Loop to print each term using the recursive function</text:p>
      <text:p text:style-name="P67"><text:s text:c="4"/>for (i = 0; i &lt; terms; ++i)</text:p>
      <text:p text:style-name="P67"><text:s text:c="4"/>{</text:p>
      <text:p text:style-name="P67"><text:s text:c="8"/>printf("%lld", fibonacci(i));</text:p>
      <text:p text:style-name="P67"><text:s text:c="8"/></text:p>
      <text:p text:style-name="P67"><text:s text:c="8"/>// Add a comma after numbers, except for the last one</text:p>
      <text:p text:style-name="P67"><text:s text:c="8"/>if (i &lt; terms – 1)</text:p>
      <text:p text:style-name="P67"><text:s text:c="8"/>{</text:p>
      <text:p text:style-name="P67"><text:s text:c="12"/>printf(", ");</text:p>
      <text:p text:style-name="P67"><text:s text:c="8"/>}</text:p>
      <text:p text:style-name="P67"><text:s text:c="4"/>}</text:p>
      <text:p text:style-name="P67"><text:soft-page-break/></text:p>
      <text:p text:style-name="P67"><text:s text:c="4"/>printf("\n");</text:p>
      <text:p text:style-name="P67"><text:s text:c="4"/>return 0;</text:p>
      <text:p text:style-name="P67">}</text:p>
      <text:p text:style-name="Code"/>
      <text:list text:continue-numbering="true" text:style-name="Numbering_20_123">
        <text:list-item>
          <text:p text:style-name="P82"><text:bookmark-start text:name="__RefHeading___Toc20581_1961033176"/>Factorial with<text:span text:style-name="T17">out using</text:span> recursion<text:bookmark-end text:name="__RefHeading___Toc20581_1961033176"/></text:p>
        </text:list-item>
      </text:list>
      <text:p text:style-name="Code">#include &lt;stdio.h&gt;</text:p>
      <text:p text:style-name="Code"/>
      <text:p text:style-name="Code">// Iterative function to calculate factorial</text:p>
      <text:p text:style-name="P66">unsigned long long int factorialIterative(int n)</text:p>
      <text:p text:style-name="P66">{</text:p>
      <text:p text:style-name="Code"><text:s text:c="4"/>unsigned long long int result = 1;</text:p>
      <text:p text:style-name="Code"><text:s text:c="4"/></text:p>
      <text:p text:style-name="P66"><text:s text:c="4"/>for (int i = 1; i &lt;= n; i++)</text:p>
      <text:p text:style-name="P66"><text:s text:c="4"/>{</text:p>
      <text:p text:style-name="Code"><text:s text:c="8"/>result *= i;</text:p>
      <text:p text:style-name="Code"><text:s text:c="4"/>}</text:p>
      <text:p text:style-name="Code"><text:s text:c="4"/></text:p>
      <text:p text:style-name="Code"><text:s text:c="4"/>return result;</text:p>
      <text:p text:style-name="Code">}</text:p>
      <text:p text:style-name="Code"/>
      <text:p text:style-name="P66">int main()</text:p>
      <text:p text:style-name="P66">{</text:p>
      <text:p text:style-name="Code"><text:s text:c="4"/>int num;</text:p>
      <text:p text:style-name="Code"><text:s text:c="4"/>printf("Enter a positive integer: ");</text:p>
      <text:p text:style-name="Code"><text:s text:c="4"/>scanf("%d", &amp;num);</text:p>
      <text:p text:style-name="Code"/>
      <text:p text:style-name="P66"><text:s text:c="4"/>if (num &lt; 0)</text:p>
      <text:p text:style-name="P66"><text:s text:c="4"/>{</text:p>
      <text:p text:style-name="Code"><text:s text:c="8"/>printf("Factorial of a negative number doesn't exist.\n");</text:p>
      <text:p text:style-name="P66"><text:s text:c="4"/>}</text:p>
      <text:p text:style-name="P66"><text:s text:c="4"/>else</text:p>
      <text:p text:style-name="P66"><text:s text:c="4"/>{</text:p>
      <text:p text:style-name="Code"><text:s text:c="8"/>printf("Factorial of %d (Iterative): %llu\n", num, factorialIterative(num));</text:p>
      <text:p text:style-name="Code"><text:s text:c="4"/>}</text:p>
      <text:p text:style-name="Code"/>
      <text:p text:style-name="Code"><text:s text:c="4"/>return 0;</text:p>
      <text:p text:style-name="Code">}</text:p>
      <text:p text:style-name="Code"/>
      <text:list text:continue-numbering="true" text:style-name="Numbering_20_123">
        <text:list-item>
          <text:p text:style-name="P83"><text:bookmark-start text:name="__RefHeading___Toc20579_1961033176"/>Factorial using recursion<text:bookmark-end text:name="__RefHeading___Toc20579_1961033176"/></text:p>
        </text:list-item>
      </text:list>
      <text:p text:style-name="Code">#include &lt;stdio.h&gt;</text:p>
      <text:p text:style-name="Code"/>
      <text:p text:style-name="Code">// Recursive function to calculate factorial</text:p>
      <text:p text:style-name="P68">unsigned long long int factorialRecursive(int n)</text:p>
      <text:p text:style-name="P68">{</text:p>
      <text:p text:style-name="Code"><text:s text:c="4"/>// Base case</text:p>
      <text:p text:style-name="P68"><text:s text:c="4"/>if (n == 0 || n == 1)</text:p>
      <text:p text:style-name="P68"><text:s text:c="4"/>{</text:p>
      <text:p text:style-name="Code"><text:s text:c="8"/>return 1;</text:p>
      <text:p text:style-name="Code"><text:s text:c="4"/>}</text:p>
      <text:p text:style-name="Code"><text:soft-page-break/><text:s text:c="4"/>// Recursive step</text:p>
      <text:p text:style-name="Code"><text:s text:c="4"/>return n * factorialRecursive(n - 1);</text:p>
      <text:p text:style-name="Code">}</text:p>
      <text:p text:style-name="Code"/>
      <text:p text:style-name="P69">int main()</text:p>
      <text:p text:style-name="P69">{</text:p>
      <text:p text:style-name="Code"><text:s text:c="4"/>int num;</text:p>
      <text:p text:style-name="Code"><text:s text:c="4"/>printf("Enter a positive integer: ");</text:p>
      <text:p text:style-name="Code"><text:s text:c="4"/>scanf("%d", &amp;num);</text:p>
      <text:p text:style-name="Code"/>
      <text:p text:style-name="P69"><text:s text:c="4"/>if (num &lt; 0)</text:p>
      <text:p text:style-name="P69"><text:s text:c="4"/>{</text:p>
      <text:p text:style-name="Code"><text:s text:c="8"/>printf("Factorial of a negative number doesn't exist.\n");</text:p>
      <text:p text:style-name="P70"><text:s text:c="4"/>}</text:p>
      <text:p text:style-name="P70"><text:s text:c="4"/>else</text:p>
      <text:p text:style-name="P70"><text:s text:c="4"/>{</text:p>
      <text:p text:style-name="Code"><text:s text:c="8"/>printf("Factorial of %d (Recursive): %llu\n", num, factorialRecursive(num));</text:p>
      <text:p text:style-name="Code"><text:s text:c="4"/>}</text:p>
      <text:p text:style-name="Code"/>
      <text:p text:style-name="Code"><text:s text:c="4"/>return 0;</text:p>
      <text:p text:style-name="Code">}</text:p>
      <text:p text:style-name="Code"/>
      <text:list text:continue-numbering="true" text:style-name="Numbering_20_123">
        <text:list-item>
          <text:p text:style-name="Section"><text:bookmark-start text:name="__RefHeading___Toc20575_1961033176"/>C program without semicolon<text:bookmark-end text:name="__RefHeading___Toc20575_1961033176"/></text:p>
        </text:list-item>
      </text:list>
      <text:p text:style-name="Code">#include &lt;stdio.h&gt;</text:p>
      <text:p text:style-name="Code"/>
      <text:p text:style-name="P71">int main()</text:p>
      <text:p text:style-name="P71">{</text:p>
      <text:p text:style-name="P71"><text:s text:c="4"/>if (printf("Hello, World!\n"))</text:p>
      <text:p text:style-name="P71"><text:s text:c="4"/>{</text:p>
      <text:p text:style-name="Code"><text:s text:c="8"/>// The condition evaluates, executes printf, and runs this empty block</text:p>
      <text:p text:style-name="Code"><text:s text:c="4"/>}</text:p>
      <text:p text:style-name="Code">}</text:p>
      <text:p text:style-name="Code"/>
      <text:list text:continue-numbering="true" text:style-name="Numbering_20_123">
        <text:list-item>
          <text:p text:style-name="P84"><text:bookmark-start text:name="__RefHeading___Toc20573_1961033176"/>Printing multiple times without loop<text:bookmark-end text:name="__RefHeading___Toc20573_1961033176"/></text:p>
        </text:list-item>
      </text:list>
      <text:p text:style-name="Code">#include &lt;stdio.h&gt;</text:p>
      <text:p text:style-name="Code"/>
      <text:p text:style-name="Code">// Recursive function to print the message</text:p>
      <text:p text:style-name="Code">void printHello(int count) {</text:p>
      <text:p text:style-name="Code"><text:s text:c="4"/>// Base case: stop when count reaches 0</text:p>
      <text:p text:style-name="P72"><text:s text:c="4"/>if (count == 0)</text:p>
      <text:p text:style-name="P72"><text:span text:style-name="T20"><text:s text:c="4"/></text:span>{</text:p>
      <text:p text:style-name="Code"><text:s text:c="8"/>return;</text:p>
      <text:p text:style-name="Code"><text:s text:c="4"/>}</text:p>
      <text:p text:style-name="Code"><text:s text:c="4"/></text:p>
      <text:p text:style-name="Code"><text:s text:c="4"/>// Print the statement once</text:p>
      <text:p text:style-name="Code"><text:s text:c="4"/>printf("Hello World\n");</text:p>
      <text:p text:style-name="Code"><text:s text:c="4"/></text:p>
      <text:p text:style-name="Code"><text:s text:c="4"/>// Recursive call with decremented count</text:p>
      <text:p text:style-name="Code"><text:s text:c="4"/>printHello(count - 1);</text:p>
      <text:p text:style-name="Code"><text:soft-page-break/>}</text:p>
      <text:p text:style-name="Code"/>
      <text:p text:style-name="P72">int main()</text:p>
      <text:p text:style-name="P72">{</text:p>
      <text:p text:style-name="Code"><text:s text:c="4"/>// Call the function to print 10 times</text:p>
      <text:p text:style-name="Code"><text:s text:c="4"/>printHello(10);</text:p>
      <text:p text:style-name="Code"><text:s text:c="4"/></text:p>
      <text:p text:style-name="Code"><text:s text:c="4"/>return 0;</text:p>
      <text:p text:style-name="Code">}</text:p>
      <text:p text:style-name="Code"/>
      <text:list text:continue-numbering="true" text:style-name="Numbering_20_123">
        <text:list-item>
          <text:p text:style-name="P85"><text:bookmark-start text:name="__RefHeading___Toc8398_662833756"/>Reverse a number<text:bookmark-end text:name="__RefHeading___Toc8398_662833756"/></text:p>
        </text:list-item>
      </text:list>
      <text:p text:style-name="Code">#include &lt;stdio.h&gt;</text:p>
      <text:p text:style-name="Code"/>
      <text:p text:style-name="P73">int main()</text:p>
      <text:p text:style-name="P73">{</text:p>
      <text:p text:style-name="Code"><text:s text:c="4"/>int num, reversedNum = 0, remainder;</text:p>
      <text:p text:style-name="Code"/>
      <text:p text:style-name="Code"><text:s text:c="4"/>printf("Enter an integer: ");</text:p>
      <text:p text:style-name="Code"><text:s text:c="4"/>scanf("%d", &amp;num);</text:p>
      <text:p text:style-name="Code"/>
      <text:p text:style-name="Code"><text:s text:c="4"/>// Loop to reverse the number</text:p>
      <text:p text:style-name="P73"><text:s text:c="4"/>while (num != 0)</text:p>
      <text:p text:style-name="P73"><text:s text:c="4"/>{</text:p>
      <text:p text:style-name="Code"><text:s text:c="8"/>remainder = num % 10; <text:s text:c="11"/>// Get the last digit</text:p>
      <text:p text:style-name="Code"><text:s text:c="8"/>reversedNum = reversedNum * 10 + remainder; // Append it to the reversed number</text:p>
      <text:p text:style-name="Code"><text:s text:c="8"/>num /= 10; <text:s text:c="22"/>// Remove the last digit from the original number</text:p>
      <text:p text:style-name="Code"><text:s text:c="4"/>}</text:p>
      <text:p text:style-name="Code"/>
      <text:p text:style-name="Code"><text:s text:c="4"/>printf("Reversed Number = %d\n", reversedNum);</text:p>
      <text:p text:style-name="Code"/>
      <text:p text:style-name="Code"><text:s text:c="4"/>return 0;</text:p>
      <text:p text:style-name="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Section" style:family="paragraph" style:parent-style-name="Standard" style:default-outline-level="" style:list-style-name="Numbering_20_123" style:master-page-name="">
      <loext:graphic-properties draw:fill="solid" draw:fill-color="#2a6099"/>
      <style:paragraph-properties fo:margin-left="0cm" fo:text-indent="0cm" style:auto-text-indent="false" style:page-number="auto" fo:background-color="#2a6099">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de" style:family="paragraph" style:parent-style-name="Standard" style:master-page-name="">
      <style:paragraph-properties style:page-number="auto">
        <style:tab-stops/>
      </style:paragraph-properties>
      <style:text-properties style:font-name="Courier New1" fo:font-family="'Courier New'" style:font-style-name="Bold" style:font-family-generic="modern" style:font-pitch="fixed"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1"/><text:page-number text:select-page="current">75</text:page-number><text:s/>/ <text:page-count>75</text:page-count><text:bookmark-end text:name="PageNumWizard_FOOTER_Default Page Style3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9T15:18:26.587848678</meta:creation-date>
    <dc:date>2026-07-13T22:40:07.335382729</dc:date>
    <meta:editing-duration>PT5H1M14S</meta:editing-duration>
    <meta:editing-cycles>232</meta:editing-cycles>
    <meta:generator>LibreOffice/24.2.7.2$Linux_X86_64 LibreOffice_project/420$Build-2</meta:generator>
    <meta:document-statistic meta:table-count="1" meta:image-count="1" meta:object-count="0" meta:page-count="75" meta:paragraph-count="2520" meta:word-count="15158" meta:character-count="90614" meta:non-whitespace-character-count="74118"/>
  </office:meta>
</office:document-meta>
</file>