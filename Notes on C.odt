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text-properties fo:font-weight="bold" officeooo:paragraph-rsid="0089152d" style:font-weight-asian="bold" style:font-weight-complex="bold"/>
    </style:style>
    <style:style style:name="P34" style:family="paragraph" style:parent-style-name="Standard">
      <style:text-properties fo:font-weight="bold" officeooo:paragraph-rsid="00aa39aa" style:font-weight-asian="bold" style:font-weight-complex="bold"/>
    </style:style>
    <style:style style:name="P35" style:family="paragraph" style:parent-style-name="Standard">
      <style:text-properties fo:font-weight="bold" officeooo:paragraph-rsid="00d52700" style:font-weight-asian="bold" style:font-weight-complex="bold"/>
    </style:style>
    <style:style style:name="P36"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7" style:family="paragraph" style:parent-style-name="Standard">
      <style:text-properties style:font-name="Courier New" fo:font-weight="bold" style:font-weight-asian="bold" style:font-weight-complex="bold"/>
    </style:style>
    <style:style style:name="P38" style:family="paragraph" style:parent-style-name="Standard">
      <style:text-properties officeooo:paragraph-rsid="001736d5"/>
    </style:style>
    <style:style style:name="P39" style:family="paragraph" style:parent-style-name="Standard">
      <style:text-properties officeooo:paragraph-rsid="0019eebc"/>
    </style:style>
    <style:style style:name="P40" style:family="paragraph" style:parent-style-name="Standard">
      <style:text-properties officeooo:paragraph-rsid="003a5881"/>
    </style:style>
    <style:style style:name="P41" style:family="paragraph" style:parent-style-name="Standard">
      <style:text-properties officeooo:paragraph-rsid="0041141d"/>
    </style:style>
    <style:style style:name="P42" style:family="paragraph" style:parent-style-name="Code">
      <style:text-properties officeooo:paragraph-rsid="00a08c4b"/>
    </style:style>
    <style:style style:name="P43" style:family="paragraph" style:parent-style-name="Standard">
      <style:text-properties officeooo:paragraph-rsid="00a08c4b"/>
    </style:style>
    <style:style style:name="P44" style:family="paragraph" style:parent-style-name="Code">
      <style:text-properties officeooo:paragraph-rsid="00a536f4"/>
    </style:style>
    <style:style style:name="P45" style:family="paragraph" style:parent-style-name="Code">
      <style:text-properties officeooo:paragraph-rsid="00bb4697"/>
    </style:style>
    <style:style style:name="P46" style:family="paragraph" style:parent-style-name="Code">
      <style:text-properties officeooo:paragraph-rsid="00c77d66"/>
    </style:style>
    <style:style style:name="P47" style:family="paragraph" style:parent-style-name="Code">
      <style:text-properties officeooo:paragraph-rsid="00d2f585"/>
    </style:style>
    <style:style style:name="P48" style:family="paragraph" style:parent-style-name="Code">
      <style:text-properties officeooo:paragraph-rsid="00d47168"/>
    </style:style>
    <style:style style:name="P49" style:family="paragraph" style:parent-style-name="Code">
      <style:text-properties officeooo:paragraph-rsid="00e992d0"/>
    </style:style>
    <style:style style:name="P50" style:family="paragraph" style:parent-style-name="Code">
      <style:text-properties officeooo:paragraph-rsid="00ea4b17"/>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Standard">
      <style:text-properties fo:font-weight="normal" style:font-weight-asian="normal" style:font-weight-complex="normal"/>
    </style:style>
    <style:style style:name="P53" style:family="paragraph" style:parent-style-name="Standard">
      <style:text-properties officeooo:paragraph-rsid="007cc465"/>
    </style:style>
    <style:style style:name="P54" style:family="paragraph" style:parent-style-name="Standard">
      <style:text-properties officeooo:paragraph-rsid="0089152d"/>
    </style:style>
    <style:style style:name="P55" style:family="paragraph" style:parent-style-name="Standard">
      <style:text-properties officeooo:paragraph-rsid="008dff10"/>
    </style:style>
    <style:style style:name="P56" style:family="paragraph" style:parent-style-name="Standard">
      <style:text-properties officeooo:paragraph-rsid="009598ab"/>
    </style:style>
    <style:style style:name="P57" style:family="paragraph" style:parent-style-name="Standard">
      <style:text-properties officeooo:paragraph-rsid="00a2a0e8"/>
    </style:style>
    <style:style style:name="P58" style:family="paragraph" style:parent-style-name="Standard">
      <style:text-properties officeooo:paragraph-rsid="00aa39aa"/>
    </style:style>
    <style:style style:name="P59" style:family="paragraph" style:parent-style-name="Standard">
      <style:text-properties officeooo:paragraph-rsid="00b08e0d"/>
    </style:style>
    <style:style style:name="P60" style:family="paragraph" style:parent-style-name="Standard">
      <style:text-properties officeooo:paragraph-rsid="00b3ef8a"/>
    </style:style>
    <style:style style:name="P61" style:family="paragraph" style:parent-style-name="Standard">
      <style:text-properties officeooo:paragraph-rsid="00bedaf4"/>
    </style:style>
    <style:style style:name="P62" style:family="paragraph" style:parent-style-name="Standard">
      <style:text-properties officeooo:paragraph-rsid="00c9620a"/>
    </style:style>
    <style:style style:name="P63" style:family="paragraph" style:parent-style-name="Standard">
      <style:text-properties officeooo:paragraph-rsid="00d52700"/>
    </style:style>
    <style:style style:name="P64" style:family="paragraph" style:parent-style-name="Code">
      <style:text-properties officeooo:paragraph-rsid="00f4d0c8"/>
    </style:style>
    <style:style style:name="P65" style:family="paragraph" style:parent-style-name="Code">
      <style:text-properties officeooo:paragraph-rsid="00f66935"/>
    </style:style>
    <style:style style:name="P66" style:family="paragraph" style:parent-style-name="Code">
      <style:text-properties officeooo:paragraph-rsid="00fb6cd6"/>
    </style:style>
    <style:style style:name="P67" style:family="paragraph" style:parent-style-name="Code">
      <style:text-properties officeooo:paragraph-rsid="00fc42a4"/>
    </style:style>
    <style:style style:name="P68" style:family="paragraph" style:parent-style-name="Code">
      <style:text-properties officeooo:paragraph-rsid="00fdeddb"/>
    </style:style>
    <style:style style:name="P69" style:family="paragraph" style:parent-style-name="Code">
      <style:text-properties officeooo:paragraph-rsid="00ffc8b8"/>
    </style:style>
    <style:style style:name="P70" style:family="paragraph" style:parent-style-name="Code">
      <style:text-properties officeooo:paragraph-rsid="01003942"/>
    </style:style>
    <style:style style:name="P71" style:family="paragraph" style:parent-style-name="Code">
      <style:text-properties officeooo:paragraph-rsid="010156bf"/>
    </style:style>
    <style:style style:name="P72" style:family="paragraph" style:parent-style-name="Code">
      <style:text-properties officeooo:paragraph-rsid="0106109b"/>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Section">
      <style:text-properties officeooo:paragraph-rsid="001f7f42"/>
    </style:style>
    <style:style style:name="P75" style:family="paragraph" style:parent-style-name="Section">
      <style:text-properties officeooo:paragraph-rsid="003e9d92"/>
    </style:style>
    <style:style style:name="P76" style:family="paragraph" style:parent-style-name="Section">
      <style:text-properties officeooo:rsid="00f2a995" officeooo:paragraph-rsid="00fb6cd6"/>
    </style:style>
    <style:style style:name="P77" style:family="paragraph" style:parent-style-name="Section">
      <style:text-properties officeooo:rsid="00f66935" officeooo:paragraph-rsid="00f66935"/>
    </style:style>
    <style:style style:name="P78" style:family="paragraph" style:parent-style-name="Section">
      <style:text-properties officeooo:rsid="00f8d019" officeooo:paragraph-rsid="00f8d019"/>
    </style:style>
    <style:style style:name="P79" style:family="paragraph" style:parent-style-name="Section">
      <style:text-properties officeooo:rsid="010156bf" officeooo:paragraph-rsid="010156bf"/>
    </style:style>
    <style:style style:name="P80" style:family="paragraph" style:parent-style-name="Section">
      <style:text-properties officeooo:rsid="0106109b" officeooo:paragraph-rsid="0106109b"/>
    </style:style>
    <style:style style:name="P81" style:family="paragraph" style:parent-style-name="Standard" style:list-style-name="L1"/>
    <style:style style:name="P82" style:family="paragraph" style:parent-style-name="Standard" style:list-style-name="L1">
      <style:text-properties officeooo:paragraph-rsid="003e9d92"/>
    </style:style>
    <style:style style:name="P83" style:family="paragraph" style:parent-style-name="Standard" style:list-style-name="L2">
      <style:text-properties style:font-name="Courier New" fo:font-weight="bold" style:font-weight-asian="bold" style:font-weight-complex="bold"/>
    </style:style>
    <style:style style:name="P84" style:family="paragraph" style:parent-style-name="Standard" style:list-style-name="L4">
      <style:text-properties style:font-name="Courier New" fo:font-weight="bold" style:font-weight-asian="bold" style:font-weight-complex="bold"/>
    </style:style>
    <style:style style:name="P85" style:family="paragraph" style:parent-style-name="Standard" style:list-style-name="L3"/>
    <style:style style:name="P86" style:family="paragraph" style:parent-style-name="Standard" style:list-style-name="L3">
      <style:text-properties officeooo:paragraph-rsid="007cc465"/>
    </style:style>
    <style:style style:name="P87" style:family="paragraph" style:parent-style-name="Standard" style:list-style-name="L5">
      <style:text-properties fo:font-weight="bold" style:font-weight-asian="bold" style:font-weight-complex="bold"/>
    </style:style>
    <style:style style:name="P88" style:family="paragraph" style:parent-style-name="Standard" style:list-style-name="L6">
      <style:text-properties fo:font-weight="bold" style:font-weight-asian="bold" style:font-weight-complex="bold"/>
    </style:style>
    <style:style style:name="P89"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T16" style:family="text">
      <style:text-properties officeooo:rsid="00f4d0c8"/>
    </style:style>
    <style:style style:name="T17" style:family="text">
      <style:text-properties officeooo:rsid="00f79bd0"/>
    </style:style>
    <style:style style:name="T18" style:family="text">
      <style:text-properties officeooo:rsid="00f8d019"/>
    </style:style>
    <style:style style:name="T19" style:family="text">
      <style:text-properties officeooo:rsid="00facc4a"/>
    </style:style>
    <style:style style:name="T20" style:family="text">
      <style:text-properties officeooo:rsid="010156bf"/>
    </style:style>
    <style:style style:name="T21" style:family="text">
      <style:text-properties officeooo:rsid="0103cf4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6"/>
      <text:p text:style-name="P36"/>
      <text:p text:style-name="P36"/>
      <text:p text:style-name="P36"/>
      <text:p text:style-name="P36"/>
      <text:p text:style-name="P36">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73"><text:a xlink:type="simple" xlink:href="#__RefHeading___Toc12733_2206932868" text:style-name="Index_20_Link" text:visited-style-name="Index_20_Link">1. Pointer and memory<text:tab/>4</text:a></text:p>
          <text:p text:style-name="P73"><text:a xlink:type="simple" xlink:href="#__RefHeading___Toc12867_2206932868" text:style-name="Index_20_Link" text:visited-style-name="Index_20_Link">2. Variadic functions<text:tab/>4</text:a></text:p>
          <text:p text:style-name="P73"><text:a xlink:type="simple" xlink:href="#__RefHeading___Toc12865_2206932868" text:style-name="Index_20_Link" text:visited-style-name="Index_20_Link">3. Pointers and Local variables in functions<text:tab/>5</text:a></text:p>
          <text:p text:style-name="P73"><text:a xlink:type="simple" xlink:href="#__RefHeading___Toc12863_2206932868" text:style-name="Index_20_Link" text:visited-style-name="Index_20_Link">4. Ternary operator<text:tab/>7</text:a></text:p>
          <text:p text:style-name="P73"><text:a xlink:type="simple" xlink:href="#__RefHeading___Toc12861_2206932868" text:style-name="Index_20_Link" text:visited-style-name="Index_20_Link">5. Terminating a program using exit() while inside a function without return type<text:tab/>7</text:a></text:p>
          <text:p text:style-name="P73"><text:a xlink:type="simple" xlink:href="#__RefHeading___Toc12859_2206932868" text:style-name="Index_20_Link" text:visited-style-name="Index_20_Link">6. Structure Packing and Padding<text:tab/>8</text:a></text:p>
          <text:p text:style-name="P73"><text:a xlink:type="simple" xlink:href="#__RefHeading___Toc12857_2206932868" text:style-name="Index_20_Link" text:visited-style-name="Index_20_Link">7. Arguments and Options<text:tab/>9</text:a></text:p>
          <text:p text:style-name="P73"><text:a xlink:type="simple" xlink:href="#__RefHeading___Toc12855_2206932868" text:style-name="Index_20_Link" text:visited-style-name="Index_20_Link">8. Memory Mapping an SFR<text:tab/>10</text:a></text:p>
          <text:p text:style-name="P73"><text:a xlink:type="simple" xlink:href="#__RefHeading___Toc12853_2206932868" text:style-name="Index_20_Link" text:visited-style-name="Index_20_Link">9. Convert Hexadecimal to Binary<text:tab/>10</text:a></text:p>
          <text:p text:style-name="P73"><text:a xlink:type="simple" xlink:href="#__RefHeading___Toc12851_2206932868" text:style-name="Index_20_Link" text:visited-style-name="Index_20_Link">10. Convert Byte to Binary<text:tab/>11</text:a></text:p>
          <text:p text:style-name="P73"><text:a xlink:type="simple" xlink:href="#__RefHeading___Toc12849_2206932868" text:style-name="Index_20_Link" text:visited-style-name="Index_20_Link">11. How does free() know the size of memory to be deallocated?<text:tab/>11</text:a></text:p>
          <text:p text:style-name="P73"><text:a xlink:type="simple" xlink:href="#__RefHeading___Toc12847_2206932868" text:style-name="Index_20_Link" text:visited-style-name="Index_20_Link">12. Setter and Getter Functions<text:tab/>12</text:a></text:p>
          <text:p text:style-name="P73"><text:a xlink:type="simple" xlink:href="#__RefHeading___Toc12845_2206932868" text:style-name="Index_20_Link" text:visited-style-name="Index_20_Link">13. Interrupt Handling in Microcontroller<text:tab/>12</text:a></text:p>
          <text:p text:style-name="P73"><text:a xlink:type="simple" xlink:href="#__RefHeading___Toc12843_2206932868" text:style-name="Index_20_Link" text:visited-style-name="Index_20_Link">14. Bit rate vs Baud rate<text:tab/>12</text:a></text:p>
          <text:p text:style-name="P73"><text:a xlink:type="simple" xlink:href="#__RefHeading___Toc12841_2206932868" text:style-name="Index_20_Link" text:visited-style-name="Index_20_Link">15. Static vs Global variables<text:tab/>12</text:a></text:p>
          <text:p text:style-name="P73"><text:a xlink:type="simple" xlink:href="#__RefHeading___Toc12839_2206932868" text:style-name="Index_20_Link" text:visited-style-name="Index_20_Link">16. memset() function<text:tab/>13</text:a></text:p>
          <text:p text:style-name="P73"><text:a xlink:type="simple" xlink:href="#__RefHeading___Toc12837_2206932868" text:style-name="Index_20_Link" text:visited-style-name="Index_20_Link">17. Dangling pointer<text:tab/>15</text:a></text:p>
          <text:p text:style-name="P73"><text:a xlink:type="simple" xlink:href="#__RefHeading___Toc12835_2206932868" text:style-name="Index_20_Link" text:visited-style-name="Index_20_Link">18. Void pointer<text:tab/>15</text:a></text:p>
          <text:p text:style-name="P73"><text:a xlink:type="simple" xlink:href="#__RefHeading___Toc12833_2206932868" text:style-name="Index_20_Link" text:visited-style-name="Index_20_Link">19. NULL Pointer<text:tab/>16</text:a></text:p>
          <text:p text:style-name="P73"><text:a xlink:type="simple" xlink:href="#__RefHeading___Toc12831_2206932868" text:style-name="Index_20_Link" text:visited-style-name="Index_20_Link">20. Wild pointer<text:tab/>17</text:a></text:p>
          <text:p text:style-name="P73"><text:a xlink:type="simple" xlink:href="#__RefHeading___Toc12829_2206932868" text:style-name="Index_20_Link" text:visited-style-name="Index_20_Link">21. Double Pointer (Pointer to Pointer)<text:tab/>17</text:a></text:p>
          <text:p text:style-name="P73"><text:a xlink:type="simple" xlink:href="#__RefHeading___Toc18486_660237004" text:style-name="Index_20_Link" text:visited-style-name="Index_20_Link">22. Call by reference function<text:tab/>18</text:a></text:p>
          <text:p text:style-name="P73"><text:a xlink:type="simple" xlink:href="#__RefHeading___Toc12827_2206932868" text:style-name="Index_20_Link" text:visited-style-name="Index_20_Link">23. Call by value function<text:tab/>19</text:a></text:p>
          <text:p text:style-name="P73"><text:a xlink:type="simple" xlink:href="#__RefHeading___Toc12825_2206932868" text:style-name="Index_20_Link" text:visited-style-name="Index_20_Link">24. volatile and const volatile keyword<text:tab/>20</text:a></text:p>
          <text:p text:style-name="P73"><text:a xlink:type="simple" xlink:href="#__RefHeading___Toc12823_2206932868" text:style-name="Index_20_Link" text:visited-style-name="Index_20_Link">25. static extern is invalid<text:tab/>20</text:a></text:p>
          <text:p text:style-name="P73"><text:a xlink:type="simple" xlink:href="#__RefHeading___Toc12821_2206932868" text:style-name="Index_20_Link" text:visited-style-name="Index_20_Link">26. inline Function<text:tab/>20</text:a></text:p>
          <text:p text:style-name="P73"><text:a xlink:type="simple" xlink:href="#__RefHeading___Toc12819_2206932868" text:style-name="Index_20_Link" text:visited-style-name="Index_20_Link">27. Storage class<text:tab/>22</text:a></text:p>
          <text:p text:style-name="P73"><text:a xlink:type="simple" xlink:href="#__RefHeading___Toc12817_2206932868" text:style-name="Index_20_Link" text:visited-style-name="Index_20_Link">28. Structure declaration and definition<text:tab/>24</text:a></text:p>
          <text:p text:style-name="P73"><text:a xlink:type="simple" xlink:href="#__RefHeading___Toc12815_2206932868" text:style-name="Index_20_Link" text:visited-style-name="Index_20_Link">29. typedef and struct<text:tab/>25</text:a></text:p>
          <text:p text:style-name="P73"><text:a xlink:type="simple" xlink:href="#__RefHeading___Toc12813_2206932868" text:style-name="Index_20_Link" text:visited-style-name="Index_20_Link">30. Passing structure to function<text:tab/>25</text:a></text:p>
          <text:p text:style-name="P73"><text:a xlink:type="simple" xlink:href="#__RefHeading___Toc12811_2206932868" text:style-name="Index_20_Link" text:visited-style-name="Index_20_Link">31. Static Function<text:tab/>27</text:a></text:p>
          <text:p text:style-name="P73"><text:a xlink:type="simple" xlink:href="#__RefHeading___Toc12809_2206932868" text:style-name="Index_20_Link" text:visited-style-name="Index_20_Link">32. Type casting<text:tab/>28</text:a></text:p>
          <text:p text:style-name="P73"><text:a xlink:type="simple" xlink:href="#__RefHeading___Toc12807_2206932868" text:style-name="Index_20_Link" text:visited-style-name="Index_20_Link">33. Integer Promotion<text:tab/>29</text:a></text:p>
          <text:p text:style-name="P73"><text:a xlink:type="simple" xlink:href="#__RefHeading___Toc12805_2206932868" text:style-name="Index_20_Link" text:visited-style-name="Index_20_Link">34. Dynamic Memory Allocation<text:tab/>30</text:a></text:p>
          <text:p text:style-name="P73"><text:a xlink:type="simple" xlink:href="#__RefHeading___Toc12803_2206932868" text:style-name="Index_20_Link" text:visited-style-name="Index_20_Link">35. Union<text:tab/>34</text:a></text:p>
          <text:p text:style-name="P73"><text:a xlink:type="simple" xlink:href="#__RefHeading___Toc12801_2206932868" text:style-name="Index_20_Link" text:visited-style-name="Index_20_Link">36. Linked List<text:tab/>36</text:a></text:p>
          <text:p text:style-name="P73"><text:a xlink:type="simple" xlink:href="#__RefHeading___Toc12799_2206932868" text:style-name="Index_20_Link" text:visited-style-name="Index_20_Link">37. Splitting a string using strtok()<text:tab/>39</text:a></text:p>
          <text:p text:style-name="P73"><text:a xlink:type="simple" xlink:href="#__RefHeading___Toc12797_2206932868" text:style-name="Index_20_Link" text:visited-style-name="Index_20_Link">38. Pointer to Structure<text:tab/>40</text:a></text:p>
          <text:p text:style-name="P73"><text:a xlink:type="simple" xlink:href="#__RefHeading___Toc12795_2206932868" text:style-name="Index_20_Link" text:visited-style-name="Index_20_Link">39. Easy way to find the number of elements in an array<text:tab/>40</text:a></text:p>
          <text:p text:style-name="P73"><text:a xlink:type="simple" xlink:href="#__RefHeading___Toc12793_2206932868" text:style-name="Index_20_Link" text:visited-style-name="Index_20_Link">40. Function Pointers<text:tab/>40</text:a></text:p>
          <text:p text:style-name="P73"><text:a xlink:type="simple" xlink:href="#__RefHeading___Toc12791_2206932868" text:style-name="Index_20_Link" text:visited-style-name="Index_20_Link">41. Call back function using function pointer – Example<text:tab/>45</text:a></text:p>
          <text:p text:style-name="P73"><text:a xlink:type="simple" xlink:href="#__RefHeading___Toc12789_2206932868" text:style-name="Index_20_Link" text:visited-style-name="Index_20_Link">42. Function pointer without a name in C<text:tab/>45</text:a></text:p>
          <text:p text:style-name="P73"><text:a xlink:type="simple" xlink:href="#__RefHeading___Toc12787_2206932868" text:style-name="Index_20_Link" text:visited-style-name="Index_20_Link">43. C program to check Endianness<text:tab/>46</text:a></text:p>
          <text:p text:style-name="P73"><text:a xlink:type="simple" xlink:href="#__RefHeading___Toc12785_2206932868" text:style-name="Index_20_Link" text:visited-style-name="Index_20_Link"><text:soft-page-break/>44. Initializing multi-dimensional array pointer<text:tab/>47</text:a></text:p>
          <text:p text:style-name="P73"><text:a xlink:type="simple" xlink:href="#__RefHeading___Toc12783_2206932868" text:style-name="Index_20_Link" text:visited-style-name="Index_20_Link">45. Bit-Shift and Bitwise operators<text:tab/>47</text:a></text:p>
          <text:p text:style-name="P73"><text:a xlink:type="simple" xlink:href="#__RefHeading___Toc12781_2206932868" text:style-name="Index_20_Link" text:visited-style-name="Index_20_Link">46. Pointer Arithmetic<text:tab/>48</text:a></text:p>
          <text:p text:style-name="P73"><text:a xlink:type="simple" xlink:href="#__RefHeading___Toc12779_2206932868" text:style-name="Index_20_Link" text:visited-style-name="Index_20_Link">47. enum<text:tab/>49</text:a></text:p>
          <text:p text:style-name="P73"><text:a xlink:type="simple" xlink:href="#__RefHeading___Toc12777_2206932868" text:style-name="Index_20_Link" text:visited-style-name="Index_20_Link">48. Bit Fields<text:tab/>51</text:a></text:p>
          <text:p text:style-name="P73"><text:a xlink:type="simple" xlink:href="#__RefHeading___Toc12775_2206932868" text:style-name="Index_20_Link" text:visited-style-name="Index_20_Link">49. Assigning Pointer address manually<text:tab/>53</text:a></text:p>
          <text:p text:style-name="P73"><text:a xlink:type="simple" xlink:href="#__RefHeading___Toc12773_2206932868" text:style-name="Index_20_Link" text:visited-style-name="Index_20_Link">50. Format Specifiers<text:tab/>53</text:a></text:p>
          <text:p text:style-name="P73"><text:a xlink:type="simple" xlink:href="#__RefHeading___Toc12771_2206932868" text:style-name="Index_20_Link" text:visited-style-name="Index_20_Link">51. Bootloader, Bootstrap Loader and Start-up Code<text:tab/>54</text:a></text:p>
          <text:p text:style-name="P73"><text:a xlink:type="simple" xlink:href="#__RefHeading___Toc12769_2206932868" text:style-name="Index_20_Link" text:visited-style-name="Index_20_Link">52. Header Include Guard<text:tab/>54</text:a></text:p>
          <text:p text:style-name="P73"><text:a xlink:type="simple" xlink:href="#__RefHeading___Toc12767_2206932868" text:style-name="Index_20_Link" text:visited-style-name="Index_20_Link">53. Memory Layout in C<text:tab/>57</text:a></text:p>
          <text:p text:style-name="P73"><text:a xlink:type="simple" xlink:href="#__RefHeading___Toc12765_2206932868" text:style-name="Index_20_Link" text:visited-style-name="Index_20_Link">54. Passing an array to a function<text:tab/>59</text:a></text:p>
          <text:p text:style-name="P73"><text:a xlink:type="simple" xlink:href="#__RefHeading___Toc12763_2206932868" text:style-name="Index_20_Link" text:visited-style-name="Index_20_Link">55. Normal declaration of array of pointers vs. array allocated with malloc()<text:tab/>60</text:a></text:p>
          <text:p text:style-name="P73"><text:a xlink:type="simple" xlink:href="#__RefHeading___Toc12761_2206932868" text:style-name="Index_20_Link" text:visited-style-name="Index_20_Link">56. Token-pasting operator (##)<text:tab/>60</text:a></text:p>
          <text:p text:style-name="P73"><text:a xlink:type="simple" xlink:href="#__RefHeading___Toc12759_2206932868" text:style-name="Index_20_Link" text:visited-style-name="Index_20_Link">57. Macro with variable arguments<text:tab/>62</text:a></text:p>
          <text:p text:style-name="P73"><text:a xlink:type="simple" xlink:href="#__RefHeading___Toc12757_2206932868" text:style-name="Index_20_Link" text:visited-style-name="Index_20_Link">58. Stringizing operator (#)<text:tab/>63</text:a></text:p>
          <text:p text:style-name="P73"><text:a xlink:type="simple" xlink:href="#__RefHeading___Toc12755_2206932868" text:style-name="Index_20_Link" text:visited-style-name="Index_20_Link">59. Both Stringize and the Token-pasting operators in a single macro<text:tab/>64</text:a></text:p>
          <text:p text:style-name="P73"><text:a xlink:type="simple" xlink:href="#__RefHeading___Toc12753_2206932868" text:style-name="Index_20_Link" text:visited-style-name="Index_20_Link">60. Const and Pointer<text:tab/>64</text:a></text:p>
          <text:p text:style-name="P73"><text:a xlink:type="simple" xlink:href="#__RefHeading___Toc12751_2206932868" text:style-name="Index_20_Link" text:visited-style-name="Index_20_Link">61. Swapping without using Third variable<text:tab/>64</text:a></text:p>
          <text:p text:style-name="P73"><text:a xlink:type="simple" xlink:href="#__RefHeading___Toc12749_2206932868" text:style-name="Index_20_Link" text:visited-style-name="Index_20_Link">62. Swapping using Bitwise operator<text:tab/>65</text:a></text:p>
          <text:p text:style-name="P73"><text:a xlink:type="simple" xlink:href="#__RefHeading___Toc12747_2206932868" text:style-name="Index_20_Link" text:visited-style-name="Index_20_Link">63. Application of union<text:tab/>65</text:a></text:p>
          <text:p text:style-name="P73"><text:a xlink:type="simple" xlink:href="#__RefHeading___Toc12745_2206932868" text:style-name="Index_20_Link" text:visited-style-name="Index_20_Link">64. Acesss a variable in another file without making it global<text:tab/>65</text:a></text:p>
          <text:p text:style-name="P73"><text:a xlink:type="simple" xlink:href="#__RefHeading___Toc12743_2206932868" text:style-name="Index_20_Link" text:visited-style-name="Index_20_Link">65. Reversing of register<text:tab/>67</text:a></text:p>
          <text:p text:style-name="P73"><text:a xlink:type="simple" xlink:href="#__RefHeading___Toc12741_2206932868" text:style-name="Index_20_Link" text:visited-style-name="Index_20_Link">66. scanf() to read until new line<text:tab/>68</text:a></text:p>
          <text:p text:style-name="P73"><text:a xlink:type="simple" xlink:href="#__RefHeading___Toc12739_2206932868" text:style-name="Index_20_Link" text:visited-style-name="Index_20_Link">67. Fall-through<text:tab/>68</text:a></text:p>
          <text:p text:style-name="P73"><text:a xlink:type="simple" xlink:href="#__RefHeading___Toc12737_2206932868" text:style-name="Index_20_Link" text:visited-style-name="Index_20_Link">68. Driver library<text:tab/>69</text:a></text:p>
          <text:p text:style-name="P73"><text:a xlink:type="simple" xlink:href="#__RefHeading___Toc12735_2206932868" text:style-name="Index_20_Link" text:visited-style-name="Index_20_Link">69. Number of bits to convert integer a to integer b<text:tab/>70</text:a></text:p>
          <text:p text:style-name="P73"><text:a xlink:type="simple" xlink:href="#__RefHeading___Toc20583_1961033176" text:style-name="Index_20_Link" text:visited-style-name="Index_20_Link">70. Fibonacci series without using recursion<text:tab/>70</text:a></text:p>
          <text:p text:style-name="P73"><text:a xlink:type="simple" xlink:href="#__RefHeading___Toc20577_1961033176" text:style-name="Index_20_Link" text:visited-style-name="Index_20_Link">71. Fibonacci series using recursion<text:tab/>71</text:a></text:p>
          <text:p text:style-name="P73"><text:a xlink:type="simple" xlink:href="#__RefHeading___Toc20581_1961033176" text:style-name="Index_20_Link" text:visited-style-name="Index_20_Link">72. Factorial without using recursion<text:tab/>72</text:a></text:p>
          <text:p text:style-name="P73"><text:a xlink:type="simple" xlink:href="#__RefHeading___Toc20579_1961033176" text:style-name="Index_20_Link" text:visited-style-name="Index_20_Link">73. Factorial using recursion<text:tab/>73</text:a></text:p>
          <text:p text:style-name="P73"><text:a xlink:type="simple" xlink:href="#__RefHeading___Toc20575_1961033176" text:style-name="Index_20_Link" text:visited-style-name="Index_20_Link">74. C program without semicolon<text:tab/>73</text:a></text:p>
          <text:p text:style-name="P73"><text:a xlink:type="simple" xlink:href="#__RefHeading___Toc20573_1961033176" text:style-name="Index_20_Link" text:visited-style-name="Index_20_Link">75. Printing multiple times without loop<text:tab/>74</text:a></text:p>
          <text:p text:style-name="P73"><text:a xlink:type="simple" xlink:href="#__RefHeading___Toc8398_662833756" text:style-name="Index_20_Link" text:visited-style-name="Index_20_Link">76. Reverse a number<text:tab/>7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text:style-name="Numbering_20_123">
        <text:list-item>
          <text:p text:style-name="P74"><text:bookmark-start text:name="__RefHeading___Toc12733_2206932868"/>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tab/>argument. */</text:p>
      <text:p text:style-name="Code"><text:tab/>}</text:p>
      <text:p text:style-name="Code"><text:tab/>va_end(ap);</text:p>
      <text:p text:style-name="Code"><text:tab/>return(sum / count);</text:p>
      <text:p text:style-name="Code">}</text:p>
      <text:p text:style-name="Code"><text:soft-page-break/></text:p>
      <text:p text:style-name="Code">int main(void)</text:p>
      <text:p text:style-name="Code">{</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1</text:p>
      <text:p text:style-name="P38"/>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text:soft-page-break/></text:p>
      <text:p text:style-name="Code">int *fun_1(void)</text:p>
      <text:p text:style-name="Code">{</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int main(void)</text:p>
      <text:p text:style-name="P6">{</text:p>
      <text:p text:style-name="Code"><text:tab/>int *p = fun_1();</text:p>
      <text:p text:style-name="Code"><text:tab/>printf("%d\n", *p); <text:s/>//Prints 10.</text:p>
      <text:p text:style-name="Code"><text:tab/>p = fun_2();</text:p>
      <text:p text:style-name="Code"><text:soft-page-break/><text:tab/>printf("%d\n", *p); <text:s/>//Prints 20.</text:p>
      <text:p text:style-name="P6"><text:tab/>free(p);</text:p>
      <text:p text:style-name="P6"><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
      <text:p text:style-name="Code">void foo(void) {</text:p>
      <text:p text:style-name="Code"><text:s text:c="4"/>printf("Inside foo() before exit()\n");</text:p>
      <text:p text:style-name="Code"><text:s text:c="4"/>exit(1); <text:s/>//Exiting with failure. exit(0) for exiting with success.</text:p>
      <text:p text:style-name="Code"><text:soft-page-break/><text:s text:c="4"/>printf("Inside foo() after exit()\n");</text:p>
      <text:p text:style-name="Code">}</text:p>
      <text:p text:style-name="Code"/>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Output</text:p>
      <text:p text:style-name="Standard"/>
      <text:p text:style-name="Code">Size of int: 4</text:p>
      <text:p text:style-name="Code">Size of packed_4: 12</text:p>
      <text:p text:style-name="Code">Size of nested_packed_1: 17</text:p>
      <text:p text:style-name="Standard"><text:soft-page-break/></text:p>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tab/>{</text:p>
      <text:p text:style-name="P9"><text:tab/><text:tab/><text:tab/>printf("Multiplication is: %f\n", atof(argv[2]) * atof(argv[3]));</text:p>
      <text:p text:style-name="Code"><text:tab/><text:tab/><text:tab/>return(0);</text:p>
      <text:p text:style-name="Code"><text:tab/>}</text:p>
      <text:p text:style-name="Code"><text:soft-page-break/><text:s text:c="4"/>else if(strcmp(argv[1], "-d") == 0 || strcmp(argv[1], "-divide") == 0)</text:p>
      <text:p text:style-name="Code"><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40">is the same as above, but with extra parentheses around it to avoid confusion. </text:p>
      <text:p text:style-name="P40"/>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40"/>
      <text:p text:style-name="P40">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text:soft-page-break/></text:p>
      <text:p text:style-name="Code">int main(void)</text:p>
      <text:p text:style-name="Code">{</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text:soft-page-break/></text:p>
      <text:list text:continue-numbering="true" text:style-name="Numbering_20_123">
        <text:list-item>
          <text:p text:style-name="Section"><text:bookmark-start text:name="__RefHeading___Toc12847_2206932868"/>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101815147742383" text:continue-numbering="true" text:style-name="Numbering_20_123">
        <text:list-item>
          <text:p text:style-name="P75"><text:bookmark-start text:name="__RefHeading___Toc12845_2206932868"/>Interrupt Handling in Microcontroller<text:bookmark-end text:name="__RefHeading___Toc12845_2206932868"/></text:p>
        </text:list-item>
      </text:list>
      <text:list text:style-name="L1">
        <text:list-item>
          <text:p text:style-name="P82">Microcontroller finishes the current instruction it is executing and saves address of next instruction (which is in the Program Counter) on to the Stack.</text:p>
        </text:list-item>
        <text:list-item>
          <text:p text:style-name="P81">It also saves current status of all the interrupts internally (i.e., not on the Stack).</text:p>
        </text:list-item>
        <text:list-item>
          <text:p text:style-name="P81">It jumps to the memory location of "Interrupt Vector Table". Interrupt Vector Table contains addresses of all ISRs.</text:p>
        </text:list-item>
        <text:list-item>
          <text:p text:style-name="P81">Microcontroller fetches address of the ISR from Interrupt Vector Table and jumps to it. It starts executing the Interrupt Service Routine until it reaches last instruction of ISR.</text:p>
        </text:list-item>
        <text:list-item>
          <text:p text:style-name="P81">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101815147742383"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41"/>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text:soft-page-break/></text:p>
      <text:p text:style-name="P13">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soft-page-break/><text:tab/>memset(str + 13, '.', 8*sizeof(char));</text:p>
      <text:p text:style-name="Code"><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soft-page-break/><text:tab/>{</text:p>
      <text:p text:style-name="Code"><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text:soft-page-break/>can however be done using typecasting the void pointer Pointer arithmetic is not possible on pointers of void due to lack of concrete value and thus size.</text:p>
      <text:p text:style-name="Standard"/>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
      <text:p text:style-name="Standard"><text:soft-page-break/>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p>
      <text:p text:style-name="Code"><text:soft-page-break/><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soft-page-break/><text:tab/>int b = 200;</text:p>
      <text:p text:style-name="Code"><text:tab/>printf("Before swap, value of a : %d\n", a );</text:p>
      <text:p text:style-name="Code"><text:tab/>printf("Before swap, value of b : %d\n", b );</text:p>
      <text:p text:style-name="Code"><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39"/>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soft-page-break/><text:tab/>int b = 200;</text:p>
      <text:p text:style-name="Code"><text:tab/>printf("Before swap, value of a : %d\n", a );</text:p>
      <text:p text:style-name="Code"><text:tab/>printf("Before swap, value of b : %d\n", b );</text:p>
      <text:p text:style-name="Code"><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 Inline function in C</text:p>
      <text:p text:style-name="Code"><text:soft-page-break/>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
      <text:list xml:id="list101815506981442" text:continue-numbering="true" text:style-name="Numbering_20_123">
        <text:list-item>
          <text:p text:style-name="Section"><text:bookmark-start text:name="__RefHeading___Toc12819_2206932868"/><text:soft-page-break/>Storage class<text:bookmark-end text:name="__RefHeading___Toc12819_2206932868"/></text:p>
        </text:list-item>
      </text:list>
      <text:p text:style-name="Standard">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83">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83">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83">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text:soft-page-break/>/* Global static variable only accessible inside this file. It cannot be accessed with extern keyword from another file. */</text:p>
      <text:p text:style-name="Code"/>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83">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text:soft-page-break/></text:p>
      <text:p text:style-name="Code">int main()</text:p>
      <text:p text:style-name="Code">{</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101815506981442"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52">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soft-page-break/>{</text:p>
      <text:p text:style-name="Code"><text:tab/>record.id = 12;</text:p>
      <text:p text:style-name="Code"><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101815142946287"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85">Passing structure to a function by value</text:p>
        </text:list-item>
        <text:list-item>
          <text:p text:style-name="P86">Passing structure to a function by address (reference)</text:p>
        </text:list-item>
        <text:list-item>
          <text:p text:style-name="P86"><text:span text:style-name="T9">De</text:span>clare structure variable as global</text:p>
        </text:list-item>
      </text:list>
      <text:p text:style-name="P53"/>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soft-page-break/><text:tab/>return 0;</text:p>
      <text:p text:style-name="Code">}</text:p>
      <text:p text:style-name="Code">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text:soft-page-break/>Id is: 1</text:p>
      <text:p text:style-name="Code">Name is: Raju</text:p>
      <text:p text:style-name="Code">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101815142946287"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text:soft-page-break/></text:p>
      <text:p text:style-name="Standard">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text:soft-page-break/>When the above code is compiled and executed, it produces the following result.</text:p>
      <text:p text:style-name="Standard"/>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4">Integer promotion is the process by which values of integer type "smaller" than int or unsigned int are converted either to int or unsigned int. Consider an example of adding a character with an integer.</text:p>
      <text:p text:style-name="P54"/>
      <text:p text:style-name="P33">Example</text:p>
      <text:p text:style-name="P54"/>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oft-page-break/><text:s text:c="4"/>char c = 'c'; /* ascii value is 99 */</text:p>
      <text:p text:style-name="Code"><text:s text:c="4"/>float sum;</text:p>
      <text:p text:style-name="Code"><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101816023654195"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7">malloc()</text:p>
      <text:p text:style-name="Standard">Allocates requested size of bytes and returns a pointer first byte of allocated space</text:p>
      <text:p text:style-name="Standard"/>
      <text:p text:style-name="P37">calloc()</text:p>
      <text:p text:style-name="Standard">Allocates space for an array elements, initializes to zero and then returns a pointer to memory</text:p>
      <text:p text:style-name="Standard"/>
      <text:p text:style-name="P37">realloc()</text:p>
      <text:p text:style-name="P55">Change the size of previously allocated space</text:p>
      <text:p text:style-name="P55"/>
      <text:p text:style-name="P37">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oft-page-break/><text:s text:c="4"/>return (0);</text:p>
      <text:p text:style-name="Code">}</text:p>
      <text:p text:style-name="Standard"/>
      <text:list text:style-name="L4">
        <text:list-item>
          <text:p text:style-name="P84">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84">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84">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6"><text:span text:style-name="T4">Example 1: Using C </text:span><text:span text:style-name="T3">malloc()</text:span><text:span text:style-name="T4"> and </text:span><text:span text:style-name="T3">free()</text:span></text:p>
      <text:p text:style-name="P21"><text:soft-page-break/></text:p>
      <text:p text:style-name="Standard">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oft-page-break/><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84">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text:soft-page-break/>Enter new size of array: 4</text:p>
      <text:p text:style-name="Code">Addresses of newly allocated memory:26855472 26855476 26855480</text:p>
      <text:p text:style-name="Code">26855484</text:p>
      <text:p text:style-name="Standard"/>
      <text:list text:continue-list="list101816023654195"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42">}data;</text:p>
      <text:p text:style-name="P43"/>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oft-page-break/><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4">{</text:p>
      <text:p text:style-name="P44"><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4">{</text:p>
      <text:p text:style-name="P44"><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34">Output</text:p>
      <text:p text:style-name="P58"><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59">Byte content <text:s/>| 0x76 | 0x54 |</text:p>
      <text:p text:style-name="P59"/>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60">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60"><text:soft-page-break/></text:p>
      <text:p text:style-name="P60">Similar is the case if we want to make the 2nd place to 0. But, here, we use AND. Remember 0 when AND-ed with 1 or 0 always results in 0. Below is the code.</text:p>
      <text:p text:style-name="P60"/>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60">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5">main.c:4:14: error: redeclaration of enumerator 'failed' <text:s/>enum result {failed, passed};</text:p>
      <text:p text:style-name="P45"><text:s text:c="8"/>^~~~~~</text:p>
      <text:p text:style-name="P45">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61"/>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6">#include "header-2.h"</text:p>
      <text:p text:style-name="P46"/>
      <text:p text:style-name="P46">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62"/>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101816040681137"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87">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87">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87"><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87">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87">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88">.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88">.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list text:continue-list="list101816040681137"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p>
      <text:p text:style-name="Code"><text:s text:c="4"/>printf("Size of arr inside helper_2: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text:soft-page-break/>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
      <text:p text:style-name="Standard">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text:soft-page-break/>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define MY_DEVICE_BASE_ADDR <text:s/>0x40004000</text:p>
      <text:p text:style-name="Code">#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7"><text:tab/>printf("Example to use ## Pre-Processor!\n");</text:p>
      <text:p text:style-name="P47"><text:tab/>printf("*** My-Device Register ***\n");</text:p>
      <text:p text:style-name="P47"><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8">Status-Register Addr = 0x40004030</text:p>
      <text:p text:style-name="P48">Interrupt-Register Addr = 0x40004040</text:p>
      <text:p text:style-name="Standard"/>
      <text:p text:style-name="P35">Example 4</text:p>
      <text:p text:style-name="P63"/>
      <text:p text:style-name="Code">#include &lt;stdio.h&gt;</text:p>
      <text:p text:style-name="Code"><text:soft-page-break/></text:p>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tab/>{</text:p>
      <text:p text:style-name="Code"><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text:soft-page-break/>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
      <text:p text:style-name="Code">#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oft-page-break/>"<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
      <text:p text:style-name="Standard">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text:soft-page-break/>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 text:c="4"/>RegisterTemplate reg;</text:p>
      <text:p text:style-name="Code"/>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49">int main(void)</text:p>
      <text:p text:style-name="P49">{</text:p>
      <text:p text:style-name="Code"><text:soft-page-break/><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49">int get_hidden_variable(void)</text:p>
      <text:p text:style-name="P49">{</text:p>
      <text:p text:style-name="Code"><text:s text:c="4"/>return hidden_variable;</text:p>
      <text:p text:style-name="Code">}</text:p>
      <text:p text:style-name="Code"/>
      <text:p text:style-name="Code">// Setter function to modify the value (optional)</text:p>
      <text:p text:style-name="P49">void set_hidden_variable(int new_value)</text:p>
      <text:p text:style-name="P49">{</text:p>
      <text:p text:style-name="P49"><text:s text:c="4"/>if (new_value &gt;= 0)</text:p>
      <text:p text:style-name="P49"><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50">gcc main.c data.c -o my_program</text:p>
      <text:p text:style-name="Standard"/>
      <text:p text:style-name="P31">Output</text:p>
      <text:p text:style-name="P31"/>
      <text:p text:style-name="Code">Initial value: 42</text:p>
      <text:p text:style-name="Code"><text:soft-page-break/>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 text:c="8"/>// 4. Shift the original register to the right to process the next bit</text:p>
      <text:p text:style-name="Code"><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oft-page-break/><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101815818295571"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7">%[^\n]</text:p>
      <text:list text:style-name="L7">
        <text:list-item>
          <text:p text:style-name="P89"><text:span text:style-name="T3">[</text:span> Starts the scanset.</text:p>
        </text:list-item>
        <text:list-item>
          <text:p text:style-name="P89"><text:span text:style-name="T3">^</text:span> This is a "not" operator. It tells scanf to keep reading as long as it does not encounter the following character.</text:p>
        </text:list-item>
        <text:list-item>
          <text:p text:style-name="P89"><text:span text:style-name="T3">\n</text:span> The terminating character.</text:p>
        </text:list-item>
        <text:list-item>
          <text:p text:style-name="P89"><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101815818295571"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oft-page-break/><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 text:c="4"/>return 0;</text:p>
      <text:p text:style-name="Code">}</text:p>
      <text:p text:style-name="Standard"/>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oft-page-break/><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
      <text:p text:style-name="Code"><text:s text:c="4"/>// Count the number of set bits (1s) in xor_result</text:p>
      <text:p text:style-name="Code"><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P11"/>
      <text:p text:style-name="Code">3</text:p>
      <text:p text:style-name="Code"/>
      <text:list text:continue-numbering="true" text:style-name="Numbering_20_123">
        <text:list-item>
          <text:p text:style-name="Section"><text:bookmark-start text:name="__RefHeading___Toc20583_1961033176"/>Fibonacci series <text:span text:style-name="T16">without using recursion</text:span><text:bookmark-end text:name="__RefHeading___Toc20583_1961033176"/></text:p>
        </text:list-item>
      </text:list>
      <text:p text:style-name="Code">#include &lt;stdio.h&gt;</text:p>
      <text:p text:style-name="Code"><text:soft-page-break/></text:p>
      <text:p text:style-name="P64">int main()</text:p>
      <text:p text:style-name="P64">{</text:p>
      <text:p text:style-name="Code"><text:s text:c="4"/>int terms, i;</text:p>
      <text:p text:style-name="Code"><text:s text:c="4"/>long long int t1 = 0, t2 = 1, nextTerm;</text:p>
      <text:p text:style-name="Code"/>
      <text:p text:style-name="Code"><text:s text:c="4"/>// Ask the user for the number of terms</text:p>
      <text:p text:style-name="Code"><text:s text:c="4"/>printf("Enter the number of terms: ");</text:p>
      <text:p text:style-name="Code"><text:s text:c="4"/>scanf("%d", &amp;terms);</text:p>
      <text:p text:style-name="Code"/>
      <text:p text:style-name="Code"><text:s text:c="4"/>printf("Fibonacci Series: ");</text:p>
      <text:p text:style-name="Code"/>
      <text:p text:style-name="P64"><text:s text:c="4"/>for (i = 1; i &lt;= terms; ++i)</text:p>
      <text:p text:style-name="P64"><text:s text:c="4"/>{</text:p>
      <text:p text:style-name="Code"><text:s text:c="8"/>printf("%lld", t1);</text:p>
      <text:p text:style-name="Code"><text:s text:c="8"/></text:p>
      <text:p text:style-name="Code"><text:s text:c="8"/>// Add a comma after numbers, except for the last one</text:p>
      <text:p text:style-name="P64"><text:s text:c="8"/>if (i &lt; terms)</text:p>
      <text:p text:style-name="P64"><text:s text:c="8"/>{</text:p>
      <text:p text:style-name="Code"><text:s text:c="12"/>printf(", ");</text:p>
      <text:p text:style-name="Code"><text:s text:c="8"/>}</text:p>
      <text:p text:style-name="Code"/>
      <text:p text:style-name="Code"><text:s text:c="8"/>// Calculate the next term in the sequence</text:p>
      <text:p text:style-name="Code"><text:s text:c="8"/>nextTerm = t1 + t2;</text:p>
      <text:p text:style-name="Code"><text:s text:c="8"/>t1 = t2;</text:p>
      <text:p text:style-name="Code"><text:s text:c="8"/>t2 = nextTerm;</text:p>
      <text:p text:style-name="Code"><text:s text:c="4"/>}</text:p>
      <text:p text:style-name="Code"/>
      <text:p text:style-name="Code"><text:s text:c="4"/>printf("\n");</text:p>
      <text:p text:style-name="Code"><text:s text:c="4"/>return 0;</text:p>
      <text:p text:style-name="Code">}</text:p>
      <text:p text:style-name="Code"/>
      <text:list text:continue-numbering="true" text:style-name="Numbering_20_123">
        <text:list-item>
          <text:p text:style-name="P76"><text:bookmark-start text:name="__RefHeading___Toc20577_1961033176"/>Fibonacci <text:span text:style-name="T16">s</text:span>eries using recursion<text:bookmark-end text:name="__RefHeading___Toc20577_1961033176"/></text:p>
        </text:list-item>
      </text:list>
      <text:p text:style-name="P66">#include &lt;stdio.h&gt;</text:p>
      <text:p text:style-name="P66"/>
      <text:p text:style-name="P66">// Recursive function to find the nth Fibonacci number</text:p>
      <text:p text:style-name="P66">long long int fibonacci(int n)</text:p>
      <text:p text:style-name="P66">{</text:p>
      <text:p text:style-name="P66"><text:s text:c="4"/>// <text:span text:style-name="T18">Base case</text:span></text:p>
      <text:p text:style-name="P66"><text:s text:c="4"/>if (n == 0)</text:p>
      <text:p text:style-name="P66"><text:s text:c="4"/>{</text:p>
      <text:p text:style-name="P66"><text:s text:c="8"/>return 0;</text:p>
      <text:p text:style-name="P66"><text:s text:c="4"/>}</text:p>
      <text:p text:style-name="P66"><text:s text:c="4"/>else if (n == 1)</text:p>
      <text:p text:style-name="P66"><text:s text:c="4"/>{</text:p>
      <text:p text:style-name="P66"><text:s text:c="8"/>return 1;</text:p>
      <text:p text:style-name="P66"><text:s text:c="4"/>}</text:p>
      <text:p text:style-name="P66"><text:s text:c="4"/>// <text:span text:style-name="T18">General case / </text:span><text:span text:style-name="T19">Recursive </text:span><text:span text:style-name="T21">case</text:span></text:p>
      <text:p text:style-name="P66"><text:s text:c="4"/>else</text:p>
      <text:p text:style-name="P66"><text:s text:c="4"/>{</text:p>
      <text:p text:style-name="P66"><text:s text:c="8"/>return fibonacci(n - 1) + fibonacci(n - 2);</text:p>
      <text:p text:style-name="P66"><text:soft-page-break/><text:s text:c="4"/>}</text:p>
      <text:p text:style-name="P66">}</text:p>
      <text:p text:style-name="P66"/>
      <text:p text:style-name="P66">int main()</text:p>
      <text:p text:style-name="P66">{</text:p>
      <text:p text:style-name="P66"><text:s text:c="4"/>int terms, i;</text:p>
      <text:p text:style-name="P66"/>
      <text:p text:style-name="P66"><text:s text:c="4"/>// Ask the user for the number of terms</text:p>
      <text:p text:style-name="P66"><text:s text:c="4"/>printf("Enter the number of terms: ");</text:p>
      <text:p text:style-name="P66"><text:s text:c="4"/>scanf("%d", &amp;terms);</text:p>
      <text:p text:style-name="P66"/>
      <text:p text:style-name="P66"><text:s text:c="4"/>printf("Fibonacci Series: ");</text:p>
      <text:p text:style-name="P66"/>
      <text:p text:style-name="P66"><text:s text:c="4"/>// Loop to print each term using the recursive function</text:p>
      <text:p text:style-name="P66"><text:s text:c="4"/>for (i = 0; i &lt; terms; ++i)</text:p>
      <text:p text:style-name="P66"><text:s text:c="4"/>{</text:p>
      <text:p text:style-name="P66"><text:s text:c="8"/>printf("%lld", fibonacci(i));</text:p>
      <text:p text:style-name="P66"><text:s text:c="8"/></text:p>
      <text:p text:style-name="P66"><text:s text:c="8"/>// Add a comma after numbers, except for the last one</text:p>
      <text:p text:style-name="P66"><text:s text:c="8"/>if (i &lt; terms – 1)</text:p>
      <text:p text:style-name="P66"><text:s text:c="8"/>{</text:p>
      <text:p text:style-name="P66"><text:s text:c="12"/>printf(", ");</text:p>
      <text:p text:style-name="P66"><text:s text:c="8"/>}</text:p>
      <text:p text:style-name="P66"><text:s text:c="4"/>}</text:p>
      <text:p text:style-name="P66"/>
      <text:p text:style-name="P66"><text:s text:c="4"/>printf("\n");</text:p>
      <text:p text:style-name="P66"><text:s text:c="4"/>return 0;</text:p>
      <text:p text:style-name="P66">}</text:p>
      <text:p text:style-name="Code"/>
      <text:list text:continue-numbering="true" text:style-name="Numbering_20_123">
        <text:list-item>
          <text:p text:style-name="P77"><text:bookmark-start text:name="__RefHeading___Toc20581_1961033176"/>Factorial with<text:span text:style-name="T17">out using</text:span> recursion<text:bookmark-end text:name="__RefHeading___Toc20581_1961033176"/></text:p>
        </text:list-item>
      </text:list>
      <text:p text:style-name="Code">#include &lt;stdio.h&gt;</text:p>
      <text:p text:style-name="Code"/>
      <text:p text:style-name="Code">// Iterative function to calculate factorial</text:p>
      <text:p text:style-name="P65">unsigned long long int factorialIterative(int n)</text:p>
      <text:p text:style-name="P65">{</text:p>
      <text:p text:style-name="Code"><text:s text:c="4"/>unsigned long long int result = 1;</text:p>
      <text:p text:style-name="Code"><text:s text:c="4"/></text:p>
      <text:p text:style-name="P65"><text:s text:c="4"/>for (int i = 1; i &lt;= n; i++)</text:p>
      <text:p text:style-name="P65"><text:s text:c="4"/>{</text:p>
      <text:p text:style-name="Code"><text:s text:c="8"/>result *= i;</text:p>
      <text:p text:style-name="Code"><text:s text:c="4"/>}</text:p>
      <text:p text:style-name="Code"><text:s text:c="4"/></text:p>
      <text:p text:style-name="Code"><text:s text:c="4"/>return result;</text:p>
      <text:p text:style-name="Code">}</text:p>
      <text:p text:style-name="Code"/>
      <text:p text:style-name="P65">int main()</text:p>
      <text:p text:style-name="P65">{</text:p>
      <text:p text:style-name="Code"><text:s text:c="4"/>int num;</text:p>
      <text:p text:style-name="Code"><text:s text:c="4"/>printf("Enter a positive integer: ");</text:p>
      <text:p text:style-name="Code"><text:s text:c="4"/>scanf("%d", &amp;num);</text:p>
      <text:p text:style-name="Code"/>
      <text:p text:style-name="P65"><text:soft-page-break/><text:s text:c="4"/>if (num &lt; 0)</text:p>
      <text:p text:style-name="P65"><text:s text:c="4"/>{</text:p>
      <text:p text:style-name="Code"><text:s text:c="8"/>printf("Factorial of a negative number doesn't exist.\n");</text:p>
      <text:p text:style-name="P65"><text:s text:c="4"/>}</text:p>
      <text:p text:style-name="P65"><text:s text:c="4"/>else</text:p>
      <text:p text:style-name="P65"><text:s text:c="4"/>{</text:p>
      <text:p text:style-name="Code"><text:s text:c="8"/>printf("Factorial of %d (Iterative): %llu\n", num, factorialIterative(num));</text:p>
      <text:p text:style-name="Code"><text:s text:c="4"/>}</text:p>
      <text:p text:style-name="Code"/>
      <text:p text:style-name="Code"><text:s text:c="4"/>return 0;</text:p>
      <text:p text:style-name="Code">}</text:p>
      <text:p text:style-name="Code"/>
      <text:list text:continue-numbering="true" text:style-name="Numbering_20_123">
        <text:list-item>
          <text:p text:style-name="P78"><text:bookmark-start text:name="__RefHeading___Toc20579_1961033176"/>Factorial using recursion<text:bookmark-end text:name="__RefHeading___Toc20579_1961033176"/></text:p>
        </text:list-item>
      </text:list>
      <text:p text:style-name="Code">#include &lt;stdio.h&gt;</text:p>
      <text:p text:style-name="Code"/>
      <text:p text:style-name="Code">// Recursive function to calculate factorial</text:p>
      <text:p text:style-name="P67">unsigned long long int factorialRecursive(int n)</text:p>
      <text:p text:style-name="P67">{</text:p>
      <text:p text:style-name="Code"><text:s text:c="4"/>// Base case</text:p>
      <text:p text:style-name="P67"><text:s text:c="4"/>if (n == 0 || n == 1)</text:p>
      <text:p text:style-name="P67"><text:s text:c="4"/>{</text:p>
      <text:p text:style-name="Code"><text:s text:c="8"/>return 1;</text:p>
      <text:p text:style-name="Code"><text:s text:c="4"/>}</text:p>
      <text:p text:style-name="Code"><text:s text:c="4"/>// Recursive step</text:p>
      <text:p text:style-name="Code"><text:s text:c="4"/>return n * factorialRecursive(n - 1);</text:p>
      <text:p text:style-name="Code">}</text:p>
      <text:p text:style-name="Code"/>
      <text:p text:style-name="P68">int main()</text:p>
      <text:p text:style-name="P68">{</text:p>
      <text:p text:style-name="Code"><text:s text:c="4"/>int num;</text:p>
      <text:p text:style-name="Code"><text:s text:c="4"/>printf("Enter a positive integer: ");</text:p>
      <text:p text:style-name="Code"><text:s text:c="4"/>scanf("%d", &amp;num);</text:p>
      <text:p text:style-name="Code"/>
      <text:p text:style-name="P68"><text:s text:c="4"/>if (num &lt; 0)</text:p>
      <text:p text:style-name="P68"><text:s text:c="4"/>{</text:p>
      <text:p text:style-name="Code"><text:s text:c="8"/>printf("Factorial of a negative number doesn't exist.\n");</text:p>
      <text:p text:style-name="P69"><text:s text:c="4"/>}</text:p>
      <text:p text:style-name="P69"><text:s text:c="4"/>else</text:p>
      <text:p text:style-name="P69"><text:s text:c="4"/>{</text:p>
      <text:p text:style-name="Code"><text:s text:c="8"/>printf("Factorial of %d (Recursive): %llu\n", num, factorialRecursive(num));</text:p>
      <text:p text:style-name="Code"><text:s text:c="4"/>}</text:p>
      <text:p text:style-name="Code"/>
      <text:p text:style-name="Code"><text:s text:c="4"/>return 0;</text:p>
      <text:p text:style-name="Code">}</text:p>
      <text:p text:style-name="Code"/>
      <text:list text:continue-numbering="true" text:style-name="Numbering_20_123">
        <text:list-item>
          <text:p text:style-name="Section"><text:bookmark-start text:name="__RefHeading___Toc20575_1961033176"/>C program without semicolon<text:bookmark-end text:name="__RefHeading___Toc20575_1961033176"/></text:p>
        </text:list-item>
      </text:list>
      <text:p text:style-name="Code">#include &lt;stdio.h&gt;</text:p>
      <text:p text:style-name="Code"/>
      <text:p text:style-name="P70">int main()</text:p>
      <text:p text:style-name="P70"><text:soft-page-break/>{</text:p>
      <text:p text:style-name="P70"><text:s text:c="4"/>if (printf("Hello, World!\n"))</text:p>
      <text:p text:style-name="P70"><text:s text:c="4"/>{</text:p>
      <text:p text:style-name="Code"><text:s text:c="8"/>// The condition evaluates, executes printf, and runs this empty block</text:p>
      <text:p text:style-name="Code"><text:s text:c="4"/>}</text:p>
      <text:p text:style-name="Code">}</text:p>
      <text:p text:style-name="Code"/>
      <text:list text:continue-numbering="true" text:style-name="Numbering_20_123">
        <text:list-item>
          <text:p text:style-name="P79"><text:bookmark-start text:name="__RefHeading___Toc20573_1961033176"/>Printing multiple times without loop<text:bookmark-end text:name="__RefHeading___Toc20573_1961033176"/></text:p>
        </text:list-item>
      </text:list>
      <text:p text:style-name="Code">#include &lt;stdio.h&gt;</text:p>
      <text:p text:style-name="Code"/>
      <text:p text:style-name="Code">// Recursive function to print the message</text:p>
      <text:p text:style-name="Code">void printHello(int count) {</text:p>
      <text:p text:style-name="Code"><text:s text:c="4"/>// Base case: stop when count reaches 0</text:p>
      <text:p text:style-name="P71"><text:s text:c="4"/>if (count == 0)</text:p>
      <text:p text:style-name="P71"><text:span text:style-name="T20"><text:s text:c="4"/></text:span>{</text:p>
      <text:p text:style-name="Code"><text:s text:c="8"/>return;</text:p>
      <text:p text:style-name="Code"><text:s text:c="4"/>}</text:p>
      <text:p text:style-name="Code"><text:s text:c="4"/></text:p>
      <text:p text:style-name="Code"><text:s text:c="4"/>// Print the statement once</text:p>
      <text:p text:style-name="Code"><text:s text:c="4"/>printf("Hello World\n");</text:p>
      <text:p text:style-name="Code"><text:s text:c="4"/></text:p>
      <text:p text:style-name="Code"><text:s text:c="4"/>// Recursive call with decremented count</text:p>
      <text:p text:style-name="Code"><text:s text:c="4"/>printHello(count - 1);</text:p>
      <text:p text:style-name="Code">}</text:p>
      <text:p text:style-name="Code"/>
      <text:p text:style-name="P71">int main()</text:p>
      <text:p text:style-name="P71">{</text:p>
      <text:p text:style-name="Code"><text:s text:c="4"/>// Call the function to print 10 times</text:p>
      <text:p text:style-name="Code"><text:s text:c="4"/>printHello(10);</text:p>
      <text:p text:style-name="Code"><text:s text:c="4"/></text:p>
      <text:p text:style-name="Code"><text:s text:c="4"/>return 0;</text:p>
      <text:p text:style-name="Code">}</text:p>
      <text:p text:style-name="Code"/>
      <text:list text:continue-numbering="true" text:style-name="Numbering_20_123">
        <text:list-item>
          <text:p text:style-name="P80"><text:bookmark-start text:name="__RefHeading___Toc8398_662833756"/>Reverse a number<text:bookmark-end text:name="__RefHeading___Toc8398_662833756"/></text:p>
        </text:list-item>
      </text:list>
      <text:p text:style-name="Code">#include &lt;stdio.h&gt;</text:p>
      <text:p text:style-name="Code"/>
      <text:p text:style-name="P72">int main()</text:p>
      <text:p text:style-name="P72">{</text:p>
      <text:p text:style-name="Code"><text:s text:c="4"/>int num, reversedNum = 0, remainder;</text:p>
      <text:p text:style-name="Code"/>
      <text:p text:style-name="Code"><text:s text:c="4"/>printf("Enter an integer: ");</text:p>
      <text:p text:style-name="Code"><text:s text:c="4"/>scanf("%d", &amp;num);</text:p>
      <text:p text:style-name="Code"/>
      <text:p text:style-name="Code"><text:s text:c="4"/>// Loop to reverse the number</text:p>
      <text:p text:style-name="P72"><text:s text:c="4"/>while (num != 0)</text:p>
      <text:p text:style-name="P72"><text:s text:c="4"/>{</text:p>
      <text:p text:style-name="Code"><text:s text:c="8"/>remainder = num % 10; <text:s text:c="11"/>// Get the last digit</text:p>
      <text:p text:style-name="Code"><text:s text:c="8"/>reversedNum = reversedNum * 10 + remainder; // Append it to the reversed number</text:p>
      <text:p text:style-name="Code"><text:soft-page-break/><text:s text:c="8"/>num /= 10; <text:s text:c="22"/>// Remove the last digit from the original number</text:p>
      <text:p text:style-name="Code"><text:s text:c="4"/>}</text:p>
      <text:p text:style-name="Code"/>
      <text:p text:style-name="Code"><text:s text:c="4"/>printf("Reversed Number = %d\n", reversedNum);</text:p>
      <text:p text:style-name="Code"/>
      <text:p text:style-name="Code"><text:s text:c="4"/>return 0;</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5</text:page-number><text:s/>/ <text:page-count>75</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13T10:18:14.737842500</dc:date>
    <meta:editing-duration>PT4H37M12S</meta:editing-duration>
    <meta:editing-cycles>219</meta:editing-cycles>
    <meta:generator>LibreOffice/24.2.7.2$Linux_X86_64 LibreOffice_project/420$Build-2</meta:generator>
    <meta:document-statistic meta:table-count="1" meta:image-count="1" meta:object-count="0" meta:page-count="75" meta:paragraph-count="2506" meta:word-count="15012" meta:character-count="89871" meta:non-whitespace-character-count="73540"/>
  </office:meta>
</office:document-meta>
</file>